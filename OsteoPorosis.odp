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Pictures/100000000000044A000002A13C1C7B10.png" manifest:media-type="image/png"/>
  <manifest:file-entry manifest:full-path="Pictures/10000000000001E1000001564D2A096B.png" manifest:media-type="image/png"/>
  <manifest:file-entry manifest:full-path="Pictures/100000000000024B0000019DA2328300.png" manifest:media-type="image/png"/>
  <manifest:file-entry manifest:full-path="Pictures/10000000000001E30000014736E831B5.png" manifest:media-type="image/png"/>
  <manifest:file-entry manifest:full-path="Pictures/1000000000000237000001724EF33CCE.png" manifest:media-type="image/png"/>
  <manifest:file-entry manifest:full-path="Pictures/10000000000002B2000002029FD8B1AC.png" manifest:media-type="image/png"/>
  <manifest:file-entry manifest:full-path="Pictures/10000000000004930000024FBA8AEDB7.png" manifest:media-type="image/png"/>
  <manifest:file-entry manifest:full-path="Pictures/1000000000000455000001E56846EB3B.png" manifest:media-type="image/png"/>
  <manifest:file-entry manifest:full-path="Pictures/TablePreview21.svm" manifest:media-type=""/>
  <manifest:file-entry manifest:full-path="Pictures/10000000000001DB00000148C508359C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000000002A0000002A003CF213D.jpg" manifest:media-type="image/jpeg"/>
  <manifest:file-entry manifest:full-path="Pictures/TablePreview2.svm" manifest:media-type=""/>
  <manifest:file-entry manifest:full-path="Pictures/TablePreview19.svm" manifest:media-type=""/>
  <manifest:file-entry manifest:full-path="Pictures/10000000000002A0000002A005635CB2.jpg" manifest:media-type="image/jpeg"/>
  <manifest:file-entry manifest:full-path="Pictures/TablePreview14.svm" manifest:media-type=""/>
  <manifest:file-entry manifest:full-path="Pictures/10000000000002A0000002A04A01643C.jpg" manifest:media-type="image/jpeg"/>
  <manifest:file-entry manifest:full-path="Pictures/TablePreview1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2A0000002A06ACED938.jpg" manifest:media-type="image/jpeg"/>
  <manifest:file-entry manifest:full-path="Pictures/TablePreview8.svm" manifest:media-type=""/>
  <manifest:file-entry manifest:full-path="Pictures/TablePreview11.svm" manifest:media-type=""/>
  <manifest:file-entry manifest:full-path="Pictures/10000000000002A0000002A05858E52C.jpg" manifest:media-type="image/jpeg"/>
  <manifest:file-entry manifest:full-path="Pictures/TablePreview9.svm" manifest:media-type=""/>
  <manifest:file-entry manifest:full-path="Pictures/TablePreview12.svm" manifest:media-type=""/>
  <manifest:file-entry manifest:full-path="Pictures/100000000000031C000001D5D9E6AC3D.png" manifest:media-type="image/png"/>
  <manifest:file-entry manifest:full-path="Pictures/TablePreview13.svm" manifest:media-type=""/>
  <manifest:file-entry manifest:full-path="Pictures/TablePreview15.svm" manifest:media-type=""/>
  <manifest:file-entry manifest:full-path="Pictures/TablePreview3.svm" manifest:media-type=""/>
  <manifest:file-entry manifest:full-path="Pictures/100000000000038D000004C8FBBCF6DD.png" manifest:media-type="image/png"/>
  <manifest:file-entry manifest:full-path="Pictures/10000000000002A0000002A063C630EF.jpg" manifest:media-type="image/jpeg"/>
  <manifest:file-entry manifest:full-path="Pictures/TablePreview18.svm" manifest:media-type=""/>
  <manifest:file-entry manifest:full-path="Pictures/TablePreview20.svm" manifest:media-type=""/>
  <manifest:file-entry manifest:full-path="Pictures/1000000000000388000004C8E2C0FA71.png" manifest:media-type="image/png"/>
  <manifest:file-entry manifest:full-path="Pictures/TablePreview16.svm" manifest:media-type=""/>
  <manifest:file-entry manifest:full-path="Pictures/10000000000002F300000530B3846A09.png" manifest:media-type="image/png"/>
  <manifest:file-entry manifest:full-path="Pictures/TablePreview17.svm" manifest:media-type=""/>
  <manifest:file-entry manifest:full-path="settings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eta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" svg:font-family="Century"/>
    <style:font-face style:name="IPAゴシック" svg:font-family="IPAゴシック" style:font-family-generic="swiss" style:font-pitch="variable"/>
    <style:font-face style:name="IPA明朝" svg:font-family="IPA明朝" style:font-pitch="variable"/>
    <style:font-face style:name="Liberation Mono" svg:font-family="'Liberation Mono'" style:font-adornments="標準" style:font-family-generic="modern" style:font-pitch="fixed"/>
    <style:font-face style:name="Liberation Sans" svg:font-family="'Liberation Sans'" style:font-family-generic="roman" style:font-pitch="variable"/>
    <style:font-face style:name="Nasu" svg:font-family="Nasu" style:font-pitch="variable"/>
    <style:font-face style:name="NasuM" svg:font-family="NasuM" style:font-adornments="標準" style:font-pitch="variable"/>
    <style:font-face style:name="NasuM1" svg:font-family="Nasu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URW Bookman" svg:font-family="'URW Bookman'" style:font-adornments="細字斜体" style:font-pitch="variable"/>
    <style:font-face style:name="URW Bookman1" svg:font-family="'URW Bookman'" style:font-adornments="標準" style:font-pitch="variable"/>
    <style:font-face style:name="ＭＳ Ｐ明朝" svg:font-family="'ＭＳ Ｐ明朝'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2.819cm" fo:min-width="5.7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6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7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8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9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0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1" style:family="graphic" style:parent-style-name="standard">
      <style:graphic-properties draw:stroke="solid" svg:stroke-width="0.026cm" svg:stroke-color="#c0000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22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3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4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5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6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7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8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2.277cm" fo:min-width="4.487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5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2.277cm" fo:min-width="4.487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6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2.277cm" fo:min-width="4.487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7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2.277cm" fo:min-width="4.487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8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2.277cm" fo:min-width="4.487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9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2.277cm" fo:min-width="4.487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0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1.013cm" fo:min-width="3.36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1.013cm" fo:min-width="3.36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1.013cm" fo:min-width="3.36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1.013cm" fo:min-width="3.36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1.013cm" fo:min-width="3.36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1.013cm" fo:min-width="3.36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1.555cm" fo:min-width="3.3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solid" svg:stroke-width="0.071cm" svg:stroke-color="#ff6666" svg:stroke-linecap="butt" draw:fill="none" loext:fill-use-slide-background="false" draw:textarea-horizontal-align="justify" draw:textarea-vertical-align="middle" draw:auto-grow-height="false" draw:fit-to-size="false" style:shrink-to-fit="false" fo:min-height="1.193cm" fo:min-width="3.543cm" fo:padding-top="0.125cm" fo:padding-bottom="0.125cm" fo:padding-left="0.25cm" fo:padding-right="0.25cm" fo:wrap-option="wrap" style:writing-mode="lr-tb" loext:decorative="false">
        <loext:stroke-complex-color loext:theme-type="accent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style:writing-mode="lr-tb"/>
    </style:style>
    <style:style style:name="gr48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9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0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1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2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3" style:family="graphic" style:parent-style-name="standard" style:list-style-name="L4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4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solid" svg:stroke-width="0.071cm" svg:stroke-color="#c0000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solid" svg:stroke-width="0.071cm" svg:stroke-color="#ff6666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style:writing-mode="lr-tb"/>
    </style:style>
    <style:style style:name="gr62" style:family="graphic" style:parent-style-name="standard">
      <style:graphic-properties draw:stroke="none" svg:stroke-width="0.071cm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gr63" style:family="graphic">
      <style:graphic-properties style:writing-mode="lr-tb" loext:decorative="false"/>
    </style:style>
    <style:style style:name="gr64" style:family="graphic" style:parent-style-name="standard">
      <style:graphic-properties draw:stroke="solid" svg:stroke-width="0.071cm" svg:stroke-color="#000000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light1" loext:color-type="theme"/>
        <loext:fill-complex-color loext:theme-type="light1" loext:color-type="theme"/>
      </style:graphic-properties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svg:stroke-width="0.071cm" svg:stroke-linecap="butt" draw:fill="solid" draw:fill-color="#0070c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8" style:family="graphic" style:parent-style-name="standard">
      <style:graphic-properties draw:stroke="solid" svg:stroke-width="0.071cm" svg:stroke-color="#3a5f8b" svg:stroke-linecap="butt" draw:fill="solid" draw:fill-color="#bf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2" loext:color-type="theme">
          <loext:transformation loext:type="lummod" loext:value="7500"/>
        </loext:fill-complex-color>
      </style:graphic-properties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svg:stroke-width="0.071cm" svg:stroke-linecap="butt" draw:fill="solid" draw:fill-color="#0000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>
      <style:graphic-properties draw:stroke="solid" svg:stroke-width="0.071cm" svg:stroke-color="#17375e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light2" loext:color-type="theme">
          <loext:transformation loext:type="lummod" loext:value="7500"/>
        </loext:stroke-complex-color>
        <loext:fill-complex-color loext:theme-type="light1" loext:color-type="theme"/>
      </style:graphic-properties>
    </style:style>
    <style:style style:name="gr79" style:family="graphic" style:parent-style-name="standard" style:list-style-name="L5">
      <style:graphic-properties draw:stroke="solid" svg:stroke-width="0.071cm" svg:stroke-color="#ffffff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  <loext:fill-complex-color loext:theme-type="light1" loext:color-type="theme"/>
      </style:graphic-properties>
      <style:paragraph-properties style:writing-mode="lr-tb"/>
    </style:style>
    <style:style style:name="gr80" style:family="graphic" style:parent-style-name="standard" style:list-style-name="L5">
      <style:graphic-properties draw:stroke="solid" svg:stroke-width="0.071cm" svg:stroke-color="#ffffff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  <loext:fill-complex-color loext:theme-type="light1" loext:color-type="theme"/>
      </style:graphic-properties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5">
      <style:graphic-properties draw:stroke="solid" svg:stroke-width="0.071cm" svg:stroke-color="#ffffff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  <loext:fill-complex-color loext:theme-type="light1" loext:color-type="theme"/>
      </style:graphic-properties>
      <style:paragraph-properties style:writing-mode="lr-tb"/>
    </style:style>
    <style:style style:name="gr85" style:family="graphic" style:parent-style-name="standard" style:list-style-name="L5">
      <style:graphic-properties draw:stroke="solid" svg:stroke-width="0.071cm" svg:stroke-color="#ffffff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  <loext:fill-complex-color loext:theme-type="light1" loext:color-type="theme"/>
      </style:graphic-properties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standard">
      <style:graphic-properties draw:stroke="solid" svg:stroke-width="0.168cm" svg:stroke-color="#ff0000" draw:marker-end="msArrowOpenEnd_20_5_20_168" draw:marker-end-width="0.588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>
      <style:graphic-properties draw:stroke="solid" svg:stroke-width="0.159cm" svg:stroke-color="#c00000" draw:marker-end="msArrowOpenEnd_20_5_20_159" draw:marker-end-width="0.556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7" style:family="graphic" style:parent-style-name="standard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9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standard">
      <style:graphic-properties draw:stroke="solid" svg:stroke-width="0.071cm" svg:stroke-color="#ffffff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dark1" loext:color-type="theme"/>
        <loext:fill-complex-color loext:theme-type="light1" loext:color-type="theme"/>
      </style:graphic-properties>
    </style:style>
    <style:style style:name="gr10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4" style:family="graphic" style:parent-style-name="standard">
      <style:graphic-properties draw:stroke="solid" svg:stroke-width="0.159cm" svg:stroke-color="#bf0000" draw:marker-end="msArrowOpenEnd_20_5_20_159" draw:marker-end-width="0.556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2" loext:color-type="theme">
          <loext:transformation loext:type="lummod" loext:value="7500"/>
        </loext:stroke-complex-color>
      </style:graphic-properties>
    </style:style>
    <style:style style:name="gr1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22" style:family="graphic" style:parent-style-name="standard">
      <style:graphic-properties draw:stroke="solid" svg:stroke-width="0.071cm" svg:stroke-color="#3a5f8b" svg:stroke-linecap="butt" draw:fill="solid" draw:fill-color="#4f81b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</style:style>
    <style:style style:name="gr123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24" style:family="graphic" style:parent-style-name="standard" style:list-style-name="L7">
      <style:graphic-properties draw:stroke="solid" svg:stroke-width="0.071cm" svg:stroke-color="#3a5f8b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27" style:family="graphic" style:parent-style-name="standard" style:list-style-name="L7">
      <style:graphic-properties draw:stroke="solid" svg:stroke-width="0.071cm" svg:stroke-color="#3a5f8b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30" style:family="graphic" style:parent-style-name="standard" style:list-style-name="L7">
      <style:graphic-properties draw:stroke="solid" svg:stroke-width="0.071cm" svg:stroke-color="#3a5f8b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31" style:family="graphic" style:parent-style-name="standard" style:list-style-name="L8">
      <style:graphic-properties draw:stroke="none" svg:stroke-width="0cm" draw:fill="solid" draw:fill-color="#00206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33" style:family="graphic" style:parent-style-name="standard" style:list-style-name="L7">
      <style:graphic-properties draw:stroke="solid" svg:stroke-width="0.071cm" svg:stroke-color="#3a5f8b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34" style:family="graphic" style:parent-style-name="standard">
      <style:graphic-properties draw:stroke="solid" svg:stroke-width="0.071cm" svg:stroke-color="#ffffff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35" style:family="graphic" style:parent-style-name="standard">
      <style:graphic-properties draw:stroke="solid" svg:stroke-width="0.106cm" svg:stroke-color="#ffffff" draw:marker-end="msArrowOpenEnd_20_6_20_106" draw:marker-end-width="0.371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1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8">
      <style:graphic-properties draw:stroke="none" svg:stroke-width="0cm" draw:fill="solid" draw:fill-color="#00206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40" style:family="graphic" style:parent-style-name="standard" style:list-style-name="L7">
      <style:graphic-properties draw:stroke="solid" svg:stroke-width="0.071cm" svg:stroke-color="#3a5f8b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41" style:family="graphic" style:parent-style-name="standard">
      <style:graphic-properties draw:stroke="solid" svg:stroke-width="0.071cm" svg:stroke-color="#be0202" svg:stroke-linecap="butt" draw:fill="solid" draw:fill-color="#ff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42" style:family="graphic" style:parent-style-name="standard">
      <style:graphic-properties draw:stroke="none" svg:stroke-width="0.071cm" svg:stroke-linecap="butt" draw:fill="solid" draw:fill-color="#00009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8">
      <style:graphic-properties draw:stroke="none" svg:stroke-width="0cm" draw:fill="solid" draw:fill-color="#00206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48" style:family="graphic" style:parent-style-name="standard" style:list-style-name="L7">
      <style:graphic-properties draw:stroke="solid" svg:stroke-width="0.071cm" svg:stroke-color="#3a5f8b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0" style:family="graphic" style:parent-style-name="standard">
      <style:graphic-properties draw:stroke="solid" svg:stroke-width="0.106cm" svg:stroke-color="#ff000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151" style:family="graphic" style:parent-style-name="standard">
      <style:graphic-properties draw:stroke="solid" svg:stroke-width="0.212cm" svg:stroke-color="#ff0000" draw:marker-end="msArrowOpenEnd_20_5_20_212" draw:marker-end-width="0.742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1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5" style:family="graphic" style:parent-style-name="standard" style:list-style-name="L8">
      <style:graphic-properties draw:stroke="none" svg:stroke-width="0cm" draw:fill="solid" draw:fill-color="#00206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3">
      <style:graphic-properties draw:stroke="solid" svg:stroke-width="0.071cm" svg:stroke-color="#ffffff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57" style:family="graphic" style:parent-style-name="standard" style:list-style-name="L7">
      <style:graphic-properties draw:stroke="solid" svg:stroke-width="0.071cm" svg:stroke-color="#3a5f8b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2" style:family="graphic" style:parent-style-name="standard" style:list-style-name="L3">
      <style:graphic-properties draw:stroke="solid" svg:stroke-width="0cm" svg:stroke-color="#ff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3" style:family="graphic" style:parent-style-name="standard">
      <style:graphic-properties draw:stroke="solid" svg:stroke-width="0.026cm" svg:stroke-color="#ff0000" draw:marker-end="msArrowOpenEnd_20_5_20_26" draw:marker-end-width="0.245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164" style:family="graphic" style:parent-style-name="standard" style:list-style-name="L3">
      <style:graphic-properties draw:stroke="solid" svg:stroke-width="0cm" svg:stroke-color="#ff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8" style:family="graphic" style:parent-style-name="standard">
      <style:graphic-properties draw:stroke="none" svg:stroke-width="0.071cm" svg:stroke-linecap="butt" draw:fill="solid" draw:fill-color="#ff999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17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1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6" style:family="graphic" style:parent-style-name="standard">
      <style:graphic-properties draw:stroke="solid" svg:stroke-width="0.079cm" svg:stroke-color="#81e6f1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5" loext:color-type="theme">
          <loext:transformation loext:type="lummod" loext:value="6000"/>
          <loext:transformation loext:type="lumoff" loext:value="4000"/>
        </loext:stroke-complex-color>
      </style:graphic-properties>
    </style:style>
    <style:style style:name="gr19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9" style:family="graphic" style:parent-style-name="standard">
      <style:graphic-properties draw:stroke="solid" svg:stroke-width="0.079cm" svg:stroke-color="#fabb76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6" loext:color-type="theme">
          <loext:transformation loext:type="lummod" loext:value="6000"/>
          <loext:transformation loext:type="lumoff" loext:value="4000"/>
        </loext:stroke-complex-color>
      </style:graphic-properties>
    </style:style>
    <style:style style:name="gr20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2" style:family="graphic" style:parent-style-name="standard">
      <style:graphic-properties draw:stroke="solid" svg:stroke-width="0.079cm" svg:stroke-color="#98ec76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3" loext:color-type="theme">
          <loext:transformation loext:type="lummod" loext:value="6000"/>
          <loext:transformation loext:type="lumoff" loext:value="4000"/>
        </loext:stroke-complex-color>
      </style:graphic-properties>
    </style:style>
    <style:style style:name="gr2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7" style:family="graphic" style:parent-style-name="standard">
      <style:graphic-properties draw:stroke="solid" svg:stroke-width="0.079cm" svg:stroke-color="#ff6666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2" loext:color-type="theme">
          <loext:transformation loext:type="lummod" loext:value="6000"/>
          <loext:transformation loext:type="lumoff" loext:value="4000"/>
        </loext:stroke-complex-color>
      </style:graphic-properties>
    </style:style>
    <style:style style:name="gr2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2" style:family="graphic" style:parent-style-name="standard">
      <style:graphic-properties draw:stroke="solid" svg:stroke-width="0.079cm" svg:stroke-color="#ffffff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2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7" style:family="graphic" style:parent-style-name="standard">
      <style:graphic-properties draw:stroke="solid" svg:stroke-width="0.079cm" svg:stroke-color="#ff0000" draw:marker-end="msArrowOpenEnd_20_5_20_79" draw:marker-end-width="0.276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2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7" style:family="graphic" style:parent-style-name="standard" style:list-style-name="L9">
      <style:graphic-properties draw:stroke="none" svg:stroke-width="0cm" draw:fill="solid" draw:fill-color="#0000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2" style:family="graphic" style:parent-style-name="standard">
      <style:graphic-properties draw:stroke="dash" draw:stroke-dash="Dash_20_Dot_20_1" svg:stroke-width="0.026cm" svg:stroke-color="#ff000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83" style:family="graphic" style:parent-style-name="standard">
      <style:graphic-properties draw:stroke="dash" draw:stroke-dash="Dash_20_Dot_20_1" svg:stroke-width="0.026cm" svg:stroke-color="#ab74d5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4" loext:color-type="theme">
          <loext:transformation loext:type="lummod" loext:value="6000"/>
          <loext:transformation loext:type="lumoff" loext:value="4000"/>
        </loext:stroke-complex-color>
      </style:graphic-properties>
    </style:style>
    <style:style style:name="gr284" style:family="graphic" style:parent-style-name="standard">
      <style:graphic-properties draw:stroke="dash" draw:stroke-dash="Dash_20_Dot_20_1" svg:stroke-width="0.026cm" svg:stroke-color="#98ec76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3" loext:color-type="theme">
          <loext:transformation loext:type="lummod" loext:value="6000"/>
          <loext:transformation loext:type="lumoff" loext:value="4000"/>
        </loext:stroke-complex-color>
      </style:graphic-properties>
    </style:style>
    <style:style style:name="gr28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859cm, 1.915cm, 2.952cm)" draw:image-opacity="100%" style:mirror="none" loext:decorative="false"/>
    </style:style>
    <style:style style:name="gr29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047cm, 2.862cm, 2.356cm)" draw:image-opacity="100%" style:mirror="none" loext:decorative="false"/>
    </style:style>
    <style:style style:name="gr29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7" style:family="graphic" style:parent-style-name="standard">
      <style:graphic-properties draw:stroke="solid" svg:stroke-width="0.071cm" svg:stroke-color="#3a5f8b" svg:stroke-linecap="butt" draw:fill="gradient" draw:fill-gradient-name="Gradient_20_1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29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0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1" style:family="graphic" style:parent-style-name="standard" style:list-style-name="L5">
      <style:graphic-properties draw:stroke="none" svg:stroke-width="0cm" draw:fill="solid" draw:fill-color="#ffff00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2" style:family="graphic" style:parent-style-name="standard" style:list-style-name="L5">
      <style:graphic-properties draw:stroke="none" svg:stroke-width="0cm" draw:fill="solid" draw:fill-color="#fbd1a3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style:writing-mode="lr-tb"/>
    </style:style>
    <style:style style:name="gr30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4" style:family="graphic" style:parent-style-name="standard">
      <style:graphic-properties draw:stroke="none" svg:stroke-width="0.071cm" svg:stroke-linecap="butt" draw:fill="gradient" draw:fill-gradient-name="Gradient_20_1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05" style:family="graphic" style:parent-style-name="standard" style:list-style-name="L3">
      <style:graphic-properties draw:stroke="none" svg:stroke-width="0cm" draw:fill="solid" draw:fill-color="#8eb4e3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dark2" loext:color-type="theme">
          <loext:transformation loext:type="lummod" loext:value="4000"/>
          <loext:transformation loext:type="lumoff" loext:value="6000"/>
        </loext:fill-complex-color>
      </style:graphic-properties>
      <style:paragraph-properties style:writing-mode="lr-tb"/>
    </style:style>
    <style:style style:name="gr3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5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8" style:family="graphic" style:parent-style-name="standard" style:list-style-name="L5">
      <style:graphic-properties draw:stroke="none" svg:stroke-width="0cm" draw:fill="solid" draw:fill-color="#ffff00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9" style:family="graphic" style:parent-style-name="standard" style:list-style-name="L5">
      <style:graphic-properties draw:stroke="none" svg:stroke-width="0cm" draw:fill="solid" draw:fill-color="#fbd1a3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style:writing-mode="lr-tb"/>
    </style:style>
    <style:style style:name="gr320" style:family="graphic" style:parent-style-name="standard" style:list-style-name="L3">
      <style:graphic-properties draw:stroke="none" svg:stroke-width="0cm" draw:fill="solid" draw:fill-color="#8eb4e3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dark2" loext:color-type="theme">
          <loext:transformation loext:type="lummod" loext:value="4000"/>
          <loext:transformation loext:type="lumoff" loext:value="6000"/>
        </loext:fill-complex-color>
      </style:graphic-properties>
      <style:paragraph-properties style:writing-mode="lr-tb"/>
    </style:style>
    <style:style style:name="gr3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6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6" style:family="graphic" style:parent-style-name="standard" style:list-style-name="L3">
      <style:graphic-properties draw:stroke="none" svg:stroke-width="0cm" draw:fill="gradient" draw:fill-gradient-name="Gradient_20_13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7" style:family="graphic" style:parent-style-name="standard" style:list-style-name="L3">
      <style:graphic-properties draw:stroke="none" svg:stroke-width="0cm" draw:fill="gradient" draw:fill-gradient-name="Gradient_20_14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8" style:family="graphic" style:parent-style-name="standard">
      <style:graphic-properties draw:stroke="solid" svg:stroke-width="0.071cm" svg:stroke-color="#3a5f8b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light1" loext:color-type="theme"/>
      </style:graphic-properties>
    </style:style>
    <style:style style:name="gr3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0" style:family="graphic" style:parent-style-name="standard" style:list-style-name="L3">
      <style:graphic-properties draw:stroke="none" svg:stroke-width="0cm" draw:fill="solid" draw:fill-color="#8eb4e3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dark2" loext:color-type="theme">
          <loext:transformation loext:type="lummod" loext:value="4000"/>
          <loext:transformation loext:type="lumoff" loext:value="6000"/>
        </loext:fill-complex-color>
      </style:graphic-properties>
      <style:paragraph-properties style:writing-mode="lr-tb"/>
    </style:style>
    <style:style style:name="gr3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03cm, 0cm)" draw:image-opacity="100%" style:mirror="none" loext:decorative="false"/>
    </style:style>
    <style:style style:name="gr35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cm, 0cm, 0cm, 0cm)" draw:image-opacity="100%" style:mirror="none" loext:decorative="false"/>
    </style:style>
    <style:style style:name="gr35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7cm, 0cm)" draw:image-opacity="100%" style:mirror="none" loext:decorative="false"/>
    </style:style>
    <style:style style:name="gr3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02cm, 0cm, 0.307cm, 0cm)" draw:image-opacity="100%" style:mirror="none" loext:decorative="false"/>
    </style:style>
    <style:style style:name="gr36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67cm, 0.529cm, 0.271cm, 0cm)" draw:image-opacity="100%" style:mirror="none" loext:decorative="false"/>
    </style:style>
    <style:style style:name="gr36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86cm, 10.24cm, 0cm)" draw:image-opacity="100%" style:mirror="none" loext:decorative="false"/>
    </style:style>
    <style:style style:name="gr37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214cm, 0.189cm, 0cm, 0cm)" draw:image-opacity="100%" style:mirror="none" loext:decorative="false"/>
    </style:style>
    <style:style style:name="pr1" style:family="presentation" style:parent-style-name="タイトルとコンテンツ-title">
      <style:graphic-properties draw:auto-grow-height="false" fo:min-height="3.181cm" loext:decorative="false"/>
      <style:paragraph-properties style:writing-mode="lr-tb"/>
    </style:style>
    <style:style style:name="pr2" style:family="presentation" style:parent-style-name="タイトルとコンテンツ-outline1">
      <style:graphic-properties draw:auto-grow-height="false" fo:min-height="10.798cm" loext:decorative="false"/>
      <style:paragraph-properties style:writing-mode="lr-tb"/>
    </style:style>
    <style:style style:name="pr3" style:family="presentation" style:parent-style-name="タイトルとコンテンツ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タイトルとコンテンツ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タイトルとコンテンツ-outline1">
      <style:graphic-properties draw:stroke="none" svg:stroke-width="0cm" draw:fill="none" loext:fill-use-slide-background="false" draw:opacity="0%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タイトルとコンテンツ-title">
      <style:graphic-properties fo:min-height="1.97cm" loext:decorative="false"/>
      <style:paragraph-properties style:writing-mode="lr-tb"/>
    </style:style>
    <style:style style:name="pr7" style:family="presentation" style:parent-style-name="タイトルと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タイトルとコンテンツ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タイトル_20_スライド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タイトル_20_スライド-notes">
      <style:graphic-properties draw:fill-color="#ffffff" draw:auto-grow-height="true" fo:min-height="13.364cm" loext:decorative="false"/>
      <style:paragraph-properties style:writing-mode="lr-tb"/>
    </style:style>
    <style:style style:name="pr11" style:family="presentation" style:parent-style-name="タイトルと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6.714cm" style:use-optimal-column-width="false"/>
    </style:style>
    <style:style style:name="co2" style:family="table-column">
      <style:table-column-properties style:column-width="14.287cm" style:use-optimal-column-width="false"/>
    </style:style>
    <style:style style:name="co3" style:family="table-column">
      <style:table-column-properties style:column-width="3.697cm" style:use-optimal-column-width="false"/>
    </style:style>
    <style:style style:name="co4" style:family="table-column">
      <style:table-column-properties style:column-width="8.503cm" style:use-optimal-column-width="false"/>
    </style:style>
    <style:style style:name="co5" style:family="table-column">
      <style:table-column-properties style:column-width="1.959cm" style:use-optimal-column-width="false"/>
    </style:style>
    <style:style style:name="co6" style:family="table-column">
      <style:table-column-properties style:column-width="9.699cm" style:use-optimal-column-width="false"/>
    </style:style>
    <style:style style:name="co7" style:family="table-column">
      <style:table-column-properties style:column-width="3.357cm" style:use-optimal-column-width="false"/>
    </style:style>
    <style:style style:name="co8" style:family="table-column">
      <style:table-column-properties style:column-width="10.742cm" style:use-optimal-column-width="false"/>
    </style:style>
    <style:style style:name="co9" style:family="table-column">
      <style:table-column-properties style:column-width="5.229cm" style:use-optimal-column-width="false"/>
    </style:style>
    <style:style style:name="co10" style:family="table-column">
      <style:table-column-properties style:column-width="5.4cm" style:use-optimal-column-width="false"/>
    </style:style>
    <style:style style:name="co11" style:family="table-column">
      <style:table-column-properties style:column-width="3cm" style:use-optimal-column-width="false"/>
    </style:style>
    <style:style style:name="co12" style:family="table-column">
      <style:table-column-properties style:column-width="8.2cm" style:use-optimal-column-width="false"/>
    </style:style>
    <style:style style:name="co13" style:family="table-column">
      <style:table-column-properties style:column-width="1cm" style:use-optimal-column-width="false"/>
    </style:style>
    <style:style style:name="co14" style:family="table-column">
      <style:table-column-properties style:column-width="2.8cm" style:use-optimal-column-width="false"/>
    </style:style>
    <style:style style:name="co15" style:family="table-column">
      <style:table-column-properties style:column-width="2cm" style:use-optimal-column-width="false"/>
    </style:style>
    <style:style style:name="co16" style:family="table-column">
      <style:table-column-properties style:column-width="11.657cm" style:use-optimal-column-width="false"/>
    </style:style>
    <style:style style:name="co17" style:family="table-column">
      <style:table-column-properties style:column-width="6.744cm" style:use-optimal-column-width="false"/>
    </style:style>
    <style:style style:name="co18" style:family="table-column">
      <style:table-column-properties style:column-width="5.861cm" style:use-optimal-column-width="false"/>
    </style:style>
    <style:style style:name="co19" style:family="table-column">
      <style:table-column-properties style:column-width="1.839cm" style:use-optimal-column-width="false"/>
    </style:style>
    <style:style style:name="co20" style:family="table-column">
      <style:table-column-properties style:column-width="5.603cm" style:use-optimal-column-width="false"/>
    </style:style>
    <style:style style:name="co21" style:family="table-column">
      <style:table-column-properties style:column-width="6.393cm" style:use-optimal-column-width="false"/>
    </style:style>
    <style:style style:name="co22" style:family="table-column">
      <style:table-column-properties style:column-width="2.006cm" style:use-optimal-column-width="false"/>
    </style:style>
    <style:style style:name="co23" style:family="table-column">
      <style:table-column-properties style:column-width="6.113cm" style:use-optimal-column-width="false"/>
    </style:style>
    <style:style style:name="co24" style:family="table-column">
      <style:table-column-properties style:column-width="1.898cm" style:use-optimal-column-width="false"/>
    </style:style>
    <style:style style:name="co25" style:family="table-column">
      <style:table-column-properties style:column-width="2.2cm" style:use-optimal-column-width="false"/>
    </style:style>
    <style:style style:name="co26" style:family="table-column">
      <style:table-column-properties style:column-width="3.2cm" style:use-optimal-column-width="false"/>
    </style:style>
    <style:style style:name="co27" style:family="table-column">
      <style:table-column-properties style:column-width="3.8cm" style:use-optimal-column-width="false"/>
    </style:style>
    <style:style style:name="co28" style:family="table-column">
      <style:table-column-properties style:column-width="2.6cm" style:use-optimal-column-width="false"/>
    </style:style>
    <style:style style:name="co29" style:family="table-column">
      <style:table-column-properties style:column-width="3.6cm" style:use-optimal-column-width="false"/>
    </style:style>
    <style:style style:name="co30" style:family="table-column">
      <style:table-column-properties style:column-width="3.4cm" style:use-optimal-column-width="false"/>
    </style:style>
    <style:style style:name="co31" style:family="table-column">
      <style:table-column-properties style:column-width="2.838cm" style:use-optimal-column-width="false"/>
    </style:style>
    <style:style style:name="co32" style:family="table-column">
      <style:table-column-properties style:column-width="2.75cm" style:use-optimal-column-width="false"/>
    </style:style>
    <style:style style:name="co33" style:family="table-column">
      <style:table-column-properties style:column-width="7cm" style:use-optimal-column-width="false"/>
    </style:style>
    <style:style style:name="co34" style:family="table-column">
      <style:table-column-properties style:column-width="4.2cm" style:use-optimal-column-width="false"/>
    </style:style>
    <style:style style:name="co35" style:family="table-column">
      <style:table-column-properties style:column-width="5.6cm" style:use-optimal-column-width="false"/>
    </style:style>
    <style:style style:name="co36" style:family="table-column">
      <style:table-column-properties style:column-width="6.6cm" style:use-optimal-column-width="false"/>
    </style:style>
    <style:style style:name="co37" style:family="table-column">
      <style:table-column-properties style:column-width="7.4cm" style:use-optimal-column-width="false"/>
    </style:style>
    <style:style style:name="co38" style:family="table-column">
      <style:table-column-properties style:column-width="8.6cm" style:use-optimal-column-width="false"/>
    </style:style>
    <style:style style:name="co39" style:family="table-column">
      <style:table-column-properties style:column-width="6.866cm" style:use-optimal-column-width="false"/>
    </style:style>
    <style:style style:name="co40" style:family="table-column">
      <style:table-column-properties style:column-width="4.734cm" style:use-optimal-column-width="false"/>
    </style:style>
    <style:style style:name="co41" style:family="table-column">
      <style:table-column-properties style:column-width="4.733cm" style:use-optimal-column-width="false"/>
    </style:style>
    <style:style style:name="co42" style:family="table-column">
      <style:table-column-properties style:column-width="5.715cm" style:use-optimal-column-width="false"/>
    </style:style>
    <style:style style:name="ro1" style:family="table-row">
      <style:table-row-properties style:row-height="1.47cm" style:use-optimal-row-height="false"/>
    </style:style>
    <style:style style:name="ro2" style:family="table-row">
      <style:table-row-properties style:row-height="1.169cm" style:use-optimal-row-height="false"/>
    </style:style>
    <style:style style:name="ro3" style:family="table-row">
      <style:table-row-properties style:row-height="2.997cm" style:use-optimal-row-height="false"/>
    </style:style>
    <style:style style:name="ro4" style:family="table-row">
      <style:table-row-properties style:row-height="2.083cm" style:use-optimal-row-height="false"/>
    </style:style>
    <style:style style:name="ro5" style:family="table-row">
      <style:table-row-properties style:row-height="1.092cm" style:use-optimal-row-height="false"/>
    </style:style>
    <style:style style:name="ro6" style:family="table-row">
      <style:table-row-properties style:row-height="1.095cm" style:use-optimal-row-height="false"/>
    </style:style>
    <style:style style:name="ro7" style:family="table-row">
      <style:table-row-properties style:row-height="1.17cm" style:use-optimal-row-height="false"/>
    </style:style>
    <style:style style:name="ro8" style:family="table-row">
      <style:table-row-properties style:row-height="3.009cm" style:use-optimal-row-height="false"/>
    </style:style>
    <style:style style:name="ro9" style:family="table-row">
      <style:table-row-properties style:row-height="1.468cm" style:use-optimal-row-height="false"/>
    </style:style>
    <style:style style:name="ro10" style:family="table-row">
      <style:table-row-properties style:row-height="1.4cm" style:use-optimal-row-height="false"/>
    </style:style>
    <style:style style:name="ro11" style:family="table-row">
      <style:table-row-properties style:row-height="1.017cm" style:use-optimal-row-height="false"/>
    </style:style>
    <style:style style:name="ro12" style:family="table-row">
      <style:table-row-properties style:row-height="0.048cm" style:use-optimal-row-height="false"/>
    </style:style>
    <style:style style:name="ro13" style:family="table-row">
      <style:table-row-properties style:row-height="0.357cm" style:use-optimal-row-height="false"/>
    </style:style>
    <style:style style:name="ro14" style:family="table-row">
      <style:table-row-properties style:row-height="1.877cm" style:use-optimal-row-height="false"/>
    </style:style>
    <style:style style:name="ro15" style:family="table-row">
      <style:table-row-properties style:row-height="0.462cm" style:use-optimal-row-height="false"/>
    </style:style>
    <style:style style:name="ro16" style:family="table-row">
      <style:table-row-properties style:row-height="1.667cm" style:use-optimal-row-height="false"/>
    </style:style>
    <style:style style:name="ro17" style:family="table-row">
      <style:table-row-properties style:row-height="3.04cm" style:use-optimal-row-height="false"/>
    </style:style>
    <style:style style:name="ro18" style:family="table-row">
      <style:table-row-properties style:row-height="1.034cm" style:use-optimal-row-height="false"/>
    </style:style>
    <style:style style:name="ro19" style:family="table-row">
      <style:table-row-properties style:row-height="1.109cm" style:use-optimal-row-height="false"/>
    </style:style>
    <style:style style:name="ro20" style:family="table-row">
      <style:table-row-properties style:row-height="1.041cm" style:use-optimal-row-height="false"/>
    </style:style>
    <style:style style:name="ro21" style:family="table-row">
      <style:table-row-properties style:row-height="1.679cm" style:use-optimal-row-height="false"/>
    </style:style>
    <style:style style:name="ro22" style:family="table-row">
      <style:table-row-properties style:row-height="2.685cm" style:use-optimal-row-height="false"/>
    </style:style>
    <style:style style:name="ro23" style:family="table-row">
      <style:table-row-properties style:row-height="1.22cm" style:use-optimal-row-height="false"/>
    </style:style>
    <style:style style:name="ro24" style:family="table-row">
      <style:table-row-properties style:row-height="1.11cm" style:use-optimal-row-height="false"/>
    </style:style>
    <style:style style:name="ro25" style:family="table-row">
      <style:table-row-properties style:row-height="1.486cm" style:use-optimal-row-height="false"/>
    </style:style>
    <style:style style:name="ro26" style:family="table-row">
      <style:table-row-properties style:row-height="1.688cm" style:use-optimal-row-height="false"/>
    </style:style>
    <style:style style:name="ro27" style:family="table-row">
      <style:table-row-properties style:row-height="1.117cm" style:use-optimal-row-height="false"/>
    </style:style>
    <style:style style:name="ro28" style:family="table-row">
      <style:table-row-properties style:row-height="1.674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ffffff" style:punctuation-wrap="hanging" loext:tab-stop-distance="2.54cm" style:writing-mode="lr-tb">
        <style:tab-stops/>
      </style:paragraph-properties>
      <style:text-properties style:font-name="IPA明朝" style:font-name-asian="IPA明朝" fo:hyphenate="false"/>
    </style:style>
    <style:style style:name="ce2" style:family="table-cell">
      <style:text-properties style:font-name="IPA明朝" style:font-name-asian="IPA明朝"/>
    </style:style>
    <style:style style:name="ce3" style:family="table-cell">
      <loext:graphic-properties draw:fill="none" loext:fill-use-slide-background="false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ffffff" style:punctuation-wrap="hanging" loext:tab-stop-distance="2.54cm" style:writing-mode="lr-tb">
        <style:tab-stops/>
      </style:paragraph-properties>
      <style:text-properties style:font-name="IPA明朝" style:font-name-asian="IPA明朝" fo:hyphenate="false"/>
    </style:style>
    <style:style style:name="ce4" style:family="table-cell">
      <loext:graphic-properties draw:fill="none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20%" fo:text-align="start" fo:text-indent="0cm" fo:border="0.48pt solid #ffffff" style:punctuation-wrap="hanging" loext:tab-stop-distance="2.54cm" style:writing-mode="lr-tb">
        <style:tab-stops/>
      </style:paragraph-properties>
      <style:text-properties style:font-name="IPA明朝" style:font-name-asian="IPA明朝" fo:hyphenate="false"/>
    </style:style>
    <style:style style:name="ce5" style:family="table-cell">
      <loext:graphic-properties draw:fill="none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15%" fo:text-align="center" fo:text-indent="0cm" fo:border="0.48pt solid #ffffff" style:punctuation-wrap="hanging" loext:tab-stop-distance="2.54cm" style:writing-mode="lr-tb">
        <style:tab-stops/>
      </style:paragraph-properties>
      <style:text-properties style:font-name="IPA明朝" style:font-name-asian="IPA明朝" fo:hyphenate="false"/>
    </style:style>
    <style:style style:name="ce6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="0.48pt solid #ffffff"/>
      <style:text-properties style:font-name="IPA明朝" style:font-name-asian="IPA明朝"/>
    </style:style>
    <style:style style:name="ce7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font-style="normal" style:text-underline-style="none" fo:font-weight="bold" fo:background-color="transparent" style:font-name-asian="ＭＳ Ｐ明朝" style:font-size-asian="18pt" style:language-asian="ja" style:country-asian="JP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ce8" style:family="table-cell">
      <loext:graphic-properties draw:fill="none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style:punctuation-wrap="hanging" loext:tab-stop-distance="2.54cm" style:writing-mode="lr-tb">
        <style:tab-stops/>
      </style:paragraph-properties>
      <style:text-properties fo:font-size="16pt" style:font-size-asian="16pt" style:font-size-complex="16pt" fo:hyphenate="false"/>
    </style:style>
    <style:style style:name="ce9" style:family="table-cell">
      <loext:graphic-properties draw:fill="none" loext:fill-use-slide-background="false"/>
      <style:paragraph-properties fo:text-align="center" fo:border="0.28pt solid #ffffff"/>
      <style:text-properties fo:color="#ffffff" loext:opacity="100%" style:font-name="NasuM" style:font-name-asian="NasuM"/>
    </style:style>
    <style:style style:name="ce10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11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12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="0.48pt solid #ffffff"/>
    </style:style>
    <style:style style:name="ce13" style:family="table-cell">
      <loext:graphic-properties draw:fill="none" loext:fill-use-slide-background="false" draw:textarea-vertical-align="middle" fo:padding-top="0cm" fo:padding-bottom="0cm" fo:padding-left="0cm" fo:padding-right="0cm"/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0pt" fo:letter-spacing="normal" fo:font-style="normal" style:text-underline-style="none" fo:font-weight="bold" fo:background-color="transparent" style:font-name-asian="ＭＳ Ｐ明朝" style:font-size-asian="20pt" style:language-asian="ja" style:country-asian="JP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ce14" style:family="table-cell">
      <loext:graphic-properties draw:fill="none" loext:fill-use-slide-background="false" draw:textarea-vertical-align="middle" fo:padding-top="0cm" fo:padding-bottom="0cm" fo:padding-left="0cm" fo:padding-right="0cm"/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0pt" fo:letter-spacing="normal" fo:language="en" fo:country="US" fo:font-style="normal" style:text-underline-style="none" fo:font-weight="bold" fo:background-color="transparent" style:font-name-asian="ＭＳ Ｐ明朝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ce15" style:family="table-cell">
      <loext:graphic-properties draw:fill="none" loext:fill-use-slide-background="false" draw:textarea-vertical-align="middle" fo:padding-top="0cm" fo:padding-bottom="0cm" fo:padding-left="0cm" fo:padding-right="0cm"/>
      <style:paragraph-properties fo:border="0.48pt solid #ffffff"/>
    </style:style>
    <style:style style:name="ce16" style:family="table-cell">
      <loext:graphic-properties draw:fill="none" loext:fill-use-slide-background="false" draw:textarea-vertical-align="middle" fo:padding-top="0cm" fo:padding-bottom="0cm" fo:padding-left="0cm" fo:padding-right="0cm"/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pt" fo:letter-spacing="normal" fo:font-style="normal" style:text-underline-style="none" fo:font-weight="bold" fo:background-color="transparent" style:font-name-asian="ＭＳ Ｐ明朝" style:font-size-asian="1pt" style:language-asian="ja" style:country-asian="JP" style:font-style-asian="normal" style:font-weight-asian="bold" style:font-size-complex="1pt" style:font-style-complex="normal" style:font-weight-complex="bold">
        <loext:char-complex-color loext:theme-type="light1" loext:color-type="theme"/>
      </style:text-properties>
    </style:style>
    <style:style style:name="ce17" style:family="table-cell">
      <loext:graphic-properties draw:fill="none" loext:fill-use-slide-background="false" draw:textarea-vertical-align="bottom" fo:padding-top="0cm" fo:padding-bottom="0cm" fo:padding-left="0cm" fo:padding-right="0cm"/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pt" fo:letter-spacing="normal" fo:font-style="normal" style:text-underline-style="none" fo:font-weight="bold" fo:background-color="transparent" style:font-name-asian="ＭＳ Ｐ明朝" style:font-size-asian="2pt" style:language-asian="ja" style:country-asian="JP" style:font-style-asian="normal" style:font-weight-asian="bold" style:font-size-complex="2pt" style:font-style-complex="normal" style:font-weight-complex="bold">
        <loext:char-complex-color loext:theme-type="light1" loext:color-type="theme"/>
      </style:text-properties>
    </style:style>
    <style:style style:name="ce18" style:family="table-cell">
      <loext:graphic-properties draw:fill="none" loext:fill-use-slide-background="false" draw:textarea-vertical-align="middle" fo:padding-top="0cm" fo:padding-bottom="0cm" fo:padding-left="0cm" fo:padding-right="0cm"/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7pt" fo:letter-spacing="normal" fo:font-style="normal" style:text-underline-style="none" fo:font-weight="bold" fo:background-color="transparent" style:font-name-asian="ＭＳ Ｐ明朝" style:font-size-asian="7pt" style:language-asian="ja" style:country-asian="JP" style:font-style-asian="normal" style:font-weight-asian="bold" style:font-size-complex="7pt" style:font-style-complex="normal" style:font-weight-complex="bold">
        <loext:char-complex-color loext:theme-type="light1" loext:color-type="theme"/>
      </style:text-properties>
    </style:style>
    <style:style style:name="ce19" style:family="table-cell">
      <loext:graphic-properties draw:fill="none" loext:fill-use-slide-background="false" draw:textarea-vertical-align="middle" fo:padding-top="0cm" fo:padding-bottom="0cm" fo:padding-left="0cm" fo:padding-right="0cm"/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pt" fo:letter-spacing="normal" fo:font-style="normal" style:text-underline-style="none" fo:font-weight="bold" fo:background-color="transparent" style:font-name-asian="ＭＳ Ｐ明朝" style:font-size-asian="2pt" style:language-asian="ja" style:country-asian="JP" style:font-style-asian="normal" style:font-weight-asian="bold" style:font-size-complex="2pt" style:font-style-complex="normal" style:font-weight-complex="bold">
        <loext:char-complex-color loext:theme-type="light1" loext:color-type="theme"/>
      </style:text-properties>
    </style:style>
    <style:style style:name="ce20" style:family="table-cell">
      <loext:graphic-properties draw:fill="none" loext:fill-use-slide-background="false" draw:textarea-vertical-align="top" fo:padding-top="0cm" fo:padding-bottom="0cm" fo:padding-left="0cm" fo:padding-right="0cm"/>
      <style:paragraph-properties fo:border="0.48pt solid #ffffff"/>
    </style:style>
    <style:style style:name="ce21" style:family="table-cell">
      <loext:graphic-properties draw:fill="none" loext:fill-use-slide-background="false" draw:textarea-vertical-align="bottom" fo:padding-top="0cm" fo:padding-bottom="0cm" fo:padding-left="0cm" fo:padding-right="0cm"/>
      <style:paragraph-properties fo:border="0.48pt solid #ffffff"/>
    </style:style>
    <style:style style:name="ce22" style:family="table-cell">
      <loext:graphic-properties draw:fill="none" loext:fill-use-slide-background="false" draw:textarea-vertical-align="bottom" fo:padding-top="0cm" fo:padding-bottom="0cm" fo:padding-left="0cm" fo:padding-right="0cm"/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0pt" fo:letter-spacing="normal" fo:language="en" fo:country="US" fo:font-style="normal" style:text-underline-style="none" fo:font-weight="bold" fo:background-color="transparent" style:font-name-asian="ＭＳ Ｐ明朝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ce23" style:family="table-cell">
      <loext:graphic-properties draw:fill="none" loext:fill-use-slide-background="false" draw:textarea-vertical-align="bottom" fo:padding-top="0cm" fo:padding-bottom="0cm" fo:padding-left="0cm" fo:padding-right="0cm"/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pt" fo:letter-spacing="normal" fo:language="en" fo:country="US" fo:font-style="normal" style:text-underline-style="none" fo:font-weight="bold" fo:background-color="transparent" style:font-name-asian="ＭＳ Ｐ明朝" style:font-size-asian="2pt" style:font-style-asian="normal" style:font-weight-asian="bold" style:font-size-complex="2pt" style:font-style-complex="normal" style:font-weight-complex="bold">
        <loext:char-complex-color loext:theme-type="light1" loext:color-type="theme"/>
      </style:text-properties>
    </style:style>
    <style:style style:name="ce24" style:family="table-cell">
      <loext:graphic-properties draw:fill="none" loext:fill-use-slide-background="false" draw:textarea-vertical-align="middle" fo:padding-top="0cm" fo:padding-bottom="0cm" fo:padding-left="0cm" fo:padding-right="0cm"/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7pt" fo:letter-spacing="normal" fo:language="en" fo:country="US" fo:font-style="normal" style:text-underline-style="none" fo:font-weight="bold" fo:background-color="transparent" style:font-name-asian="ＭＳ Ｐ明朝" style:font-size-asian="7pt" style:font-style-asian="normal" style:font-weight-asian="bold" style:font-size-complex="7pt" style:font-style-complex="normal" style:font-weight-complex="bold">
        <loext:char-complex-color loext:theme-type="light1" loext:color-type="theme"/>
      </style:text-properties>
    </style:style>
    <style:style style:name="ce25" style:family="table-cell">
      <loext:graphic-properties draw:fill="none" loext:fill-use-slide-background="false" draw:textarea-vertical-align="middle" fo:padding-top="0cm" fo:padding-bottom="0cm" fo:padding-left="0cm" fo:padding-right="0cm"/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pt" fo:letter-spacing="normal" fo:language="en" fo:country="US" fo:font-style="normal" style:text-underline-style="none" fo:font-weight="bold" fo:background-color="transparent" style:font-name-asian="ＭＳ Ｐ明朝" style:font-size-asian="2pt" style:font-style-asian="normal" style:font-weight-asian="bold" style:font-size-complex="2pt" style:font-style-complex="normal" style:font-weight-complex="bold">
        <loext:char-complex-color loext:theme-type="light1" loext:color-type="theme"/>
      </style:text-properties>
    </style:style>
    <style:style style:name="ce26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32pt" fo:letter-spacing="normal" fo:font-style="normal" style:text-underline-style="none" fo:font-weight="bold" fo:background-color="transparent" style:font-name-asian="ＭＳ Ｐ明朝" style:font-size-asian="32pt" style:language-asian="ja" style:country-asian="JP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ce27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28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ffffff"/>
    </style:style>
    <style:style style:name="ce29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  <style:text-properties fo:font-variant="normal" fo:text-transform="none" fo:color="#ffc000" loext:opacity="100%" style:text-outline="false" style:text-line-through-style="none" style:text-line-through-type="none" style:text-position="0% 100%" style:font-name="Century" fo:font-size="2pt" fo:letter-spacing="normal" fo:font-style="normal" style:text-underline-style="none" fo:font-weight="normal" fo:background-color="transparent" style:font-name-asian="ＭＳ Ｐ明朝" style:font-size-asian="2pt" style:language-asian="ja" style:country-asian="JP" style:font-style-asian="normal" style:font-weight-asian="normal" style:font-size-complex="2pt" style:font-style-complex="normal" style:font-weight-complex="normal"/>
    </style:style>
    <style:style style:name="ce30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4pt" fo:letter-spacing="normal" fo:font-style="normal" style:text-underline-style="none" fo:font-weight="bold" fo:background-color="transparent" style:font-name-asian="ＭＳ Ｐ明朝" style:font-size-asian="14pt" style:language-asian="ja" style:country-asian="JP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1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-left="0.48pt solid #ffffff" fo:border-right="0.48pt solid #ffffff" fo:border-top="1.5pt solid #ffffff" fo:border-bottom="0.48pt solid #ffffff"/>
    </style:style>
    <style:style style:name="ce32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="0.48pt solid #ffffff"/>
    </style:style>
    <style:style style:name="ce33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4pt" fo:letter-spacing="normal" fo:font-style="normal" style:text-underline-style="none" fo:font-weight="bold" fo:background-color="transparent" style:font-name-asian="ＭＳ Ｐ明朝" style:font-size-asian="14pt" style:language-asian="ja" style:country-asian="JP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4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entury" fo:font-size="18pt" fo:letter-spacing="normal" fo:font-style="normal" style:text-underline-style="none" fo:font-weight="normal" fo:background-color="transparent" style:font-name-asian="ＭＳ Ｐ明朝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35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36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8pt" fo:letter-spacing="normal" fo:font-style="normal" style:text-underline-style="none" fo:font-weight="bold" fo:background-color="transparent" style:font-name-asian="ＭＳ Ｐ明朝" style:font-size-asian="18pt" style:language-asian="ja" style:country-asian="JP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ce37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4pt" fo:letter-spacing="normal" fo:font-style="normal" style:text-underline-style="none" fo:font-weight="bold" fo:background-color="transparent" style:font-name-asian="ＭＳ Ｐ明朝" style:font-size-asian="24pt" style:language-asian="ja" style:country-asian="JP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ce38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4pt" fo:letter-spacing="normal" fo:font-style="normal" style:text-underline-style="none" fo:font-weight="bold" fo:background-color="transparent" style:font-name-asian="ＭＳ Ｐ明朝" style:font-size-asian="24pt" style:language-asian="ja" style:country-asian="JP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ce39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6pt" fo:letter-spacing="normal" fo:font-style="normal" style:text-underline-style="none" fo:font-weight="bold" fo:background-color="transparent" style:font-name-asian="ＭＳ Ｐ明朝" style:font-size-asian="16pt" style:language-asian="ja" style:country-asian="JP" style:font-style-asian="normal" style:font-weight-asian="bold" style:font-size-complex="16pt" style:font-style-complex="normal" style:font-weight-complex="bold">
        <loext:char-complex-color loext:theme-type="light1" loext:color-type="theme"/>
      </style:text-properties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>
        <style:tab-stops/>
      </style:paragraph-properties>
      <style:text-properties style:font-name="IPA明朝" fo:font-size="18pt" style:font-name-asian="IPA明朝" style:font-size-asian="20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style:font-name="IPA明朝" fo:font-size="18pt" style:font-name-asian="IPA明朝" style:font-size-asian="20pt" fo:hyphenate="false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style:font-name="IPA明朝" fo:font-weight="bold" style:font-name-asian="IPA明朝" style:font-weight-asian="bold" style:font-weight-complex="bold"/>
    </style:style>
    <style:style style:name="P6" style:family="paragraph">
      <loext:graphic-properties draw:fill="none"/>
      <style:paragraph-properties fo:text-align="center" style:font-independent-line-spacing="true"/>
      <style:text-properties style:font-name="IPA明朝" fo:font-size="44pt" fo:font-weight="bold" style:font-name-asian="IPA明朝" style:font-weight-asian="bold" style:font-weight-complex="bold"/>
    </style:style>
    <style:style style:name="P7" style:family="paragraph">
      <style:paragraph-properties fo:margin-left="0cm" fo:margin-right="0cm" fo:margin-top="0.326cm" fo:margin-bottom="0.1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IPA明朝" style:font-name-asian="IPA明朝" fo:hyphenate="false"/>
    </style:style>
    <style:style style:name="P8" style:family="paragraph">
      <style:paragraph-properties fo:margin-left="0cm" fo:margin-right="0cm" fo:margin-top="0.6cm" fo:margin-bottom="0.1cm" fo:line-height="100%" fo:text-align="center" fo:text-indent="0cm" style:punctuation-wrap="hanging" style:writing-mode="lr-tb"/>
      <style:text-properties style:font-name="IPA明朝" style:font-name-asian="IPA明朝" fo:hyphenate="false"/>
    </style:style>
    <style:style style:name="P9" style:family="paragraph">
      <loext:graphic-properties draw:fill="none" draw:opacity="0%"/>
      <style:paragraph-properties fo:margin-left="0cm" fo:margin-right="0cm" fo:margin-top="0.226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IPA明朝" fo:font-size="32pt" style:font-name-asian="IPA明朝" fo:hyphenate="false"/>
    </style:style>
    <style:style style:name="P10" style:family="paragraph">
      <style:paragraph-properties fo:margin-left="0cm" fo:margin-right="0cm" fo:margin-top="0cm" fo:margin-bottom="0cm" fo:line-height="115%" fo:text-align="center" fo:text-indent="0cm" style:punctuation-wrap="hanging" loext:tab-stop-distance="2.54cm" style:writing-mode="lr-tb">
        <style:tab-stops/>
      </style:paragraph-properties>
      <style:text-properties style:font-name="IPA明朝" style:font-name-asian="IPA明朝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style:font-name="IPA明朝" style:font-name-asian="IPA明朝" fo:hyphenate="false"/>
    </style:style>
    <style:style style:name="P12" style:family="paragraph">
      <style:paragraph-properties fo:margin-left="0cm" fo:margin-right="0cm" fo:margin-top="0cm" fo:margin-bottom="0cm" fo:line-height="120%" fo:text-align="start" fo:text-indent="0cm" style:punctuation-wrap="hanging" loext:tab-stop-distance="2.54cm" style:writing-mode="lr-tb">
        <style:tab-stops/>
      </style:paragraph-properties>
      <style:text-properties style:font-name="IPA明朝" style:font-name-asian="IPA明朝" fo:hyphenate="false"/>
    </style:style>
    <style:style style:name="P13" style:family="paragraph">
      <style:paragraph-properties fo:text-align="center"/>
      <style:text-properties style:font-name="IPA明朝" fo:font-weight="normal" style:font-name-asian="IPA明朝" style:font-weight-asian="normal" style:font-weight-complex="normal"/>
    </style:style>
    <style:style style:name="P14" style:family="paragraph">
      <style:text-properties style:font-name="IPA明朝" fo:font-weight="normal" style:font-name-asian="IPA明朝" style:font-weight-asian="normal" style:font-weight-complex="normal"/>
    </style:style>
    <style:style style:name="P15" style:family="paragraph">
      <style:paragraph-properties fo:text-align="center"/>
      <style:text-properties style:font-name="IPA明朝" style:font-name-asian="IPA明朝"/>
    </style:style>
    <style:style style:name="P16" style:family="paragraph">
      <style:paragraph-properties fo:margin-left="0cm" fo:margin-right="0cm" fo:margin-top="0.169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IPA明朝" style:font-name-asian="IPA明朝" fo:hyphenate="false"/>
    </style:style>
    <style:style style:name="P17" style:family="paragraph">
      <loext:graphic-properties draw:fill="none"/>
      <style:paragraph-properties fo:text-align="center" style:font-independent-line-spacing="true"/>
      <style:text-properties style:font-name="IPA明朝" fo:font-size="32pt" style:font-name-asian="IPA明朝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style:font-name="IPA明朝" fo:font-size="18pt" style:font-size-asian="20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style:font-name="IPA明朝" fo:font-size="18pt" style:font-size-asian="20pt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style:font-name="IPA明朝"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style:font-name="IPA明朝"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style:font-name="IPA明朝" fo:font-size="18pt" style:font-name-asian="IPA明朝" style:font-size-asian="20pt" fo:hyphenate="false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style:font-name="IPA明朝" fo:font-size="18pt" style:font-name-asian="IPA明朝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style:font-name="IPA明朝" fo:font-size="18pt" style:font-name-asian="IPA明朝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style:font-size-asian="20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style:font-size-asian="20pt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style:font-name="IPA明朝" fo:font-size="14pt" style:font-name-asian="IPA明朝" style:font-size-asian="14pt" style:font-size-complex="14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style:font-name="IPA明朝" fo:font-size="14pt" style:font-name-asian="IPA明朝" style:font-size-asian="14pt" style:font-size-complex="14pt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style:font-name="IPA明朝" fo:font-size="18pt" style:font-name-asian="IPA明朝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style:font-name="IPA明朝" fo:font-size="18pt" style:font-name-asian="IPA明朝" fo:hyphenate="false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style:font-name="IPA明朝" fo:font-weight="bold" style:font-name-asian="IPA明朝" style:font-weight-asian="bold" style:font-weight-complex="bold" fo:hyphenate="false"/>
    </style:style>
    <style:style style:name="P37" style:family="paragraph">
      <loext:graphic-properties draw:fill="none"/>
      <style:paragraph-properties fo:text-align="start" style:font-independent-line-spacing="true"/>
      <style:text-properties style:font-name="IPA明朝" fo:font-size="44pt" fo:font-weight="bold" style:font-name-asian="IPA明朝" style:font-weight-asian="bold" style:font-weight-complex="bold"/>
    </style:style>
    <style:style style:name="P38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font-style="normal" style:text-underline-style="none" fo:font-weight="normal" fo:background-color="transparent" style:font-name-asian="ＭＳ Ｐ明朝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IPA明朝" fo:font-size="18pt" style:font-name-asian="IPA明朝" style:font-size-asian="20pt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IPA明朝" fo:font-size="18pt" style:font-name-asian="IPA明朝" style:font-size-asian="20pt" fo:hyphenate="false"/>
    </style:style>
    <style:style style:name="P41" style:family="paragraph">
      <loext:graphic-properties draw:fill="solid" draw:fill-color="#0070c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font-style="normal" style:text-underline-style="none" fo:font-weight="normal" fo:background-color="transparent" style:font-name-asian="ＭＳ Ｐ明朝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2" style:family="paragraph">
      <loext:graphic-properties draw:fill="solid" draw:fill-color="#bf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0.5pt" fo:letter-spacing="normal" fo:font-style="normal" style:text-underline-style="none" fo:font-weight="normal" fo:background-color="transparent" style:font-name-asian="ＭＳ Ｐ明朝" style:font-size-asian="10.5pt" style:language-asian="ja" style:country-asian="JP" style:font-style-asian="normal" style:font-weight-asian="normal" style:font-size-complex="10.5pt" style:font-style-complex="normal" style:font-weight-complex="normal">
        <loext:char-complex-color loext:theme-type="light1" loext:color-type="theme"/>
      </style:text-properties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20pt"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style:font-size-asian="20pt" fo:hyphenate="false"/>
    </style:style>
    <style:style style:name="P45" style:family="paragraph">
      <loext:graphic-properties draw:fill="solid" draw:fill-color="#0000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font-style="normal" style:text-underline-style="none" fo:font-weight="normal" fo:background-color="transparent" style:font-name-asian="ＭＳ Ｐ明朝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22pt" style:font-size-asian="22pt" style:font-size-complex="22pt" fo:hyphenate="false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22pt" style:font-size-asian="22pt" style:font-size-complex="22pt" fo:hyphenate="false"/>
    </style:style>
    <style:style style:name="P4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6pt" style:font-size-asian="16pt" style:font-size-complex="16pt" fo:hyphenate="false"/>
    </style:style>
    <style:style style:name="P50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font-style="normal" style:text-underline-style="none" fo:font-weight="normal" fo:background-color="transparent" style:font-name-asian="ＭＳ Ｐ明朝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53" style:family="paragraph">
      <style:paragraph-properties fo:text-align="center"/>
      <style:text-properties fo:color="#ffffff" loext:opacity="100%" style:font-name="NasuM" style:font-name-asian="NasuM"/>
    </style:style>
    <style:style style:name="P54" style:family="paragraph">
      <loext:graphic-properties draw:fill="solid" draw:fill-color="#4f81b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font-style="normal" style:text-underline-style="none" fo:font-weight="normal" fo:background-color="transparent" style:font-name-asian="ＭＳ Ｐ明朝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5" style:family="paragraph">
      <loext:graphic-properties draw:fill="solid" draw:fill-color="#002060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56" style:family="paragraph">
      <loext:graphic-properties draw:fill="solid" draw:fill-color="#ffc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font-style="normal" style:text-underline-style="none" fo:font-weight="normal" fo:background-color="transparent" style:font-name-asian="ＭＳ Ｐ明朝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7" style:family="paragraph">
      <loext:graphic-properties draw:fill="solid" draw:fill-color="#ff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6pt" fo:letter-spacing="normal" fo:font-style="normal" style:text-underline-style="none" fo:font-weight="normal" fo:background-color="transparent" style:font-name-asian="ＭＳ Ｐ明朝" style:font-size-asian="16pt" style:language-asian="ja" style:country-asian="JP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P58" style:family="paragraph">
      <loext:graphic-properties draw:fill="solid" draw:fill-color="#00009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font-style="normal" style:text-underline-style="none" fo:font-weight="normal" fo:background-color="transparent" style:font-name-asian="ＭＳ Ｐ明朝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9" style:family="paragraph">
      <loext:graphic-properties draw:fill="solid" draw:fill-color="#ff999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font-style="normal" style:text-underline-style="none" fo:font-weight="normal" fo:background-color="transparent" style:font-name-asian="ＭＳ Ｐ明朝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2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64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65" style:family="paragraph">
      <style:paragraph-properties fo:margin-left="0cm" fo:margin-right="0cm" fo:margin-top="0.22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7" style:family="paragraph">
      <style:paragraph-properties fo:margin-left="0cm" fo:margin-right="0cm" fo:margin-top="0.226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68" style:family="paragraph">
      <style:paragraph-properties fo:margin-left="0cm" fo:margin-right="0cm" fo:margin-top="0.198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69" style:family="paragraph">
      <style:paragraph-properties fo:margin-left="0cm" fo:margin-right="0cm" fo:margin-top="0cm" fo:margin-bottom="0cm" fo:line-height="2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0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P7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P74" style:family="paragraph">
      <style:paragraph-properties fo:margin-left="0cm" fo:margin-right="0cm" fo:margin-top="0.18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5" style:family="paragraph">
      <loext:graphic-properties draw:fill="gradient" draw:fill-gradient-name="Gradient_20_1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font-style="normal" style:text-underline-style="none" fo:font-weight="normal" fo:background-color="transparent" style:font-name-asian="ＭＳ Ｐ明朝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76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77" style:family="paragraph">
      <loext:graphic-properties draw:fill="solid" draw:fill-color="#fbd1a3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78" style:family="paragraph">
      <loext:graphic-properties draw:fill="gradient" draw:fill-gradient-name="Gradient_20_1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font-style="normal" style:text-underline-style="none" fo:font-weight="normal" fo:background-color="transparent" style:font-name-asian="ＭＳ Ｐ明朝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79" style:family="paragraph">
      <loext:graphic-properties draw:fill="solid" draw:fill-color="#8eb4e3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0" style:family="paragraph">
      <loext:graphic-properties draw:fill="gradient" draw:fill-gradient-name="Gradient_20_13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1" style:family="paragraph">
      <loext:graphic-properties draw:fill="gradient" draw:fill-gradient-name="Gradient_20_14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size="18pt" fo:letter-spacing="normal" fo:font-style="normal" style:text-underline-style="none" fo:font-weight="bold" fo:background-color="transparent" style:font-name-asian="IPA明朝" style:font-size-asian="18pt" style:language-asian="ja" style:country-asian="JP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IPA明朝" fo:font-size="44pt" fo:letter-spacing="normal" fo:font-style="normal" style:text-underline-style="none" fo:font-weight="bold" fo:background-color="transparent" style:font-name-asian="IPA明朝" style:font-size-asian="44pt" style:language-asian="ja" style:country-asian="JP" style:font-style-asian="normal" style:font-weight-asian="bold" style:font-size-complex="44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size="32pt" fo:letter-spacing="normal" fo:language="en" fo:country="US" fo:font-style="normal" fo:text-shadow="none" style:text-underline-style="none" fo:font-weight="normal" style:letter-kerning="true" fo:background-color="transparent" style:font-name-asian="IPA明朝" style:font-size-asian="32pt" style:language-asian="ja" style:country-asian="JP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size="32pt" fo:letter-spacing="normal" fo:language="en" fo:country="US" fo:font-style="normal" fo:text-shadow="none" style:text-underline-style="none" fo:font-weight="normal" style:letter-kerning="true" fo:background-color="transparent" style:font-name-asian="IPA明朝" style:font-size-asian="24pt" style:language-asian="ja" style:country-asian="JP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size="24pt" fo:letter-spacing="normal" fo:language="en" fo:country="US" fo:font-style="normal" fo:text-shadow="none" style:text-underline-style="none" fo:font-weight="normal" style:letter-kerning="true" fo:background-color="transparent" style:font-name-asian="IPA明朝" style:font-size-asian="24pt" style:language-asian="ja" style:country-asian="JP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24pt" fo:letter-spacing="normal" fo:font-style="normal" style:text-underline-style="none" fo:font-weight="bold" fo:background-color="transparent" style:font-size-asian="24pt" style:language-asian="ja" style:country-asian="JP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9" style:family="text">
      <style:text-properties style:font-name="IPA明朝" fo:font-weight="normal" style:font-name-asian="IPA明朝" style:font-weight-asian="normal" style:font-weight-complex="normal"/>
    </style:style>
    <style:style style:name="T10" style:family="text">
      <style:text-properties style:font-name="IPA明朝" style:font-name-asian="IPA明朝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size="24pt" fo:letter-spacing="normal" fo:language="en" fo:country="US" fo:font-style="normal" style:text-underline-style="none" fo:font-weight="normal" fo:background-color="transparent" style:font-name-asian="IPA明朝" style:font-size-asian="24pt" style:language-asian="ja" style:country-asian="JP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size="24pt" fo:letter-spacing="normal" fo:font-style="normal" style:text-underline-style="none" fo:font-weight="bold" fo:background-color="transparent" style:font-name-asian="IPA明朝" style:font-size-asian="24pt" style:language-asian="ja" style:country-asian="JP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98ec76" loext:opacity="100%" style:text-outline="false" style:text-line-through-style="none" style:text-line-through-type="none" style:text-position="0% 100%" style:font-name="IPA明朝" fo:font-size="20pt" fo:letter-spacing="normal" fo:font-style="normal" style:text-underline-style="none" fo:font-weight="bold" fo:background-color="transparent" style:font-name-asian="IPA明朝" style:font-size-asian="20pt" style:language-asian="ja" style:country-asian="JP" style:font-style-asian="normal" style:font-weight-asian="bold" style:font-size-complex="20pt" style:font-style-complex="normal" style:font-weight-complex="bold">
        <loext:char-complex-color loext:theme-type="accent3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size="32pt" fo:letter-spacing="normal" fo:font-style="normal" style:text-underline-style="none" fo:font-weight="bold" fo:background-color="transparent" style:font-name-asian="IPA明朝" style:font-size-asian="32pt" style:language-asian="ja" style:country-asian="JP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24pt" fo:letter-spacing="normal" fo:font-style="normal" style:text-underline-style="none" fo:font-weight="bold" fo:background-color="transparent" style:font-name-asian="ＭＳ Ｐ明朝" style:font-size-asian="24pt" style:language-asian="ja" style:country-asian="JP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name-asian="ＭＳ Ｐ明朝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name-asian="ＭＳ Ｐ明朝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name-asian="ＭＳ Ｐ明朝" style:font-size-asian="12pt" style:language-asian="ja" style:country-asian="JP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size="18pt" fo:letter-spacing="normal" fo:font-style="normal" style:text-underline-style="none" fo:font-weight="normal" fo:background-color="transparent" style:font-name-asian="IPA明朝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size="18pt" fo:letter-spacing="normal" fo:language="en" fo:country="US" fo:font-style="normal" style:text-underline-style="none" fo:font-weight="normal" fo:background-color="transparent" style:font-name-asian="IPA明朝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size="18pt" fo:letter-spacing="normal" fo:language="en" fo:country="US" fo:font-style="normal" style:text-underline-style="none" fo:font-weight="normal" fo:background-color="transparent" style:font-name-asian="IPA明朝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2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Century" fo:font-size="44pt" fo:letter-spacing="normal" fo:font-style="normal" style:text-underline-style="none" fo:font-weight="normal" fo:background-color="transparent" style:font-name-asian="ＭＳ Ｐ明朝" style:font-size-asian="44pt" style:language-asian="ja" style:country-asian="JP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8pt" fo:letter-spacing="normal" fo:language="en" fo:country="US" fo:font-style="normal" style:text-underline-style="none" fo:font-weight="bold" fo:background-color="transparent" style:font-name-asian="ＭＳ Ｐ明朝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8pt" fo:letter-spacing="normal" fo:language="en" fo:country="US" fo:font-style="normal" style:text-underline-style="none" fo:font-weight="bold" fo:background-color="transparent" style:font-name-asian="ＭＳ Ｐ明朝" style:font-size-asian="18pt" style:language-asian="ja" style:country-asian="JP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font-style="normal" style:text-underline-style="none" fo:font-weight="bold" fo:background-color="transparent" style:font-name-asian="ＭＳ Ｐ明朝" style:font-size-asian="18pt" style:language-asian="ja" style:country-asian="JP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language="en" fo:country="US" fo:font-style="normal" style:text-underline-style="none" fo:font-weight="bold" fo:background-color="transparent" style:font-name-asian="ＭＳ Ｐ明朝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language="en" fo:country="US" fo:font-style="normal" style:text-underline-style="none" fo:font-weight="bold" fo:background-color="transparent" style:font-name-asian="ＭＳ Ｐ明朝" style:font-size-asian="18pt" style:language-asian="ja" style:country-asian="JP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language="en" fo:country="US" fo:font-style="normal" style:text-underline-style="none" fo:font-weight="normal" fo:background-color="transparent" style:font-name-asian="ＭＳ Ｐ明朝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font-style="normal" style:text-underline-style="none" fo:font-weight="normal" fo:background-color="transparent" style:font-name-asian="ＭＳ Ｐ明朝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size="14pt" fo:letter-spacing="normal" fo:font-style="normal" style:text-underline-style="none" fo:font-weight="normal" fo:background-color="transparent" style:font-name-asian="IPA明朝" style:font-size-asian="14pt" style:language-asian="ja" style:country-asian="JP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size="21pt" fo:letter-spacing="normal" fo:font-style="normal" style:text-underline-style="none" fo:font-weight="normal" fo:background-color="transparent" style:font-name-asian="IPA明朝" style:font-size-asian="21pt" style:language-asian="ja" style:country-asian="JP" style:font-style-asian="normal" style:font-weight-asian="normal" style:font-size-complex="21pt" style:font-style-complex="normal" style:font-weight-complex="normal">
        <loext:char-complex-color loext:theme-type="light1" loext:color-type="theme"/>
      </style:text-properties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size="16pt" fo:letter-spacing="normal" fo:language="en" fo:country="US" fo:font-style="normal" style:text-underline-style="none" fo:font-weight="bold" fo:background-color="transparent" style:font-name-asian="IPA明朝" style:font-size-asian="16pt" style:font-style-asian="normal" style:font-weight-asian="bold" style:font-size-complex="16pt" style:font-style-complex="normal" style:font-weight-complex="bold">
        <loext:char-complex-color loext:theme-type="light1" loext:color-type="theme"/>
      </style:text-properties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size="16pt" fo:letter-spacing="normal" fo:language="en" fo:country="US" fo:font-style="normal" style:text-underline-style="none" fo:font-weight="bold" fo:background-color="transparent" style:font-name-asian="IPA明朝" style:font-size-asian="16pt" style:language-asian="ja" style:country-asian="JP" style:font-style-asian="normal" style:font-weight-asian="bold" style:font-size-complex="16pt" style:font-style-complex="normal" style:font-weight-complex="bold">
        <loext:char-complex-color loext:theme-type="light1" loext:color-type="theme"/>
      </style:text-properties>
    </style:style>
    <style:style style:name="T34" style:family="text">
      <style:text-properties fo:font-variant="normal" fo:text-transform="none" fo:color="#98ec76" loext:opacity="100%" style:text-outline="false" style:text-line-through-style="none" style:text-line-through-type="none" style:text-position="0% 100%" style:font-name="Century" fo:font-size="20pt" fo:letter-spacing="normal" fo:font-style="normal" style:text-underline-style="none" fo:font-weight="bold" fo:background-color="transparent" style:font-name-asian="ＭＳ Ｐ明朝" style:font-size-asian="20pt" style:language-asian="ja" style:country-asian="JP" style:font-style-asian="normal" style:font-weight-asian="bold" style:font-size-complex="20pt" style:font-style-complex="normal" style:font-weight-complex="bold">
        <loext:char-complex-color loext:theme-type="accent3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6pt" fo:letter-spacing="normal" fo:language="en" fo:country="US" fo:font-style="normal" style:text-underline-style="none" fo:font-weight="bold" fo:background-color="transparent" style:font-name-asian="ＭＳ Ｐ明朝" style:font-size-asian="16pt" style:font-style-asian="normal" style:font-weight-asian="bold" style:font-size-complex="16pt" style:font-style-complex="normal" style:font-weight-complex="bold">
        <loext:char-complex-color loext:theme-type="light1" loext:color-type="theme"/>
      </style:text-properties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6pt" fo:letter-spacing="normal" fo:language="en" fo:country="US" fo:font-style="normal" style:text-underline-style="none" fo:font-weight="bold" fo:background-color="transparent" style:font-name-asian="ＭＳ Ｐ明朝" style:font-size-asian="16pt" style:language-asian="ja" style:country-asian="JP" style:font-style-asian="normal" style:font-weight-asian="bold" style:font-size-complex="16pt" style:font-style-complex="normal" style:font-weight-complex="bold">
        <loext:char-complex-color loext:theme-type="light1" loext:color-type="theme"/>
      </style:text-properties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size="40pt" fo:letter-spacing="normal" fo:font-style="normal" style:text-underline-style="none" fo:font-weight="bold" fo:background-color="transparent" style:font-name-asian="IPA明朝" style:font-size-asian="40pt" style:language-asian="ja" style:country-asian="JP" style:font-style-asian="normal" style:font-weight-asian="bold" style:font-size-complex="40pt" style:font-style-complex="normal" style:font-weight-complex="bold">
        <loext:char-complex-color loext:theme-type="light1" loext:color-type="theme"/>
      </style:text-properties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30% 58%" style:font-name="Century" fo:font-size="18pt" fo:letter-spacing="normal" fo:language="en" fo:country="US" fo:font-style="normal" style:text-underline-style="none" fo:font-weight="bold" fo:background-color="transparent" style:font-name-asian="ＭＳ Ｐ明朝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40pt" fo:letter-spacing="normal" fo:font-style="normal" style:text-underline-style="none" fo:font-weight="bold" fo:background-color="transparent" style:font-name-asian="ＭＳ Ｐ明朝" style:font-size-asian="40pt" style:language-asian="ja" style:country-asian="JP" style:font-style-asian="normal" style:font-weight-asian="bold" style:font-size-complex="40pt" style:font-style-complex="normal" style:font-weight-complex="bold">
        <loext:char-complex-color loext:theme-type="light1" loext:color-type="theme"/>
      </style:text-properties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" fo:font-size="22pt" fo:letter-spacing="normal" fo:language="en" fo:country="US" fo:font-style="normal" style:text-underline-style="none" fo:font-weight="bold" fo:background-color="transparent" style:font-name-asian="ＭＳ Ｐ明朝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" fo:font-size="28pt" fo:letter-spacing="normal" fo:language="en" fo:country="US" fo:font-style="normal" style:text-underline-style="none" fo:font-weight="bold" fo:background-color="transparent" style:font-name-asian="ＭＳ Ｐ明朝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0pt" fo:letter-spacing="normal" fo:language="en" fo:country="US" fo:font-style="normal" style:text-underline-style="none" fo:font-weight="bold" fo:background-color="transparent" style:font-name-asian="ＭＳ Ｐ明朝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6pt" fo:letter-spacing="normal" fo:language="en" fo:country="US" fo:font-style="normal" style:text-underline-style="none" fo:font-weight="normal" fo:background-color="transparent" style:font-name-asian="ＭＳ Ｐ明朝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6pt" fo:letter-spacing="normal" fo:font-style="normal" style:text-underline-style="none" fo:font-weight="normal" fo:background-color="transparent" style:font-name-asian="ＭＳ Ｐ明朝" style:font-size-asian="16pt" style:language-asian="ja" style:country-asian="JP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6pt" fo:letter-spacing="normal" fo:language="en" fo:country="US" fo:font-style="normal" style:text-underline-style="none" fo:font-weight="normal" fo:background-color="transparent" style:font-name-asian="ＭＳ Ｐ明朝" style:font-size-asian="16pt" style:language-asian="ja" style:country-asian="JP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4pt" fo:letter-spacing="normal" fo:language="en" fo:country="US" fo:font-style="normal" style:text-underline-style="none" fo:font-weight="bold" fo:background-color="transparent" style:font-name-asian="ＭＳ Ｐ明朝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4pt" fo:letter-spacing="normal" fo:language="en" fo:country="US" fo:font-style="normal" style:text-underline-style="none" fo:font-weight="bold" fo:background-color="transparent" style:font-name-asian="ＭＳ Ｐ明朝" style:font-size-asian="14pt" style:language-asian="ja" style:country-asian="JP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" fo:font-size="18pt" fo:letter-spacing="normal" fo:font-style="normal" style:text-underline-style="none" fo:font-weight="bold" fo:background-color="transparent" style:font-name-asian="ＭＳ Ｐ明朝" style:font-size-asian="18pt" style:language-asian="ja" style:country-asian="JP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4pt" fo:letter-spacing="normal" fo:language="en" fo:country="US" fo:font-style="normal" style:text-underline-style="none" fo:font-weight="bold" fo:background-color="transparent" style:font-name-asian="ＭＳ Ｐ明朝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4pt" fo:letter-spacing="normal" fo:language="en" fo:country="US" fo:font-style="normal" style:text-underline-style="none" fo:font-weight="bold" fo:background-color="transparent" style:font-name-asian="ＭＳ Ｐ明朝" style:font-size-asian="24pt" style:language-asian="ja" style:country-asian="JP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51" style:family="text">
      <style:text-properties fo:color="#ffffff" loext:opacity="100%" style:font-name="NasuM" fo:font-size="20pt" style:font-name-asian="NasuM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36pt" fo:letter-spacing="normal" fo:font-style="normal" style:text-underline-style="none" fo:font-weight="bold" fo:background-color="transparent" style:font-name-asian="ＭＳ Ｐ明朝" style:font-size-asian="36pt" style:language-asian="ja" style:country-asian="JP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4pt" fo:letter-spacing="normal" fo:font-style="normal" style:text-underline-style="none" fo:font-weight="bold" fo:background-color="transparent" style:font-name-asian="ＭＳ Ｐ明朝" style:font-size-asian="24pt" style:language-asian="ja" style:country-asian="JP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54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Century" fo:font-size="44pt" fo:letter-spacing="normal" fo:language="en" fo:country="US" fo:font-style="normal" style:text-underline-style="none" fo:font-weight="normal" fo:background-color="transparent" style:font-name-asian="ＭＳ Ｐ明朝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55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Century" fo:font-size="44pt" fo:letter-spacing="normal" fo:language="en" fo:country="US" fo:font-style="normal" style:text-underline-style="none" fo:font-weight="normal" fo:background-color="transparent" style:font-name-asian="ＭＳ Ｐ明朝" style:font-size-asian="44pt" style:language-asian="ja" style:country-asian="JP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5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0pt" fo:letter-spacing="normal" fo:font-style="normal" style:text-underline-style="none" fo:font-weight="bold" fo:background-color="transparent" style:font-name-asian="ＭＳ Ｐ明朝" style:font-size-asian="20pt" style:language-asian="ja" style:country-asian="JP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57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Century" fo:font-size="18pt" fo:letter-spacing="normal" fo:language="en" fo:country="US" fo:font-style="normal" style:text-underline-style="none" fo:font-weight="bold" fo:background-color="transparent" style:font-name-asian="ＭＳ Ｐ明朝" style:font-size-asian="18pt" style:font-style-asian="normal" style:font-weight-asian="bold" style:font-size-complex="18pt" style:font-style-complex="normal" style:font-weight-complex="bold"/>
    </style:style>
    <style:style style:name="T5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entury" fo:font-size="24pt" fo:letter-spacing="normal" fo:language="en" fo:country="US" fo:font-style="normal" style:text-underline-style="none" fo:font-weight="bold" fo:background-color="transparent" style:font-name-asian="ＭＳ Ｐ明朝" style:font-size-asian="24pt" style:font-style-asian="normal" style:font-weight-asian="bold" style:font-size-complex="24pt" style:font-style-complex="normal" style:font-weight-complex="bold"/>
    </style:style>
    <style:style style:name="T5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8pt" fo:letter-spacing="normal" fo:language="en" fo:country="US" fo:font-style="normal" style:text-underline-style="none" fo:font-weight="bold" fo:background-color="transparent" style:font-name-asian="ＭＳ Ｐ明朝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6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4pt" fo:letter-spacing="normal" fo:language="en" fo:country="US" fo:font-style="normal" style:text-underline-style="none" fo:font-weight="bold" fo:background-color="transparent" style:font-name-asian="ＭＳ Ｐ明朝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6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4pt" fo:letter-spacing="normal" fo:language="en" fo:country="US" fo:font-style="normal" style:text-underline-style="none" fo:font-weight="bold" fo:background-color="transparent" style:font-name-asian="ＭＳ Ｐ明朝" style:font-size-asian="24pt" style:language-asian="ja" style:country-asian="JP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62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Century" fo:font-size="18pt" fo:letter-spacing="normal" fo:font-style="normal" style:text-underline-style="none" fo:font-weight="normal" fo:background-color="transparent" style:font-name-asian="ＭＳ Ｐ明朝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Century" fo:font-size="18pt" fo:letter-spacing="normal" fo:language="en" fo:country="US" fo:font-style="normal" style:text-underline-style="none" fo:font-weight="normal" fo:background-color="transparent" style:font-name-asian="ＭＳ Ｐ明朝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T6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language="en" fo:country="US" fo:font-style="normal" style:text-underline-style="none" fo:font-weight="normal" fo:background-color="transparent" style:font-name-asian="ＭＳ Ｐ明朝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6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0pt" fo:letter-spacing="normal" fo:language="en" fo:country="US" fo:font-style="normal" style:text-underline-style="none" fo:font-weight="bold" fo:background-color="transparent" style:font-name-asian="ＭＳ Ｐ明朝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6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0pt" fo:letter-spacing="normal" fo:language="en" fo:country="US" fo:font-style="normal" style:text-underline-style="none" fo:font-weight="bold" fo:background-color="transparent" style:font-name-asian="ＭＳ Ｐ明朝" style:font-size-asian="20pt" style:language-asian="ja" style:country-asian="JP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67" style:family="text">
      <style:text-properties fo:font-variant="normal" fo:text-transform="none" fo:color="#ffffff" loext:opacity="100%" style:text-outline="false" style:text-line-through-style="none" style:text-line-through-type="none" style:text-position="30% 58%" style:font-name="ＭＳ Ｐ明朝" fo:font-size="20pt" fo:letter-spacing="normal" fo:language="en" fo:country="US" fo:font-style="normal" style:text-underline-style="none" fo:font-weight="bold" fo:background-color="transparent" style:font-name-asian="ＭＳ Ｐ明朝" style:font-size-asian="20pt" style:language-asian="ja" style:country-asian="JP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6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0pt" fo:letter-spacing="normal" fo:font-style="normal" style:text-underline-style="none" fo:font-weight="bold" fo:background-color="transparent" style:font-name-asian="ＭＳ Ｐ明朝" style:font-size-asian="20pt" style:language-asian="zh" style:country-asian="TW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6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0pt" fo:letter-spacing="normal" fo:language="en" fo:country="US" fo:font-style="normal" style:text-underline-style="none" fo:font-weight="bold" fo:background-color="transparent" style:font-name-asian="ＭＳ Ｐ明朝" style:font-size-asian="20pt" style:language-asian="zh" style:country-asian="TW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7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4pt" fo:letter-spacing="normal" fo:language="en" fo:country="US" fo:font-style="normal" style:text-underline-style="none" fo:font-weight="normal" fo:background-color="transparent" style:font-name-asian="ＭＳ Ｐ明朝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T71" style:family="text">
      <style:text-properties fo:font-variant="normal" fo:text-transform="none" fo:color="#ffffff" loext:opacity="100%" style:text-outline="false" style:text-line-through-style="none" style:text-line-through-type="none" style:text-position="30% 58%" style:font-name="Century" fo:font-size="14pt" fo:letter-spacing="normal" fo:language="en" fo:country="US" fo:font-style="normal" style:text-underline-style="none" fo:font-weight="bold" fo:background-color="transparent" style:font-name-asian="ＭＳ Ｐ明朝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T7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entury" fo:font-size="18pt" fo:letter-spacing="normal" fo:language="en" fo:country="US" fo:font-style="normal" style:text-underline-style="none" fo:font-weight="normal" fo:background-color="transparent" style:font-name-asian="ＭＳ Ｐ明朝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0.5pt" fo:letter-spacing="normal" fo:language="en" fo:country="US" fo:font-style="normal" style:text-underline-style="none" fo:font-weight="normal" fo:background-color="transparent" style:font-name-asian="ＭＳ Ｐ明朝" style:font-size-asian="10.5pt" style:font-style-asian="normal" style:font-weight-asian="normal" style:font-size-complex="10.5pt" style:font-style-complex="normal" style:font-weight-complex="normal">
        <loext:char-complex-color loext:theme-type="light1" loext:color-type="theme"/>
      </style:text-properties>
    </style:style>
    <style:style style:name="T7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2pt" fo:letter-spacing="normal" fo:font-style="normal" style:text-underline-style="none" fo:font-weight="bold" fo:background-color="transparent" style:font-name-asian="ＭＳ Ｐ明朝" style:font-size-asian="12pt" style:language-asian="ja" style:country-asian="JP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T7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entury" fo:font-size="20pt" fo:letter-spacing="normal" fo:language="en" fo:country="US" fo:font-style="normal" style:text-underline-style="none" fo:font-weight="normal" fo:background-color="transparent" style:font-name-asian="ＭＳ Ｐ明朝" style:font-size-asian="20pt" style:font-style-asian="normal" style:font-weight-asian="normal" style:font-size-complex="20pt" style:font-style-complex="normal" style:font-weight-complex="normal"/>
    </style:style>
    <style:style style:name="T7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2pt" fo:letter-spacing="normal" fo:language="en" fo:country="US" fo:font-style="normal" style:text-underline-style="none" fo:font-weight="bold" fo:background-color="transparent" style:font-name-asian="ＭＳ Ｐ明朝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T7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0pt" fo:letter-spacing="normal" fo:language="en" fo:country="US" fo:font-style="normal" style:text-underline-style="none" fo:font-weight="normal" fo:background-color="transparent" style:font-name-asian="ＭＳ Ｐ明朝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T7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32pt" fo:letter-spacing="normal" fo:font-style="normal" style:text-underline-style="none" fo:font-weight="normal" fo:background-color="transparent" style:font-name-asian="ＭＳ Ｐ明朝" style:font-size-asian="32pt" style:language-asian="ja" style:country-asian="JP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T7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32pt" fo:letter-spacing="normal" fo:language="en" fo:country="US" fo:font-style="normal" style:text-underline-style="none" fo:font-weight="normal" fo:background-color="transparent" style:font-name-asian="ＭＳ Ｐ明朝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T8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32pt" fo:letter-spacing="normal" fo:language="en" fo:country="US" fo:font-style="normal" style:text-underline-style="none" fo:font-weight="normal" fo:background-color="transparent" style:font-name-asian="ＭＳ Ｐ明朝" style:font-size-asian="32pt" style:language-asian="ja" style:country-asian="JP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T8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7pt" fo:letter-spacing="normal" fo:font-style="normal" style:text-underline-style="none" fo:font-weight="bold" fo:background-color="transparent" style:font-name-asian="ＭＳ Ｐ明朝" style:font-size-asian="7pt" style:language-asian="ja" style:country-asian="JP" style:font-style-asian="normal" style:font-weight-asian="bold" style:font-size-complex="7pt" style:font-style-complex="normal" style:font-weight-complex="bold">
        <loext:char-complex-color loext:theme-type="light1" loext:color-type="theme"/>
      </style:text-properties>
    </style:style>
    <style:style style:name="T8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7pt" fo:letter-spacing="normal" fo:language="en" fo:country="US" fo:font-style="normal" style:text-underline-style="none" fo:font-weight="bold" fo:background-color="transparent" style:font-name-asian="ＭＳ Ｐ明朝" style:font-size-asian="7pt" style:font-style-asian="normal" style:font-weight-asian="bold" style:font-size-complex="7pt" style:font-style-complex="normal" style:font-weight-complex="bold">
        <loext:char-complex-color loext:theme-type="light1" loext:color-type="theme"/>
      </style:text-properties>
    </style:style>
    <style:style style:name="T8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6pt" fo:letter-spacing="normal" fo:language="en" fo:country="US" fo:font-style="normal" style:text-underline-style="none" fo:font-weight="normal" fo:background-color="transparent" style:font-name-asian="ＭＳ Ｐ明朝" style:font-size-asian="6pt" style:font-style-asian="normal" style:font-weight-asian="normal" style:font-size-complex="6pt" style:font-style-complex="normal" style:font-weight-complex="normal">
        <loext:char-complex-color loext:theme-type="light1" loext:color-type="theme"/>
      </style:text-properties>
    </style:style>
    <style:style style:name="T8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entury" fo:font-size="6pt" fo:letter-spacing="normal" fo:language="en" fo:country="US" fo:font-style="normal" style:text-underline-style="none" fo:font-weight="normal" fo:background-color="transparent" style:font-name-asian="ＭＳ Ｐ明朝" style:font-size-asian="6pt" style:font-style-asian="normal" style:font-weight-asian="normal" style:font-size-complex="6pt" style:font-style-complex="normal" style:font-weight-complex="normal"/>
    </style:style>
    <style:style style:name="T8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6pt" fo:letter-spacing="normal" fo:language="en" fo:country="US" fo:font-style="normal" style:text-underline-style="none" fo:font-weight="normal" fo:background-color="transparent" style:font-name-asian="ＭＳ Ｐ明朝" style:font-size-asian="6pt" style:language-asian="ja" style:country-asian="JP" style:font-style-asian="normal" style:font-weight-asian="normal" style:font-size-complex="6pt" style:font-style-complex="normal" style:font-weight-complex="normal">
        <loext:char-complex-color loext:theme-type="light1" loext:color-type="theme"/>
      </style:text-properties>
    </style:style>
    <style:style style:name="T8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entury" fo:font-size="12pt" fo:letter-spacing="normal" fo:language="en" fo:country="US" fo:font-style="normal" style:text-underline-style="none" fo:font-weight="normal" fo:background-color="transparent" style:font-name-asian="ＭＳ Ｐ明朝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variant="normal" fo:text-transform="none" fo:color="#ff0000" loext:opacity="100%" style:text-outline="false" style:text-line-through-style="none" style:text-line-through-type="none" style:text-position="30% 58%" style:font-name="Century" fo:font-size="12pt" fo:letter-spacing="normal" fo:language="en" fo:country="US" fo:font-style="normal" style:text-underline-style="none" fo:font-weight="normal" fo:background-color="transparent" style:font-name-asian="ＭＳ Ｐ明朝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Century" fo:font-size="36pt" fo:letter-spacing="normal" fo:language="en" fo:country="US" fo:font-style="normal" style:text-underline-style="none" fo:font-weight="bold" fo:background-color="transparent" style:font-name-asian="ＭＳ Ｐ明朝" style:font-size-asian="36pt" style:font-style-asian="normal" style:font-weight-asian="bold" style:font-size-complex="36pt" style:font-style-complex="normal" style:font-weight-complex="bold"/>
    </style:style>
    <style:style style:name="T89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Century" fo:font-size="28pt" fo:letter-spacing="normal" fo:language="en" fo:country="US" fo:font-style="normal" style:text-underline-style="none" fo:font-weight="bold" fo:background-color="transparent" style:font-name-asian="ＭＳ Ｐ明朝" style:font-size-asian="28pt" style:font-style-asian="normal" style:font-weight-asian="bold" style:font-size-complex="28pt" style:font-style-complex="normal" style:font-weight-complex="bold"/>
    </style:style>
    <style:style style:name="T90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Century" fo:font-size="28pt" fo:letter-spacing="normal" fo:language="en" fo:country="US" fo:font-style="normal" style:text-underline-style="none" fo:font-weight="bold" fo:background-color="transparent" style:font-name-asian="ＭＳ Ｐ明朝" style:font-size-asian="28pt" style:language-asian="ja" style:country-asian="JP" style:font-style-asian="normal" style:font-weight-asian="bold" style:font-size-complex="28pt" style:font-style-complex="normal" style:font-weight-complex="bold"/>
    </style:style>
    <style:style style:name="T91" style:family="text">
      <style:text-properties fo:font-variant="normal" fo:text-transform="none" fo:color="#be0202" loext:opacity="100%" style:text-outline="false" style:text-line-through-style="none" style:text-line-through-type="none" style:text-position="0% 100%" style:font-name="ＭＳ Ｐ明朝" fo:font-size="12pt" fo:letter-spacing="normal" fo:language="en" fo:country="US" fo:font-style="normal" style:text-underline-style="none" fo:font-weight="bold" fo:background-color="transparent" style:font-name-asian="ＭＳ Ｐ明朝" style:font-size-asian="12pt" style:font-style-asian="normal" style:font-weight-asian="bold" style:font-size-complex="12pt" style:font-style-complex="normal" style:font-weight-complex="bold"/>
    </style:style>
    <style:style style:name="T92" style:family="text">
      <style:text-properties fo:font-variant="normal" fo:text-transform="none" fo:color="#be0202" loext:opacity="100%" style:text-outline="false" style:text-line-through-style="none" style:text-line-through-type="none" style:text-position="0% 100%" style:font-name="ＭＳ Ｐ明朝" fo:font-size="12pt" fo:letter-spacing="normal" fo:language="en" fo:country="US" fo:font-style="normal" style:text-underline-style="none" fo:font-weight="bold" fo:background-color="transparent" style:font-name-asian="ＭＳ Ｐ明朝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T9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2pt" fo:letter-spacing="normal" fo:language="en" fo:country="US" fo:font-style="normal" style:text-underline-style="none" fo:font-weight="bold" fo:background-color="transparent" style:font-name-asian="ＭＳ Ｐ明朝" style:font-size-asian="12pt" style:language-asian="ja" style:country-asian="JP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T94" style:family="text">
      <style:text-properties fo:font-variant="normal" fo:text-transform="none" fo:color="#a6a6a6" loext:opacity="100%" style:text-outline="false" style:text-line-through-style="none" style:text-line-through-type="none" style:text-position="0% 100%" style:font-name="ＭＳ Ｐ明朝" fo:font-size="12pt" fo:letter-spacing="normal" fo:language="en" fo:country="US" fo:font-style="normal" style:text-underline-style="none" fo:font-weight="bold" fo:background-color="transparent" style:font-name-asian="ＭＳ Ｐ明朝" style:font-size-asian="12pt" style:language-asian="ja" style:country-asian="JP" style:font-style-asian="normal" style:font-weight-asian="bold" style:font-size-complex="12pt" style:font-style-complex="normal" style:font-weight-complex="bold">
        <loext:char-complex-color loext:theme-type="light1" loext:color-type="theme">
          <loext:transformation loext:type="lummod" loext:value="6500"/>
        </loext:char-complex-color>
      </style:text-properties>
    </style:style>
    <style:style style:name="T95" style:family="text">
      <style:text-properties fo:font-variant="normal" fo:text-transform="none" fo:color="#bf0000" loext:opacity="100%" style:text-outline="false" style:text-line-through-style="none" style:text-line-through-type="none" style:text-position="0% 100%" style:font-name="ＭＳ Ｐ明朝" fo:font-size="32pt" fo:letter-spacing="normal" fo:language="en" fo:country="US" fo:font-style="normal" style:text-underline-style="none" fo:font-weight="bold" fo:background-color="transparent" style:font-name-asian="ＭＳ Ｐ明朝" style:font-size-asian="32pt" style:font-style-asian="normal" style:font-weight-asian="bold" style:font-size-complex="32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T96" style:family="text">
      <style:text-properties fo:font-variant="normal" fo:text-transform="none" fo:color="#bf0000" loext:opacity="100%" style:text-outline="false" style:text-line-through-style="none" style:text-line-through-type="none" style:text-position="0% 100%" style:font-name="ＭＳ Ｐ明朝" fo:font-size="32pt" fo:letter-spacing="normal" fo:language="en" fo:country="US" fo:font-style="normal" style:text-underline-style="none" fo:font-weight="bold" fo:background-color="transparent" style:font-name-asian="ＭＳ Ｐ明朝" style:font-size-asian="32pt" style:language-asian="ja" style:country-asian="JP" style:font-style-asian="normal" style:font-weight-asian="bold" style:font-size-complex="32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T97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Century" fo:font-size="48pt" fo:letter-spacing="normal" fo:language="en" fo:country="US" fo:font-style="normal" style:text-underline-style="none" fo:font-weight="normal" fo:background-color="transparent" style:font-name-asian="ＭＳ Ｐ明朝" style:font-size-asian="48pt" style:font-style-asian="normal" style:font-weight-asian="normal" style:font-size-complex="48pt" style:font-style-complex="normal" style:font-weight-complex="normal">
        <loext:char-complex-color loext:theme-type="light1" loext:color-type="theme"/>
      </style:text-properties>
    </style:style>
    <style:style style:name="T98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Century" fo:font-size="48pt" fo:letter-spacing="normal" fo:language="en" fo:country="US" fo:font-style="normal" style:text-underline-style="none" fo:font-weight="normal" fo:background-color="transparent" style:font-name-asian="ＭＳ Ｐ明朝" style:font-size-asian="48pt" style:language-asian="ja" style:country-asian="JP" style:font-style-asian="normal" style:font-weight-asian="normal" style:font-size-complex="48pt" style:font-style-complex="normal" style:font-weight-complex="normal">
        <loext:char-complex-color loext:theme-type="light1" loext:color-type="theme"/>
      </style:text-properties>
    </style:style>
    <style:style style:name="T9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8pt" fo:letter-spacing="normal" fo:language="en" fo:country="US" fo:font-style="normal" style:text-underline-style="none" fo:font-weight="normal" fo:background-color="transparent" style:font-name-asian="ＭＳ Ｐ明朝" style:font-size-asian="28pt" style:language-asian="ja" style:country-asian="JP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0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4pt" fo:letter-spacing="normal" fo:language="en" fo:country="US" fo:font-style="normal" style:text-underline-style="none" fo:font-weight="bold" fo:background-color="transparent" style:font-name-asian="ＭＳ Ｐ明朝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T10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ＭＳ Ｐ明朝" fo:font-size="14pt" fo:letter-spacing="normal" fo:language="en" fo:country="US" fo:font-style="normal" style:text-underline-style="none" fo:font-weight="bold" fo:background-color="transparent" style:font-name-asian="ＭＳ Ｐ明朝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ＭＳ Ｐ明朝" fo:font-size="14pt" fo:letter-spacing="normal" fo:language="en" fo:country="US" fo:font-style="normal" style:text-underline-style="none" fo:font-weight="bold" fo:background-color="transparent" style:font-name-asian="ＭＳ Ｐ明朝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4pt" fo:letter-spacing="normal" fo:font-style="normal" style:text-underline-style="none" fo:font-weight="bold" fo:background-color="transparent" style:font-name-asian="ＭＳ Ｐ明朝" style:font-size-asian="14pt" style:language-asian="ja" style:country-asian="JP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T10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4pt" fo:letter-spacing="normal" fo:language="en" fo:country="US" fo:font-style="normal" style:text-underline-style="none" fo:font-weight="bold" fo:background-color="transparent" style:font-name-asian="ＭＳ Ｐ明朝" style:font-size-asian="14pt" style:language-asian="ja" style:country-asian="JP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T10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ＭＳ Ｐ明朝" fo:font-size="14pt" fo:letter-spacing="normal" fo:language="en" fo:country="US" fo:font-style="normal" style:text-underline-style="none" fo:font-weight="bold" fo:background-color="transparent" style:font-name-asian="ＭＳ Ｐ明朝" style:font-size-asian="14pt" style:language-asian="ja" style:country-asian="JP" style:font-style-asian="normal" style:font-weight-asian="bold" style:font-size-complex="14pt" style:font-style-complex="normal" style:font-weight-complex="bold"/>
    </style:style>
    <style:style style:name="T10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ＭＳ Ｐ明朝" fo:font-size="14pt" fo:letter-spacing="normal" fo:font-style="normal" style:text-underline-style="none" fo:font-weight="bold" fo:background-color="transparent" style:font-name-asian="ＭＳ Ｐ明朝" style:font-size-asian="14pt" style:language-asian="ja" style:country-asian="JP" style:font-style-asian="normal" style:font-weight-asian="bold" style:font-size-complex="14pt" style:font-style-complex="normal" style:font-weight-complex="bold"/>
    </style:style>
    <style:style style:name="T10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2pt" fo:letter-spacing="normal" fo:language="en" fo:country="US" fo:font-style="normal" style:text-underline-style="none" fo:font-weight="bold" fo:background-color="transparent" style:font-name-asian="ＭＳ Ｐ明朝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T108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ＭＳ Ｐ明朝" fo:font-size="14pt" fo:letter-spacing="normal" fo:font-style="normal" style:text-underline-style="none" fo:font-weight="bold" fo:background-color="transparent" style:font-name-asian="ＭＳ Ｐ明朝" style:font-size-asian="14pt" style:language-asian="ja" style:country-asian="JP" style:font-style-asian="normal" style:font-weight-asian="bold" style:font-size-complex="14pt" style:font-style-complex="normal" style:font-weight-complex="bold"/>
    </style:style>
    <style:style style:name="T109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ＭＳ Ｐ明朝" fo:font-size="14pt" fo:letter-spacing="normal" fo:language="en" fo:country="US" fo:font-style="normal" style:text-underline-style="none" fo:font-weight="bold" fo:background-color="transparent" style:font-name-asian="ＭＳ Ｐ明朝" style:font-size-asian="14pt" style:language-asian="ja" style:country-asian="JP" style:font-style-asian="normal" style:font-weight-asian="bold" style:font-size-complex="14pt" style:font-style-complex="normal" style:font-weight-complex="bold"/>
    </style:style>
    <style:style style:name="T110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ＭＳ Ｐ明朝" fo:font-size="18pt" fo:letter-spacing="normal" fo:font-style="normal" style:text-underline-style="none" fo:font-weight="bold" fo:background-color="transparent" style:font-name-asian="ＭＳ Ｐ明朝" style:font-size-asian="18pt" style:language-asian="ja" style:country-asian="JP" style:font-style-asian="normal" style:font-weight-asian="bold" style:font-size-complex="18pt" style:font-style-complex="normal" style:font-weight-complex="bold"/>
    </style:style>
    <style:style style:name="T1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8pt" fo:letter-spacing="normal" fo:language="en" fo:country="US" fo:font-style="normal" style:text-underline-style="none" fo:font-weight="bold" fo:background-color="transparent" style:font-name-asian="ＭＳ Ｐ明朝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1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8pt" fo:letter-spacing="normal" fo:language="en" fo:country="US" fo:font-style="normal" style:text-underline-style="none" fo:font-weight="bold" fo:background-color="transparent" style:font-name-asian="ＭＳ Ｐ明朝" style:font-size-asian="18pt" style:language-asian="ja" style:country-asian="JP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11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ＭＳ Ｐ明朝" fo:font-size="18pt" fo:letter-spacing="normal" fo:language="en" fo:country="US" fo:font-style="normal" style:text-underline-style="none" fo:font-weight="bold" fo:background-color="transparent" style:font-name-asian="ＭＳ Ｐ明朝" style:font-size-asian="18pt" style:font-style-asian="normal" style:font-weight-asian="bold" style:font-size-complex="18pt" style:font-style-complex="normal" style:font-weight-complex="bold"/>
    </style:style>
    <style:style style:name="T11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ＭＳ Ｐ明朝" fo:font-size="18pt" fo:letter-spacing="normal" fo:language="en" fo:country="US" fo:font-style="normal" style:text-underline-style="none" fo:font-weight="bold" fo:background-color="transparent" style:font-name-asian="ＭＳ Ｐ明朝" style:font-size-asian="18pt" style:language-asian="ja" style:country-asian="JP" style:font-style-asian="normal" style:font-weight-asian="bold" style:font-size-complex="18pt" style:font-style-complex="normal" style:font-weight-complex="bold"/>
    </style:style>
    <style:style style:name="T1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8pt" fo:letter-spacing="normal" fo:font-style="normal" style:text-underline-style="none" fo:font-weight="bold" fo:background-color="transparent" style:font-name-asian="ＭＳ Ｐ明朝" style:font-size-asian="18pt" style:language-asian="ja" style:country-asian="JP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116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ＭＳ Ｐ明朝" fo:font-size="18pt" fo:letter-spacing="normal" fo:language="en" fo:country="US" fo:font-style="normal" style:text-underline-style="none" fo:font-weight="bold" fo:background-color="transparent" style:font-name-asian="ＭＳ Ｐ明朝" style:font-size-asian="18pt" style:language-asian="ja" style:country-asian="JP" style:font-style-asian="normal" style:font-weight-asian="bold" style:font-size-complex="18pt" style:font-style-complex="normal" style:font-weight-complex="bold"/>
    </style:style>
    <style:style style:name="T117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ＭＳ Ｐ明朝" fo:font-size="18pt" fo:letter-spacing="normal" fo:language="en" fo:country="US" fo:font-style="normal" style:text-underline-style="none" fo:font-weight="bold" fo:background-color="transparent" style:font-name-asian="ＭＳ Ｐ明朝" style:font-size-asian="18pt" style:font-style-asian="normal" style:font-weight-asian="bold" style:font-size-complex="18pt" style:font-style-complex="normal" style:font-weight-complex="bold"/>
    </style:style>
    <style:style style:name="T11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ＭＳ Ｐ明朝" fo:font-size="18pt" fo:letter-spacing="normal" fo:font-style="normal" style:text-underline-style="none" fo:font-weight="bold" fo:background-color="transparent" style:font-name-asian="ＭＳ Ｐ明朝" style:font-size-asian="18pt" style:language-asian="ja" style:country-asian="JP" style:font-style-asian="normal" style:font-weight-asian="bold" style:font-size-complex="18pt" style:font-style-complex="normal" style:font-weight-complex="bold"/>
    </style:style>
    <style:style style:name="T1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4pt" fo:letter-spacing="normal" fo:font-style="normal" style:text-underline-style="none" fo:font-weight="bold" fo:background-color="transparent" style:font-name-asian="ＭＳ Ｐ明朝" style:font-size-asian="24pt" style:language-asian="ja" style:country-asian="JP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120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ＭＳ Ｐ明朝" fo:font-size="24pt" fo:letter-spacing="normal" fo:language="en" fo:country="US" fo:font-style="normal" style:text-underline-style="none" fo:font-weight="bold" fo:background-color="transparent" style:font-name-asian="ＭＳ Ｐ明朝" style:font-size-asian="24pt" style:font-style-asian="normal" style:font-weight-asian="bold" style:font-size-complex="24pt" style:font-style-complex="normal" style:font-weight-complex="bold"/>
    </style:style>
    <style:style style:name="T121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ＭＳ Ｐ明朝" fo:font-size="24pt" fo:letter-spacing="normal" fo:language="en" fo:country="US" fo:font-style="normal" style:text-underline-style="none" fo:font-weight="bold" fo:background-color="transparent" style:font-name-asian="ＭＳ Ｐ明朝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T122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Century" fo:font-size="32pt" fo:letter-spacing="normal" fo:language="en" fo:country="US" fo:font-style="normal" style:text-underline-style="none" fo:font-weight="normal" fo:background-color="transparent" style:font-name-asian="ＭＳ Ｐ明朝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T123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Century" fo:font-size="32pt" fo:letter-spacing="normal" fo:language="en" fo:country="US" fo:font-style="normal" style:text-underline-style="none" fo:font-weight="normal" fo:background-color="transparent" style:font-name-asian="ＭＳ Ｐ明朝" style:font-size-asian="32pt" style:language-asian="ja" style:country-asian="JP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T1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0pt" fo:letter-spacing="normal" fo:language="en" fo:country="US" fo:font-style="normal" style:text-underline-style="none" fo:font-weight="normal" fo:background-color="transparent" style:font-name-asian="ＭＳ Ｐ明朝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1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0pt" fo:letter-spacing="normal" fo:language="en" fo:country="US" fo:font-style="normal" style:text-underline-style="none" fo:font-weight="normal" fo:background-color="transparent" style:font-name-asian="ＭＳ Ｐ明朝" style:font-size-asian="20pt" style:language-asian="ja" style:country-asian="JP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1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6pt" fo:letter-spacing="normal" fo:font-style="normal" style:text-underline-style="none" fo:font-weight="bold" fo:background-color="transparent" style:font-name-asian="ＭＳ Ｐ明朝" style:font-size-asian="16pt" style:language-asian="ja" style:country-asian="JP" style:font-style-asian="normal" style:font-weight-asian="bold" style:font-size-complex="16pt" style:font-style-complex="normal" style:font-weight-complex="bold">
        <loext:char-complex-color loext:theme-type="light1" loext:color-type="theme"/>
      </style:text-properties>
    </style:style>
    <style:style style:name="T1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6pt" fo:letter-spacing="normal" fo:language="en" fo:country="US" fo:font-style="normal" style:text-underline-style="none" fo:font-weight="bold" fo:background-color="transparent" style:font-name-asian="ＭＳ Ｐ明朝" style:font-size-asian="16pt" style:font-style-asian="normal" style:font-weight-asian="bold" style:font-size-complex="16pt" style:font-style-complex="normal" style:font-weight-complex="bold">
        <loext:char-complex-color loext:theme-type="light1" loext:color-type="theme"/>
      </style:text-properties>
    </style:style>
    <style:style style:name="T1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6pt" fo:letter-spacing="normal" fo:language="en" fo:country="US" fo:font-style="normal" style:text-underline-style="none" fo:font-weight="bold" fo:background-color="transparent" style:font-name-asian="ＭＳ Ｐ明朝" style:font-size-asian="16pt" style:language-asian="ja" style:country-asian="JP" style:font-style-asian="normal" style:font-weight-asian="bold" style:font-size-complex="16pt" style:font-style-complex="normal" style:font-weight-complex="bold">
        <loext:char-complex-color loext:theme-type="light1" loext:color-type="theme"/>
      </style:text-properties>
    </style:style>
    <style:style style:name="T1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40pt" fo:letter-spacing="normal" fo:font-style="normal" style:text-underline-style="none" fo:font-weight="bold" fo:background-color="transparent" style:font-name-asian="ＭＳ Ｐ明朝" style:font-size-asian="40pt" style:language-asian="ja" style:country-asian="JP" style:font-style-asian="normal" style:font-weight-asian="bold" style:font-size-complex="40pt" style:font-style-complex="normal" style:font-weight-complex="bold">
        <loext:char-complex-color loext:theme-type="light1" loext:color-type="theme"/>
      </style:text-properties>
    </style:style>
    <style:style style:name="T1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40pt" fo:letter-spacing="normal" fo:language="en" fo:country="US" fo:font-style="normal" style:text-underline-style="none" fo:font-weight="bold" fo:background-color="transparent" style:font-name-asian="ＭＳ Ｐ明朝" style:font-size-asian="40pt" style:language-asian="ja" style:country-asian="JP" style:font-style-asian="normal" style:font-weight-asian="bold" style:font-size-complex="40pt" style:font-style-complex="normal" style:font-weight-complex="bold">
        <loext:char-complex-color loext:theme-type="light1" loext:color-type="theme"/>
      </style:text-properties>
    </style:style>
    <style:style style:name="T1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6pt" fo:letter-spacing="normal" fo:language="en" fo:country="US" fo:font-style="normal" style:text-underline-style="none" fo:font-weight="normal" fo:background-color="transparent" style:font-name-asian="ＭＳ Ｐ明朝" style:font-size-asian="26pt" style:language-asian="ja" style:country-asian="JP" style:font-style-asian="normal" style:font-weight-asian="normal" style:font-size-complex="26pt" style:font-style-complex="normal" style:font-weight-complex="normal">
        <loext:char-complex-color loext:theme-type="light1" loext:color-type="theme"/>
      </style:text-properties>
    </style:style>
    <style:style style:name="T1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8pt" fo:letter-spacing="normal" fo:font-style="normal" style:text-underline-style="none" fo:font-weight="bold" fo:background-color="transparent" style:font-name-asian="ＭＳ Ｐ明朝" style:font-size-asian="28pt" style:language-asian="ja" style:country-asian="JP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133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ＭＳ Ｐ明朝" fo:font-size="24pt" fo:letter-spacing="normal" fo:font-style="normal" style:text-underline-style="none" fo:font-weight="bold" fo:background-color="transparent" style:font-name-asian="ＭＳ Ｐ明朝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T13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ＭＳ Ｐ明朝" fo:font-size="24pt" fo:letter-spacing="normal" fo:language="en" fo:country="US" fo:font-style="normal" style:text-underline-style="none" fo:font-weight="bold" fo:background-color="transparent" style:font-name-asian="ＭＳ Ｐ明朝" style:font-size-asian="24pt" style:font-style-asian="normal" style:font-weight-asian="bold" style:font-size-complex="24pt" style:font-style-complex="normal" style:font-weight-complex="bold"/>
    </style:style>
    <style:style style:name="T1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32pt" fo:letter-spacing="normal" fo:font-style="normal" style:text-underline-style="none" fo:font-weight="bold" fo:background-color="transparent" style:font-name-asian="ＭＳ Ｐ明朝" style:font-size-asian="32pt" style:language-asian="ja" style:country-asian="JP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T136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Century" fo:font-size="36pt" fo:letter-spacing="normal" fo:font-style="normal" style:text-underline-style="none" fo:font-weight="normal" fo:background-color="transparent" style:font-name-asian="ＭＳ Ｐ明朝" style:font-size-asian="36pt" style:language-asian="ja" style:country-asian="JP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137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Century" fo:font-size="11pt" fo:letter-spacing="normal" fo:language="en" fo:country="US" fo:font-style="normal" style:text-underline-style="none" fo:font-weight="bold" fo:background-color="transparent" style:font-name-asian="ＭＳ Ｐ明朝" style:font-size-asian="11pt" style:font-style-asian="normal" style:font-weight-asian="bold" style:font-size-complex="11pt" style:font-style-complex="normal" style:font-weight-complex="bold"/>
    </style:style>
    <style:style style:name="T138" style:family="text">
      <style:text-properties fo:font-variant="normal" fo:text-transform="none" fo:color="#00ffff" loext:opacity="100%" style:text-outline="false" style:text-line-through-style="none" style:text-line-through-type="none" style:text-position="0% 100%" style:font-name="Century" fo:font-size="10.5pt" fo:letter-spacing="normal" fo:language="en" fo:country="US" fo:font-style="normal" style:text-underline-style="none" fo:font-weight="bold" fo:background-color="transparent" style:font-name-asian="ＭＳ Ｐ明朝" style:font-size-asian="10.5pt" style:font-style-asian="normal" style:font-weight-asian="bold" style:font-size-complex="10.5pt" style:font-style-complex="normal" style:font-weight-complex="bold"/>
    </style:style>
    <style:style style:name="T13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entury" fo:font-size="10.5pt" fo:letter-spacing="normal" fo:language="en" fo:country="US" fo:font-style="normal" style:text-underline-style="none" fo:font-weight="bold" fo:background-color="transparent" style:font-name-asian="ＭＳ Ｐ明朝" style:font-size-asian="10.5pt" style:font-style-asian="normal" style:font-weight-asian="bold" style:font-size-complex="10.5pt" style:font-style-complex="normal" style:font-weight-complex="bold"/>
    </style:style>
    <style:style style:name="T14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entury" fo:font-size="10.5pt" fo:letter-spacing="normal" fo:language="en" fo:country="US" fo:font-style="normal" style:text-underline-style="none" fo:font-weight="bold" fo:background-color="transparent" style:font-name-asian="ＭＳ Ｐ明朝" style:font-size-asian="10.5pt" style:language-asian="ja" style:country-asian="JP" style:font-style-asian="normal" style:font-weight-asian="bold" style:font-size-complex="10.5pt" style:font-style-complex="normal" style:font-weight-complex="bold"/>
    </style:style>
    <style:style style:name="T141" style:family="text">
      <style:text-properties fo:font-variant="normal" fo:text-transform="none" fo:color="#ff6666" loext:opacity="100%" style:text-outline="false" style:text-line-through-style="none" style:text-line-through-type="none" style:text-position="0% 100%" style:font-name="Century" fo:font-size="10.5pt" fo:letter-spacing="normal" fo:language="en" fo:country="US" fo:font-style="normal" style:text-underline-style="none" fo:font-weight="normal" fo:background-color="transparent" style:font-name-asian="ＭＳ Ｐ明朝" style:font-size-asian="10.5pt" style:language-asian="ja" style:country-asian="JP" style:font-style-asian="normal" style:font-weight-asian="normal" style:font-size-complex="10.5pt" style:font-style-complex="normal" style:font-weight-complex="normal">
        <loext:char-complex-color loext:theme-type="accent2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明朝" fo:font-size="10pt" fo:letter-spacing="normal" fo:font-style="normal" style:text-underline-style="none" fo:font-weight="bold" fo:background-color="transparent" style:font-name-asian="ＭＳ Ｐ明朝" style:font-size-asian="10pt" style:language-asian="ja" style:country-asian="JP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T1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明朝" fo:font-size="10pt" fo:letter-spacing="normal" fo:language="en" fo:country="US" fo:font-style="normal" style:text-underline-style="none" fo:font-weight="bold" fo:background-color="transparent" style:font-name-asian="ＭＳ Ｐ明朝" style:font-size-asian="10pt" style:language-asian="ja" style:country-asian="JP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T1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明朝" fo:font-size="10pt" fo:letter-spacing="normal" fo:language="en" fo:country="US" fo:font-style="normal" style:text-underline-style="none" fo:font-weight="bold" fo:background-color="transparent" style:font-name-asian="ＭＳ Ｐ明朝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T14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8pt" fo:letter-spacing="normal" fo:language="en" fo:country="US" fo:font-style="normal" style:text-underline-style="none" fo:font-weight="normal" fo:background-color="transparent" style:font-name-asian="ＭＳ Ｐ明朝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T1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1pt" fo:letter-spacing="normal" fo:language="en" fo:country="US" fo:font-style="normal" style:text-underline-style="none" fo:font-weight="bold" fo:background-color="transparent" style:font-name-asian="ＭＳ Ｐ明朝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T147" style:family="text">
      <style:text-properties fo:font-variant="normal" fo:text-transform="none" fo:color="#99ff33" loext:opacity="100%" style:text-outline="false" style:text-line-through-style="none" style:text-line-through-type="none" style:text-position="0% 100%" style:font-name="Century" fo:font-size="11pt" fo:letter-spacing="normal" fo:language="en" fo:country="US" fo:font-style="normal" style:text-underline-style="none" fo:font-weight="bold" fo:background-color="transparent" style:font-name-asian="ＭＳ Ｐ明朝" style:font-size-asian="11pt" style:font-style-asian="normal" style:font-weight-asian="bold" style:font-size-complex="11pt" style:font-style-complex="normal" style:font-weight-complex="bold"/>
    </style:style>
    <style:style style:name="T14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entury" fo:font-size="11pt" fo:letter-spacing="normal" fo:language="en" fo:country="US" fo:font-style="normal" style:text-underline-style="none" fo:font-weight="bold" fo:background-color="transparent" style:font-name-asian="ＭＳ Ｐ明朝" style:font-size-asian="11pt" style:font-style-asian="normal" style:font-weight-asian="bold" style:font-size-complex="11pt" style:font-style-complex="normal" style:font-weight-complex="bold"/>
    </style:style>
    <style:style style:name="T14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0pt" fo:letter-spacing="normal" fo:font-style="normal" style:text-underline-style="none" fo:font-weight="normal" fo:background-color="transparent" style:font-name-asian="ＭＳ Ｐ明朝" style:font-size-asian="10pt" style:language-asian="ja" style:country-asian="JP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T15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0pt" fo:letter-spacing="normal" fo:language="en" fo:country="US" fo:font-style="normal" style:text-underline-style="none" fo:font-weight="bold" fo:background-color="transparent" style:font-name-asian="ＭＳ Ｐ明朝" style:font-size-asian="10pt" style:language-asian="ja" style:country-asian="JP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T15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10pt" fo:letter-spacing="normal" fo:language="en" fo:country="US" fo:font-style="normal" style:text-underline-style="none" fo:font-weight="normal" fo:background-color="transparent" style:font-name-asian="ＭＳ Ｐ明朝" style:font-size-asian="10pt" style:language-asian="ja" style:country-asian="JP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T152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ＭＳ Ｐ明朝" fo:font-size="10pt" fo:letter-spacing="normal" fo:font-style="normal" style:text-underline-style="none" fo:font-weight="normal" fo:background-color="transparent" style:font-name-asian="ＭＳ Ｐ明朝" style:font-size-asian="10pt" style:language-asian="ja" style:country-asian="JP" style:font-style-asian="normal" style:font-weight-asian="normal" style:font-size-complex="10pt" style:font-style-complex="normal" style:font-weight-complex="normal"/>
    </style:style>
    <style:style style:name="T153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ＭＳ Ｐ明朝" fo:font-size="10pt" fo:letter-spacing="normal" fo:language="en" fo:country="US" fo:font-style="normal" style:text-underline-style="none" fo:font-weight="bold" fo:background-color="transparent" style:font-name-asian="ＭＳ Ｐ明朝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T154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ＭＳ Ｐ明朝" fo:font-size="10pt" fo:letter-spacing="normal" fo:language="en" fo:country="US" fo:font-style="normal" style:text-underline-style="none" fo:font-weight="normal" fo:background-color="transparent" style:font-name-asian="ＭＳ Ｐ明朝" style:font-size-asian="10pt" style:language-asian="ja" style:country-asian="JP" style:font-style-asian="normal" style:font-weight-asian="normal" style:font-size-complex="10pt" style:font-style-complex="normal" style:font-weight-complex="normal"/>
    </style:style>
    <style:style style:name="T15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0.5pt" fo:letter-spacing="normal" fo:language="en" fo:country="US" fo:font-style="normal" style:text-underline-style="none" fo:font-weight="bold" fo:background-color="transparent" style:font-name-asian="ＭＳ Ｐ明朝" style:font-size-asian="10.5pt" style:font-style-asian="normal" style:font-weight-asian="bold" style:font-size-complex="10.5pt" style:font-style-complex="normal" style:font-weight-complex="bold">
        <loext:char-complex-color loext:theme-type="light1" loext:color-type="theme"/>
      </style:text-properties>
    </style:style>
    <style:style style:name="T156" style:family="text">
      <style:text-properties fo:font-variant="normal" fo:text-transform="none" fo:color="#00ffff" loext:opacity="100%" style:text-outline="false" style:text-line-through-style="none" style:text-line-through-type="none" style:text-position="0% 100%" style:font-name="Century" fo:font-size="10.5pt" fo:letter-spacing="normal" fo:language="en" fo:country="US" fo:font-style="normal" style:text-underline-style="none" fo:font-weight="bold" fo:background-color="transparent" style:font-name-asian="ＭＳ Ｐ明朝" style:font-size-asian="10.5pt" style:language-asian="ja" style:country-asian="JP" style:font-style-asian="normal" style:font-weight-asian="bold" style:font-size-complex="10.5pt" style:font-style-complex="normal" style:font-weight-complex="bold"/>
    </style:style>
    <style:style style:name="T157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Century" fo:font-size="10.5pt" fo:letter-spacing="normal" fo:language="en" fo:country="US" fo:font-style="normal" style:text-underline-style="none" fo:font-weight="bold" fo:background-color="transparent" style:font-name-asian="ＭＳ Ｐ明朝" style:font-size-asian="10.5pt" style:font-style-asian="normal" style:font-weight-asian="bold" style:font-size-complex="10.5pt" style:font-style-complex="normal" style:font-weight-complex="bold"/>
    </style:style>
    <style:style style:name="T158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Century" fo:font-size="10.5pt" fo:letter-spacing="normal" fo:language="en" fo:country="US" fo:font-style="normal" style:text-underline-style="none" fo:font-weight="bold" fo:background-color="transparent" style:font-name-asian="ＭＳ Ｐ明朝" style:font-size-asian="10.5pt" style:font-style-asian="normal" style:font-weight-asian="bold" style:font-size-complex="10.5pt" style:font-style-complex="normal" style:font-weight-complex="bold"/>
    </style:style>
    <style:style style:name="T159" style:family="text">
      <style:text-properties fo:font-variant="normal" fo:text-transform="none" fo:color="#00b0f0" loext:opacity="100%" style:text-outline="false" style:text-line-through-style="none" style:text-line-through-type="none" style:text-position="0% 100%" style:font-name="Century" fo:font-size="10.5pt" fo:letter-spacing="normal" fo:language="en" fo:country="US" fo:font-style="normal" style:text-underline-style="none" fo:font-weight="bold" fo:background-color="transparent" style:font-name-asian="ＭＳ Ｐ明朝" style:font-size-asian="10.5pt" style:font-style-asian="normal" style:font-weight-asian="bold" style:font-size-complex="10.5pt" style:font-style-complex="normal" style:font-weight-complex="bold"/>
    </style:style>
    <style:style style:name="T16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ＭＳ Ｐ明朝" fo:font-size="28pt" fo:letter-spacing="normal" fo:language="en" fo:country="US" fo:font-style="normal" style:text-underline-style="none" fo:font-weight="bold" fo:background-color="transparent" style:font-name-asian="ＭＳ Ｐ明朝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16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ＭＳ Ｐ明朝" fo:font-size="28pt" fo:letter-spacing="normal" fo:language="en" fo:country="US" fo:font-style="normal" style:text-underline-style="none" fo:font-weight="bold" fo:background-color="transparent" style:font-name-asian="ＭＳ Ｐ明朝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98ec7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fc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be020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b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00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fo:color="#99ff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Open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骨粗鬆症とは？" draw:style-name="dp1" draw:master-page-name="タイトルとコンテンツ" presentation:presentation-page-layout-name="AL1T11">
        <draw:frame draw:name="タイトル 1" presentation:style-name="pr1" draw:layer="layout" svg:width="22.859cm" svg:height="3.181cm" svg:x="1.27cm" svg:y="0.759cm" presentation:class="title" presentation:user-transformed="true">
          <draw:text-box>
            <text:p text:style-name="P1">骨粗鬆症とは？</text:p>
          </draw:text-box>
        </draw:frame>
        <draw:frame draw:name="コンテンツ プレースホルダー 2" presentation:style-name="pr2" draw:text-style-name="P1" draw:layer="layout" svg:width="22.859cm" svg:height="4.879cm" svg:x="1.27cm" svg:y="6.245cm" presentation:class="outline" presentation:user-transformed="true">
          <draw:text-box>
            <text:p text:style-name="P1">骨粗鬆症の</text:p>
            <text:p text:style-name="P1">予防と治療のガイドライン　</text:p>
            <text:p text:style-name="P1">2015年版</text:p>
            <text:p text:style-name="P1"/>
          </draw:text-box>
        </draw:frame>
        <draw:custom-shape draw:name="テキスト ボックス 6" draw:style-name="gr1" draw:text-style-name="P3" draw:layer="layout" svg:width="18.103cm" svg:height="1.013cm" svg:x="3.648cm" svg:y="14.316cm">
          <text:p text:style-name="P2"><text:span text:style-name="T1">日本骨粗鬆症学会　日本骨</text:span><text:span text:style-name="T1">代謝学会　骨粗鬆症財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粗鬆症の概念と定義" draw:style-name="dp3" draw:master-page-name="タイトルとコンテンツ" presentation:presentation-page-layout-name="AL1T11">
        <draw:frame draw:name="タイトル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骨粗</text:span><text:span text:style-name="T2">鬆症</text:span><text:span text:style-name="T2">の概</text:span><text:span text:style-name="T2">念と</text:span><text:span text:style-name="T2">定義</text:span></text:p>
          </draw:text-box>
        </draw:frame>
        <draw:frame draw:name="コンテンツ プレースホルダー 2" presentation:style-name="pr5" draw:text-style-name="P9" draw:layer="layout" svg:width="24.13cm" svg:height="5.079cm" svg:x="0.635cm" svg:y="4.445cm" presentation:class="outline" presentation:user-transformed="true">
          <draw:text-box>
            <text:p text:style-name="P7"><text:span text:style-name="T3">WHO</text:span></text:p>
            <text:p text:style-name="P8"><text:span text:style-name="T4">｢</text:span><text:span text:style-name="T5">骨粗鬆症は， 低骨量と骨組織の微細構造の異常を特徴とし，</text:span><text:span text:style-name="T5">骨の脆弱性が増大し，骨折の危険性が増大する疾患である｣</text:span></text:p>
          </draw:text-box>
        </draw:frame>
        <draw:frame draw:name="表 3" draw:style-name="gr3" draw:layer="layout" svg:width="21cm" svg:height="6.145cm" svg:x="2.199cm" svg:y="11.125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0"><text:span text:style-name="T6">　骨密度により診断カテゴリー</text:span></text:p>
              </table:table-cell>
              <table:covered-table-cell table:style-name="ce2"/>
            </table:table-row>
            <table:table-row table:style-name="ro2">
              <table:table-cell table:style-name="ce3">
                <text:p text:style-name="P11"><text:span text:style-name="T7">正常</text:span></text:p>
              </table:table-cell>
              <table:table-cell table:style-name="ce4">
                <text:p text:style-name="P12"><text:span text:style-name="T7">骨密度が若年成人の平均値の－</text:span><text:span text:style-name="T8">1SD</text:span><text:span text:style-name="T8">以上</text:span></text:p>
              </table:table-cell>
            </table:table-row>
            <table:table-row table:style-name="ro2">
              <table:table-cell table:style-name="ce3">
                <text:p text:style-name="P11"><text:span text:style-name="T7">低骨量状態</text:span></text:p>
              </table:table-cell>
              <table:table-cell table:style-name="ce4">
                <text:p text:style-name="P12"><text:span text:style-name="T7">骨密度が</text:span><text:span text:style-name="T8">T</text:span><text:span text:style-name="T8">スコアで　　－</text:span><text:span text:style-name="T8">2.5</text:span><text:span text:style-name="T8">＜</text:span><text:span text:style-name="T8">T</text:span><text:span text:style-name="T8">スコア＜－</text:span><text:span text:style-name="T8">1.0</text:span></text:p>
              </table:table-cell>
            </table:table-row>
            <table:table-row table:style-name="ro2">
              <table:table-cell table:style-name="ce3">
                <text:p text:style-name="P11"><text:span text:style-name="T7">骨粗鬆症</text:span></text:p>
              </table:table-cell>
              <table:table-cell table:style-name="ce4">
                <text:p text:style-name="P12"><text:span text:style-name="T7">骨密度が</text:span><text:span text:style-name="T8">T</text:span><text:span text:style-name="T8">スコアで　　　</text:span><text:span text:style-name="T8">T</text:span><text:span text:style-name="T8">スコア＜－</text:span><text:span text:style-name="T8">2.5</text:span></text:p>
              </table:table-cell>
            </table:table-row>
            <table:table-row table:style-name="ro2">
              <table:table-cell table:style-name="ce3">
                <text:p text:style-name="P11"><text:span text:style-name="T7">重症骨粗鬆症</text:span></text:p>
              </table:table-cell>
              <table:table-cell table:style-name="ce4">
                <text:p text:style-name="P12"><text:span text:style-name="T7">骨粗鬆症に加えて１個以上の脆弱性骨折がある。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粗鬆症の概念と定義 (2)" draw:style-name="dp3" draw:master-page-name="タイトルとコンテンツ" presentation:presentation-page-layout-name="AL1T11">
        <draw:frame draw:name="タイトル 1" presentation:style-name="pr6" draw:text-style-name="P14" draw:layer="layout" svg:width="22.859cm" svg:height="1.97cm" svg:x="1.271cm" svg:y="1.364cm" presentation:class="title" presentation:user-transformed="true">
          <draw:text-box>
            <text:p text:style-name="P13"><text:span text:style-name="T9">骨粗</text:span><text:span text:style-name="T9">鬆症</text:span><text:span text:style-name="T9">の概</text:span><text:span text:style-name="T9">念と</text:span><text:span text:style-name="T9">定義</text:span></text:p>
          </draw:text-box>
        </draw:frame>
        <draw:frame draw:name="コンテンツ プレースホルダー 2" presentation:style-name="pr7" draw:text-style-name="P17" draw:layer="layout" svg:width="22.859cm" svg:height="5.279cm" svg:x="1.27cm" svg:y="4.224cm" presentation:class="outline" presentation:user-transformed="true">
          <draw:text-box>
            <text:p text:style-name="P15"><text:span text:style-name="T10">日本では　</text:span></text:p>
            <text:p text:style-name="P15"><text:span text:style-name="T10">　脆弱性骨折の有無にて診断基準が異なる。</text:span></text:p>
            <text:p text:style-name="P15"><text:span text:style-name="T10">T</text:span><text:span text:style-name="T10">スコアでなく、</text:span><text:span text:style-name="T10">YAM</text:span><text:span text:style-name="T10">値を用いる。</text:span></text:p>
            <text:p text:style-name="P15"><text:span text:style-name="T10">(YAM</text:span><text:span text:style-name="T10">：</text:span><text:span text:style-name="T10">young adult mean)</text:span></text:p>
            <text:p text:style-name="P16"><text:span text:style-name="T11"/></text:p>
          </draw:text-box>
        </draw:frame>
        <draw:frame draw:name="表 4" draw:style-name="gr3" draw:layer="layout" svg:width="12.199cm" svg:height="6.804cm" svg:x="0.299cm" svg:y="11.395cm">
          <table:table>
            <table:table-column table:style-name="co3"/>
            <table:table-column table:style-name="co4"/>
            <table:table-row table:style-name="ro1">
              <table:table-cell table:style-name="ce3" table:number-columns-spanned="2">
                <text:p text:style-name="P11"><text:span text:style-name="T6">脆弱性骨折無し</text:span></text:p>
              </table:table-cell>
              <table:covered-table-cell table:style-name="ce2"/>
            </table:table-row>
            <table:table-row table:style-name="ro2" table:default-cell-style-name="ce5">
              <table:table-cell>
                <text:p text:style-name="P10"><text:span text:style-name="T7">正常</text:span></text:p>
              </table:table-cell>
              <table:table-cell>
                <text:p text:style-name="P10"><text:span text:style-name="T7">骨密度　＞　</text:span><text:span text:style-name="T8">YAM</text:span><text:span text:style-name="T8">の</text:span><text:span text:style-name="T8">70</text:span><text:span text:style-name="T8">％ 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7">骨量減少</text:span></text:p>
              </table:table-cell>
              <table:table-cell>
                <text:p text:style-name="P10"><text:span text:style-name="T7">－</text:span><text:span text:style-name="T8">2.5SD</text:span><text:span text:style-name="T8">＜骨密度＜－</text:span><text:span text:style-name="T8">1SD</text:span></text:p>
              </table:table-cell>
            </table:table-row>
            <table:table-row table:style-name="ro3" table:default-cell-style-name="ce5">
              <table:table-cell>
                <text:p text:style-name="P10"><text:span text:style-name="T7">骨粗鬆症</text:span></text:p>
              </table:table-cell>
              <table:table-cell>
                <text:p text:style-name="P10"><text:span text:style-name="T7">骨密度　≦　</text:span><text:span text:style-name="T8">YAM </text:span><text:span text:style-name="T8">の</text:span><text:span text:style-name="T8">70%</text:span></text:p>
                <text:p text:style-name="P10"><text:span text:style-name="T8">or</text:span></text:p>
                <text:p text:style-name="P10"><text:span text:style-name="T8">骨密度　≦　－</text:span><text:span text:style-name="T8">2.5SD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表 5" draw:style-name="gr3" draw:layer="layout" svg:width="12.199cm" svg:height="5.635cm" svg:x="12.9cm" svg:y="11.411cm">
          <table:table>
            <table:table-column table:style-name="co3"/>
            <table:table-column table:style-name="co4"/>
            <table:table-row table:style-name="ro1">
              <table:table-cell table:style-name="ce6" table:number-columns-spanned="2">
                <text:p text:style-name="P11"><text:span text:style-name="T12">脆弱性骨折あり</text:span></text:p>
              </table:table-cell>
              <table:covered-table-cell table:style-name="ce2"/>
            </table:table-row>
            <table:table-row table:style-name="ro4">
              <table:table-cell table:style-name="ce3" table:number-rows-spanned="2">
                <text:p text:style-name="P11"><text:span text:style-name="T7">骨粗鬆症</text:span></text:p>
              </table:table-cell>
              <table:table-cell table:style-name="ce1">
                <text:p text:style-name="P11"><text:span text:style-name="T7">脆弱性骨折があり</text:span></text:p>
                <text:p text:style-name="P11"><text:span text:style-name="T7">骨密度＜</text:span><text:span text:style-name="T8">YAM</text:span><text:span text:style-name="T8">の</text:span><text:span text:style-name="T8">80%</text:span></text:p>
              </table:table-cell>
            </table:table-row>
            <table:table-row table:style-name="ro4">
              <table:covered-table-cell table:style-name="ce2"/>
              <table:table-cell table:style-name="ce1">
                <text:p text:style-name="P11"><text:span text:style-name="T7">大腿骨近位部骨折</text:span></text:p>
                <text:p text:style-name="P11"><text:span text:style-name="T7">または、椎体骨折あり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テキスト ボックス 6" draw:style-name="gr4" draw:text-style-name="P3" draw:layer="layout" svg:width="24.65cm" svg:height="1.098cm" svg:x="0.375cm" svg:y="9.914cm">
          <text:p text:style-name="P2"><text:span text:style-name="T13">脆弱性骨折の有無が、骨折リスクを増加させることを考慮してある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の強度とは？" draw:style-name="dp3" draw:master-page-name="タイトルとコンテンツ" presentation:presentation-page-layout-name="AL1T11">
        <draw:frame draw:name="タイトル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骨の</text:span><text:span text:style-name="T2">強度</text:span><text:span text:style-name="T2">と</text:span><text:span text:style-name="T2">は？</text:span></text:p>
          </draw:text-box>
        </draw:frame>
        <draw:custom-shape draw:name="角丸四角形 3" draw:style-name="gr5" draw:text-style-name="P3" draw:layer="layout" svg:width="6.6cm" svg:height="3.399cm" svg:x="0.899cm" svg:y="8.014cm">
          <text:p text:style-name="P2"><text:span text:style-name="T14">骨の強度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4" draw:style-name="gr6" draw:text-style-name="P3" draw:layer="layout" svg:width="6.6cm" svg:height="3.399cm" svg:x="9.449cm" svg:y="8.014cm">
          <text:p text:style-name="P2"><text:span text:style-name="T14">骨密度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5" draw:style-name="gr7" draw:text-style-name="P3" draw:layer="layout" svg:width="6.6cm" svg:height="3.399cm" svg:x="17.9cm" svg:y="8.014cm">
          <text:p text:style-name="P2"><text:span text:style-name="T14">骨質 <text:s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テキスト ボックス 6" draw:style-name="gr8" draw:text-style-name="P19" draw:layer="layout" svg:width="2.199cm" svg:height="1.267cm" svg:x="7.374cm" svg:y="9.008cm">
          <text:p text:style-name="P18"><text:span text:style-name="T15">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7" draw:style-name="gr9" draw:text-style-name="P19" draw:layer="layout" svg:width="2.199cm" svg:height="1.267cm" svg:x="15.924cm" svg:y="9.008cm">
          <text:p text:style-name="P18"><text:span text:style-name="T15">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10" draw:text-style-name="P21" draw:layer="layout" svg:width="7.124cm" svg:height="1.521cm" svg:x="9.3cm" svg:y="11.73cm">
          <text:p text:style-name="P20"><text:span text:style-name="T16">BMD</text:span></text:p>
          <text:p text:style-name="P20"><text:span text:style-name="T17">Bone</text:span><text:span text:style-name="T18"> Mineral Den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1" draw:style-name="gr11" draw:text-style-name="P3" draw:layer="layout" svg:width="5.425cm" svg:height="3.299cm" svg:x="18.45cm" svg:y="11.725cm">
          <text:p text:style-name="P22"><text:span text:style-name="T19">微細構造</text:span></text:p>
          <text:p text:style-name="P22"><text:span text:style-name="T19">骨代謝回転</text:span></text:p>
          <text:p text:style-name="P22"><text:span text:style-name="T19">微少骨折</text:span></text:p>
          <text:p text:style-name="P22"><text:span text:style-name="T19">石灰化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2" draw:text-style-name="P24" draw:layer="layout" svg:width="16.801cm" svg:height="1.013cm" svg:x="8.099cm" svg:y="16.126cm">
          <text:p text:style-name="P23"><text:span text:style-name="T20">2000</text:span><text:span text:style-name="T21">年　</text:span><text:span text:style-name="T21">NIH(</text:span><text:span text:style-name="T21">米国立衛生研究後</text:span><text:span text:style-name="T21">)</text:span><text:span text:style-name="T21">コンセンサス会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3" draw:text-style-name="P21" draw:layer="layout" svg:width="3.199cm" svg:height="1.013cm" svg:x="12.862cm" svg:y="10.389cm">
          <text:p text:style-name="P20"><text:span text:style-name="T16">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4" draw:text-style-name="P21" draw:layer="layout" svg:width="3.199cm" svg:height="1.013cm" svg:x="21.687cm" svg:y="10.323cm">
          <text:p text:style-name="P20"><text:span text:style-name="T16">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粗鬆症の原因は？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骨粗</text:span><text:span text:style-name="T22">鬆症</text:span><text:span text:style-name="T22">の原</text:span><text:span text:style-name="T22">因</text:span><text:span text:style-name="T22">は？</text:span></text:p>
          </draw:text-box>
        </draw:frame>
        <draw:custom-shape draw:name="角丸四角形 3" draw:style-name="gr15" draw:text-style-name="P3" xml:id="id3" draw:id="id3" draw:layer="layout" svg:width="5.259cm" svg:height="2.799cm" svg:x="1.84cm" svg:y="7.725cm">
          <text:p text:style-name="P22"><text:span text:style-name="T1">破骨細胞の</text:span></text:p>
          <text:p text:style-name="P22"><text:span text:style-name="T1">活性化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4" draw:style-name="gr16" draw:text-style-name="P21" xml:id="id1" draw:id="id1" draw:layer="layout" svg:width="5.259cm" svg:height="2.799cm" svg:x="7.728cm" svg:y="4.324cm">
          <text:p text:style-name="P20"><text:span text:style-name="T23">Ca/P</text:span><text:span text:style-name="T24">の欠乏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5" draw:style-name="gr17" draw:text-style-name="P3" xml:id="id4" draw:id="id4" draw:layer="layout" svg:width="5.259cm" svg:height="2.799cm" svg:x="13.506cm" svg:y="7.725cm">
          <text:p text:style-name="P22"><text:span text:style-name="T1">骨吸収と骨形成</text:span></text:p>
          <text:p text:style-name="P22"><text:span text:style-name="T1">の</text:span></text:p>
          <text:p text:style-name="P22"><text:span text:style-name="T1">アンバランス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6" draw:style-name="gr18" draw:text-style-name="P3" xml:id="id5" draw:id="id5" draw:layer="layout" svg:width="5.259cm" svg:height="2.799cm" svg:x="1.81cm" svg:y="12.125cm">
          <text:p text:style-name="P22"><text:span text:style-name="T1">エストロゲンの</text:span></text:p>
          <text:p text:style-name="P22"><text:span text:style-name="T1">欠乏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7" draw:style-name="gr19" draw:text-style-name="P3" xml:id="id2" draw:id="id2" draw:layer="layout" svg:width="5.259cm" svg:height="2.799cm" svg:x="7.704cm" svg:y="15.526cm">
          <text:p text:style-name="P22"><text:span text:style-name="T1">若年期の</text:span></text:p>
          <text:p text:style-name="P22"><text:span text:style-name="T1">骨形成不良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8" draw:style-name="gr20" draw:text-style-name="P3" xml:id="id6" draw:id="id6" draw:layer="layout" svg:width="5.259cm" svg:height="2.799cm" svg:x="13.5cm" svg:y="12.125cm">
          <text:p text:style-name="P22"><text:span text:style-name="T1">骨リモデリング</text:span></text:p>
          <text:p text:style-name="P22"><text:span text:style-name="T1">の亢進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直線コネクタ 13" draw:style-name="gr21" draw:text-style-name="P27" draw:layer="layout" draw:type="line" svg:x1="10.357cm" svg:y1="7.123cm" svg:x2="10.333cm" svg:y2="15.526cm" draw:start-shape="id1" draw:start-glue-point="2" draw:end-shape="id2" draw:end-glue-point="0" svg:d="M10357 7123l-24 8403" svg:viewBox="0 0 25 8404">
          <text:p/>
        </draw:connector>
        <draw:connector draw:name="直線コネクタ 15" draw:style-name="gr21" draw:text-style-name="P27" draw:layer="layout" draw:type="line" svg:x1="10.357cm" svg:y1="7.123cm" svg:x2="7.099cm" svg:y2="9.124cm" draw:start-shape="id1" draw:start-glue-point="2" draw:end-shape="id3" draw:end-glue-point="1" svg:d="M10357 7123l-3258 2001" svg:viewBox="0 0 3259 2002">
          <text:p/>
        </draw:connector>
        <draw:connector draw:name="直線コネクタ 17" draw:style-name="gr21" draw:text-style-name="P27" draw:layer="layout" draw:type="line" svg:x1="10.357cm" svg:y1="7.123cm" svg:x2="13.506cm" svg:y2="9.124cm" draw:start-shape="id1" draw:start-glue-point="2" draw:end-shape="id4" draw:end-glue-point="3" svg:d="M10357 7123l3149 2001" svg:viewBox="0 0 3150 2002">
          <text:p/>
        </draw:connector>
        <draw:connector draw:name="直線コネクタ 19" draw:style-name="gr21" draw:text-style-name="P27" draw:layer="layout" draw:type="line" svg:x1="10.357cm" svg:y1="7.123cm" svg:x2="7.069cm" svg:y2="13.524cm" draw:start-shape="id1" draw:start-glue-point="2" draw:end-shape="id5" draw:end-glue-point="1" svg:d="M10357 7123l-3288 6401" svg:viewBox="0 0 3289 6402">
          <text:p/>
        </draw:connector>
        <draw:connector draw:name="直線コネクタ 21" draw:style-name="gr21" draw:text-style-name="P27" draw:layer="layout" draw:type="line" svg:x1="10.357cm" svg:y1="7.123cm" svg:x2="13.5cm" svg:y2="13.524cm" draw:start-shape="id1" draw:start-glue-point="2" draw:end-shape="id6" draw:end-glue-point="3" svg:d="M10357 7123l3143 6401" svg:viewBox="0 0 3144 6402">
          <text:p/>
        </draw:connector>
        <draw:connector draw:name="直線コネクタ 23" draw:style-name="gr21" draw:text-style-name="P27" draw:layer="layout" draw:type="line" svg:x1="13.506cm" svg:y1="9.124cm" svg:x2="7.099cm" svg:y2="9.124cm" draw:start-shape="id4" draw:start-glue-point="3" draw:end-shape="id3" draw:end-glue-point="1" svg:d="M13506 9124h-6407" svg:viewBox="0 0 6408 1">
          <text:p/>
        </draw:connector>
        <draw:connector draw:name="直線コネクタ 25" draw:style-name="gr21" draw:text-style-name="P27" draw:layer="layout" draw:type="line" svg:x1="13.506cm" svg:y1="9.124cm" svg:x2="7.069cm" svg:y2="13.524cm" draw:start-shape="id4" draw:start-glue-point="3" draw:end-shape="id5" draw:end-glue-point="1" svg:d="M13506 9124l-6437 4400" svg:viewBox="0 0 6438 4401">
          <text:p/>
        </draw:connector>
        <draw:connector draw:name="直線コネクタ 27" draw:style-name="gr21" draw:text-style-name="P27" draw:layer="layout" draw:type="line" svg:x1="13.506cm" svg:y1="9.124cm" svg:x2="10.333cm" svg:y2="15.526cm" draw:start-shape="id4" draw:start-glue-point="3" draw:end-shape="id2" draw:end-glue-point="0" svg:d="M13506 9124l-3173 6402" svg:viewBox="0 0 3174 6403">
          <text:p/>
        </draw:connector>
        <draw:connector draw:name="直線コネクタ 29" draw:style-name="gr21" draw:text-style-name="P27" draw:layer="layout" draw:type="line" svg:x1="13.506cm" svg:y1="9.124cm" svg:x2="13.5cm" svg:y2="13.524cm" draw:start-shape="id4" draw:start-glue-point="3" draw:end-shape="id6" draw:end-glue-point="3" svg:d="M13506 9124l-6 4400" svg:viewBox="0 0 7 4401">
          <text:p/>
        </draw:connector>
        <draw:connector draw:name="直線コネクタ 31" draw:style-name="gr21" draw:text-style-name="P27" draw:layer="layout" draw:type="line" svg:x1="7.099cm" svg:y1="9.124cm" svg:x2="7.069cm" svg:y2="13.524cm" draw:start-shape="id3" draw:start-glue-point="1" draw:end-shape="id5" draw:end-glue-point="1" svg:d="M7099 9124l-30 4400" svg:viewBox="0 0 31 4401">
          <text:p/>
        </draw:connector>
        <draw:connector draw:name="直線コネクタ 33" draw:style-name="gr21" draw:text-style-name="P27" draw:layer="layout" draw:type="line" svg:x1="13.5cm" svg:y1="13.524cm" svg:x2="10.333cm" svg:y2="15.526cm" draw:start-shape="id6" draw:start-glue-point="3" draw:end-shape="id2" draw:end-glue-point="0" svg:d="M13500 13524l-3167 2002" svg:viewBox="0 0 3168 2003">
          <text:p/>
        </draw:connector>
        <draw:connector draw:name="直線コネクタ 35" draw:style-name="gr21" draw:text-style-name="P27" draw:layer="layout" draw:type="line" svg:x1="13.5cm" svg:y1="13.524cm" svg:x2="7.069cm" svg:y2="13.524cm" draw:start-shape="id6" draw:start-glue-point="3" draw:end-shape="id5" draw:end-glue-point="1" svg:d="M13500 13524h-6431" svg:viewBox="0 0 6432 1">
          <text:p/>
        </draw:connector>
        <draw:connector draw:name="直線コネクタ 37" draw:style-name="gr21" draw:text-style-name="P27" draw:layer="layout" draw:type="line" svg:x1="13.5cm" svg:y1="13.524cm" svg:x2="7.099cm" svg:y2="9.124cm" draw:start-shape="id6" draw:start-glue-point="3" draw:end-shape="id3" draw:end-glue-point="1" svg:d="M13500 13524l-6401-4400" svg:viewBox="0 0 6402 4401">
          <text:p/>
        </draw:connector>
        <draw:connector draw:name="直線コネクタ 39" draw:style-name="gr21" draw:text-style-name="P27" draw:layer="layout" draw:type="line" svg:x1="10.333cm" svg:y1="15.526cm" svg:x2="7.069cm" svg:y2="13.524cm" draw:start-shape="id2" draw:start-glue-point="0" draw:end-shape="id5" draw:end-glue-point="1" svg:d="M10333 15526l-3264-2002" svg:viewBox="0 0 3265 2003">
          <text:p/>
        </draw:connector>
        <draw:connector draw:name="直線コネクタ 41" draw:style-name="gr21" draw:text-style-name="P27" draw:layer="layout" draw:type="line" svg:x1="10.333cm" svg:y1="15.526cm" svg:x2="7.099cm" svg:y2="9.124cm" draw:start-shape="id2" draw:start-glue-point="0" draw:end-shape="id3" draw:end-glue-point="1" svg:d="M10333 15526l-3234-6402" svg:viewBox="0 0 3235 6403">
          <text:p/>
        </draw:connecto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粗鬆症の原因は？ (2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骨粗</text:span><text:span text:style-name="T22">鬆症</text:span><text:span text:style-name="T22">の原</text:span><text:span text:style-name="T22">因</text:span><text:span text:style-name="T22">は？</text:span></text:p>
          </draw:text-box>
        </draw:frame>
        <draw:custom-shape draw:name="角丸四角形 3" draw:style-name="gr22" draw:text-style-name="P29" xml:id="id9" draw:id="id9" draw:layer="layout" svg:width="5.259cm" svg:height="2.799cm" svg:x="1.84cm" svg:y="7.725cm">
          <text:p text:style-name="P28"><text:span text:style-name="T25">破骨細胞の</text:span></text:p>
          <text:p text:style-name="P28"><text:span text:style-name="T25">活性化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4" draw:style-name="gr23" draw:text-style-name="P31" xml:id="id7" draw:id="id7" draw:layer="layout" svg:width="5.259cm" svg:height="2.799cm" svg:x="7.728cm" svg:y="4.324cm">
          <text:p text:style-name="P30"><text:span text:style-name="T26">Ca/P</text:span><text:span text:style-name="T27">の欠乏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5" draw:style-name="gr24" draw:text-style-name="P29" xml:id="id10" draw:id="id10" draw:layer="layout" svg:width="5.259cm" svg:height="2.799cm" svg:x="13.506cm" svg:y="7.725cm">
          <text:p text:style-name="P28"><text:span text:style-name="T25">骨吸収と骨形成</text:span></text:p>
          <text:p text:style-name="P28"><text:span text:style-name="T25">の</text:span></text:p>
          <text:p text:style-name="P28"><text:span text:style-name="T25">アンバランス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6" draw:style-name="gr25" draw:text-style-name="P29" xml:id="id11" draw:id="id11" draw:layer="layout" svg:width="5.259cm" svg:height="2.799cm" svg:x="1.81cm" svg:y="12.125cm">
          <text:p text:style-name="P28"><text:span text:style-name="T25">エストロゲンの</text:span></text:p>
          <text:p text:style-name="P28"><text:span text:style-name="T25">欠乏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7" draw:style-name="gr26" draw:text-style-name="P29" xml:id="id8" draw:id="id8" draw:layer="layout" svg:width="5.259cm" svg:height="2.799cm" svg:x="7.704cm" svg:y="15.526cm">
          <text:p text:style-name="P28"><text:span text:style-name="T25">若年期の</text:span></text:p>
          <text:p text:style-name="P28"><text:span text:style-name="T25">骨形成不良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8" draw:style-name="gr27" draw:text-style-name="P29" xml:id="id12" draw:id="id12" draw:layer="layout" svg:width="5.259cm" svg:height="2.799cm" svg:x="13.5cm" svg:y="12.125cm">
          <text:p text:style-name="P28"><text:span text:style-name="T25">骨リモデリング</text:span></text:p>
          <text:p text:style-name="P28"><text:span text:style-name="T25">の亢進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直線コネクタ 13" draw:style-name="gr21" draw:text-style-name="P27" draw:layer="layout" draw:type="line" svg:x1="10.357cm" svg:y1="7.123cm" svg:x2="10.333cm" svg:y2="15.526cm" draw:start-shape="id7" draw:start-glue-point="2" draw:end-shape="id8" draw:end-glue-point="0" svg:d="M10357 7123l-24 8403" svg:viewBox="0 0 25 8404">
          <text:p/>
        </draw:connector>
        <draw:connector draw:name="直線コネクタ 15" draw:style-name="gr21" draw:text-style-name="P27" draw:layer="layout" draw:type="line" svg:x1="10.357cm" svg:y1="7.123cm" svg:x2="7.099cm" svg:y2="9.124cm" draw:start-shape="id7" draw:start-glue-point="2" draw:end-shape="id9" draw:end-glue-point="1" svg:d="M10357 7123l-3258 2001" svg:viewBox="0 0 3259 2002">
          <text:p/>
        </draw:connector>
        <draw:connector draw:name="直線コネクタ 17" draw:style-name="gr21" draw:text-style-name="P27" draw:layer="layout" draw:type="line" svg:x1="10.357cm" svg:y1="7.123cm" svg:x2="13.506cm" svg:y2="9.124cm" draw:start-shape="id7" draw:start-glue-point="2" draw:end-shape="id10" draw:end-glue-point="3" svg:d="M10357 7123l3149 2001" svg:viewBox="0 0 3150 2002">
          <text:p/>
        </draw:connector>
        <draw:connector draw:name="直線コネクタ 19" draw:style-name="gr21" draw:text-style-name="P27" draw:layer="layout" draw:type="line" svg:x1="10.357cm" svg:y1="7.123cm" svg:x2="7.069cm" svg:y2="13.524cm" draw:start-shape="id7" draw:start-glue-point="2" draw:end-shape="id11" draw:end-glue-point="1" svg:d="M10357 7123l-3288 6401" svg:viewBox="0 0 3289 6402">
          <text:p/>
        </draw:connector>
        <draw:connector draw:name="直線コネクタ 21" draw:style-name="gr21" draw:text-style-name="P27" draw:layer="layout" draw:type="line" svg:x1="10.357cm" svg:y1="7.123cm" svg:x2="13.5cm" svg:y2="13.524cm" draw:start-shape="id7" draw:start-glue-point="2" draw:end-shape="id12" draw:end-glue-point="3" svg:d="M10357 7123l3143 6401" svg:viewBox="0 0 3144 6402">
          <text:p/>
        </draw:connector>
        <draw:connector draw:name="直線コネクタ 23" draw:style-name="gr21" draw:text-style-name="P27" draw:layer="layout" draw:type="line" svg:x1="13.506cm" svg:y1="9.124cm" svg:x2="7.099cm" svg:y2="9.124cm" draw:start-shape="id10" draw:start-glue-point="3" draw:end-shape="id9" draw:end-glue-point="1" svg:d="M13506 9124h-6407" svg:viewBox="0 0 6408 1">
          <text:p/>
        </draw:connector>
        <draw:connector draw:name="直線コネクタ 25" draw:style-name="gr21" draw:text-style-name="P27" draw:layer="layout" draw:type="line" svg:x1="13.506cm" svg:y1="9.124cm" svg:x2="7.069cm" svg:y2="13.524cm" draw:start-shape="id10" draw:start-glue-point="3" draw:end-shape="id11" draw:end-glue-point="1" svg:d="M13506 9124l-6437 4400" svg:viewBox="0 0 6438 4401">
          <text:p/>
        </draw:connector>
        <draw:connector draw:name="直線コネクタ 27" draw:style-name="gr21" draw:text-style-name="P27" draw:layer="layout" draw:type="line" svg:x1="13.506cm" svg:y1="9.124cm" svg:x2="10.333cm" svg:y2="15.526cm" draw:start-shape="id10" draw:start-glue-point="3" draw:end-shape="id8" draw:end-glue-point="0" svg:d="M13506 9124l-3173 6402" svg:viewBox="0 0 3174 6403">
          <text:p/>
        </draw:connector>
        <draw:connector draw:name="直線コネクタ 29" draw:style-name="gr21" draw:text-style-name="P27" draw:layer="layout" draw:type="line" svg:x1="13.506cm" svg:y1="9.124cm" svg:x2="13.5cm" svg:y2="13.524cm" draw:start-shape="id10" draw:start-glue-point="3" draw:end-shape="id12" draw:end-glue-point="3" svg:d="M13506 9124l-6 4400" svg:viewBox="0 0 7 4401">
          <text:p/>
        </draw:connector>
        <draw:connector draw:name="直線コネクタ 31" draw:style-name="gr21" draw:text-style-name="P27" draw:layer="layout" draw:type="line" svg:x1="7.099cm" svg:y1="9.124cm" svg:x2="7.069cm" svg:y2="13.524cm" draw:start-shape="id9" draw:start-glue-point="1" draw:end-shape="id11" draw:end-glue-point="1" svg:d="M7099 9124l-30 4400" svg:viewBox="0 0 31 4401">
          <text:p/>
        </draw:connector>
        <draw:connector draw:name="直線コネクタ 33" draw:style-name="gr21" draw:text-style-name="P27" draw:layer="layout" draw:type="line" svg:x1="13.5cm" svg:y1="13.524cm" svg:x2="10.333cm" svg:y2="15.526cm" draw:start-shape="id12" draw:start-glue-point="3" draw:end-shape="id8" draw:end-glue-point="0" svg:d="M13500 13524l-3167 2002" svg:viewBox="0 0 3168 2003">
          <text:p/>
        </draw:connector>
        <draw:connector draw:name="直線コネクタ 35" draw:style-name="gr21" draw:text-style-name="P27" draw:layer="layout" draw:type="line" svg:x1="13.5cm" svg:y1="13.524cm" svg:x2="7.069cm" svg:y2="13.524cm" draw:start-shape="id12" draw:start-glue-point="3" draw:end-shape="id11" draw:end-glue-point="1" svg:d="M13500 13524h-6431" svg:viewBox="0 0 6432 1">
          <text:p/>
        </draw:connector>
        <draw:connector draw:name="直線コネクタ 37" draw:style-name="gr21" draw:text-style-name="P27" draw:layer="layout" draw:type="line" svg:x1="13.5cm" svg:y1="13.524cm" svg:x2="7.099cm" svg:y2="9.124cm" draw:start-shape="id12" draw:start-glue-point="3" draw:end-shape="id9" draw:end-glue-point="1" svg:d="M13500 13524l-6401-4400" svg:viewBox="0 0 6402 4401">
          <text:p/>
        </draw:connector>
        <draw:connector draw:name="直線コネクタ 39" draw:style-name="gr21" draw:text-style-name="P27" draw:layer="layout" draw:type="line" svg:x1="10.333cm" svg:y1="15.526cm" svg:x2="7.069cm" svg:y2="13.524cm" draw:start-shape="id8" draw:start-glue-point="0" draw:end-shape="id11" draw:end-glue-point="1" svg:d="M10333 15526l-3264-2002" svg:viewBox="0 0 3265 2003">
          <text:p/>
        </draw:connector>
        <draw:connector draw:name="直線コネクタ 41" draw:style-name="gr21" draw:text-style-name="P27" draw:layer="layout" draw:type="line" svg:x1="10.333cm" svg:y1="15.526cm" svg:x2="7.099cm" svg:y2="9.124cm" draw:start-shape="id8" draw:start-glue-point="0" draw:end-shape="id9" draw:end-glue-point="1" svg:d="M10333 15526l-3234-6402" svg:viewBox="0 0 3235 6403">
          <text:p/>
        </draw:connector>
        <draw:custom-shape draw:name="角丸四角形 24" draw:style-name="gr28" draw:text-style-name="P31" draw:layer="layout" svg:width="3.999cm" svg:height="1.399cm" svg:x="20.701cm" svg:y="4.724cm">
          <text:p text:style-name="P30"><text:span text:style-name="T28">PT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26" draw:style-name="gr29" draw:text-style-name="P29" draw:layer="layout" svg:width="3.999cm" svg:height="1.399cm" svg:x="20.701cm" svg:y="6.745cm">
          <text:p text:style-name="P28"><text:span text:style-name="T29">腎臓</text:span><text:span text:style-name="T19">機能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28" draw:style-name="gr30" draw:text-style-name="P3" draw:layer="layout" svg:width="3.999cm" svg:height="1.399cm" svg:x="20.701cm" svg:y="8.765cm">
          <text:p text:style-name="P22"><text:span text:style-name="T19">甲状腺機能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30" draw:style-name="gr31" draw:text-style-name="P3" draw:layer="layout" svg:width="3.999cm" svg:height="1.399cm" svg:x="20.701cm" svg:y="10.785cm">
          <text:p text:style-name="P22"><text:span text:style-name="T19">加齢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32" draw:style-name="gr32" draw:text-style-name="P3" draw:layer="layout" svg:width="3.999cm" svg:height="1.399cm" svg:x="20.701cm" svg:y="12.805cm">
          <text:p text:style-name="P22"><text:span text:style-name="T19">糖尿病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34" draw:style-name="gr33" draw:text-style-name="P33" draw:layer="layout" svg:width="3.999cm" svg:height="1.399cm" svg:x="20.701cm" svg:y="14.826cm">
          <text:p text:style-name="P32"><text:span text:style-name="T30">酸化ストレス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タイトルとコンテンツ" presentation:presentation-page-layout-name="AL1T11">
        <draw:frame draw:name="タイトル 2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骨粗</text:span><text:span text:style-name="T22">鬆症</text:span><text:span text:style-name="T22">の原</text:span><text:span text:style-name="T22">因</text:span><text:span text:style-name="T22">は？</text:span></text:p>
          </draw:text-box>
        </draw:frame>
        <draw:custom-shape draw:name="角丸四角形 1" draw:style-name="gr34" draw:text-style-name="P29" xml:id="id15" draw:id="id15" draw:layer="layout" svg:width="5.259cm" svg:height="2.799cm" svg:x="1.84cm" svg:y="7.725cm">
          <text:p text:style-name="P28"><text:span text:style-name="T25">破骨細胞の</text:span></text:p>
          <text:p text:style-name="P28"><text:span text:style-name="T25">活性化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2" draw:style-name="gr35" draw:text-style-name="P31" xml:id="id13" draw:id="id13" draw:layer="layout" svg:width="5.259cm" svg:height="2.799cm" svg:x="7.728cm" svg:y="4.324cm">
          <text:p text:style-name="P30"><text:span text:style-name="T26">Ca/P</text:span><text:span text:style-name="T27">の欠</text:span><text:span text:style-name="T27">乏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9" draw:style-name="gr36" draw:text-style-name="P29" xml:id="id16" draw:id="id16" draw:layer="layout" svg:width="5.259cm" svg:height="2.799cm" svg:x="13.506cm" svg:y="7.725cm">
          <text:p text:style-name="P28"><text:span text:style-name="T25">骨吸収と骨</text:span><text:span text:style-name="T25">形成</text:span></text:p>
          <text:p text:style-name="P28"><text:span text:style-name="T25">の</text:span></text:p>
          <text:p text:style-name="P28"><text:span text:style-name="T25">アンバラン</text:span><text:span text:style-name="T25">ス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10" draw:style-name="gr37" draw:text-style-name="P29" xml:id="id17" draw:id="id17" draw:layer="layout" svg:width="5.259cm" svg:height="2.799cm" svg:x="1.81cm" svg:y="12.125cm">
          <text:p text:style-name="P28"><text:span text:style-name="T25">エストロゲンの</text:span></text:p>
          <text:p text:style-name="P28"><text:span text:style-name="T25">欠乏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11" draw:style-name="gr38" draw:text-style-name="P29" xml:id="id14" draw:id="id14" draw:layer="layout" svg:width="5.259cm" svg:height="2.799cm" svg:x="7.704cm" svg:y="15.526cm">
          <text:p text:style-name="P28"><text:span text:style-name="T25">若年期の</text:span></text:p>
          <text:p text:style-name="P28"><text:span text:style-name="T25">骨形成不良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13" draw:style-name="gr39" draw:text-style-name="P29" xml:id="id18" draw:id="id18" draw:layer="layout" svg:width="5.259cm" svg:height="2.799cm" svg:x="13.5cm" svg:y="12.125cm">
          <text:p text:style-name="P28"><text:span text:style-name="T25">骨リモデリング</text:span></text:p>
          <text:p text:style-name="P28"><text:span text:style-name="T25">の亢進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直線コネクタ 1" draw:style-name="gr21" draw:text-style-name="P27" draw:layer="layout" draw:type="line" svg:x1="10.357cm" svg:y1="7.123cm" svg:x2="10.333cm" svg:y2="15.526cm" draw:start-shape="id13" draw:start-glue-point="2" draw:end-shape="id14" draw:end-glue-point="0" svg:d="M10357 7123l-24 8403" svg:viewBox="0 0 25 8404">
          <text:p/>
        </draw:connector>
        <draw:connector draw:name="直線コネクタ 2" draw:style-name="gr21" draw:text-style-name="P27" draw:layer="layout" draw:type="line" svg:x1="10.357cm" svg:y1="7.123cm" svg:x2="7.099cm" svg:y2="9.124cm" draw:start-shape="id13" draw:start-glue-point="2" draw:end-shape="id15" draw:end-glue-point="1" svg:d="M10357 7123l-3258 2001" svg:viewBox="0 0 3259 2002">
          <text:p/>
        </draw:connector>
        <draw:connector draw:name="直線コネクタ 3" draw:style-name="gr21" draw:text-style-name="P27" draw:layer="layout" draw:type="line" svg:x1="10.357cm" svg:y1="7.123cm" svg:x2="13.506cm" svg:y2="9.124cm" draw:start-shape="id13" draw:start-glue-point="2" draw:end-shape="id16" draw:end-glue-point="3" svg:d="M10357 7123l3149 2001" svg:viewBox="0 0 3150 2002">
          <text:p/>
        </draw:connector>
        <draw:connector draw:name="直線コネクタ 4" draw:style-name="gr21" draw:text-style-name="P27" draw:layer="layout" draw:type="line" svg:x1="10.357cm" svg:y1="7.123cm" svg:x2="7.069cm" svg:y2="13.524cm" draw:start-shape="id13" draw:start-glue-point="2" draw:end-shape="id17" draw:end-glue-point="1" svg:d="M10357 7123l-3288 6401" svg:viewBox="0 0 3289 6402">
          <text:p/>
        </draw:connector>
        <draw:connector draw:name="直線コネクタ 5" draw:style-name="gr21" draw:text-style-name="P27" draw:layer="layout" draw:type="line" svg:x1="10.357cm" svg:y1="7.123cm" svg:x2="13.5cm" svg:y2="13.524cm" draw:start-shape="id13" draw:start-glue-point="2" draw:end-shape="id18" draw:end-glue-point="3" svg:d="M10357 7123l3143 6401" svg:viewBox="0 0 3144 6402">
          <text:p/>
        </draw:connector>
        <draw:connector draw:name="直線コネクタ 6" draw:style-name="gr21" draw:text-style-name="P27" draw:layer="layout" draw:type="line" svg:x1="13.506cm" svg:y1="9.124cm" svg:x2="7.099cm" svg:y2="9.124cm" draw:start-shape="id16" draw:start-glue-point="3" draw:end-shape="id15" draw:end-glue-point="1" svg:d="M13506 9124h-6407" svg:viewBox="0 0 6408 1">
          <text:p/>
        </draw:connector>
        <draw:connector draw:name="直線コネクタ 20" draw:style-name="gr21" draw:text-style-name="P27" draw:layer="layout" draw:type="line" svg:x1="13.506cm" svg:y1="9.124cm" svg:x2="7.069cm" svg:y2="13.524cm" draw:start-shape="id16" draw:start-glue-point="3" draw:end-shape="id17" draw:end-glue-point="1" svg:d="M13506 9124l-6437 4400" svg:viewBox="0 0 6438 4401">
          <text:p/>
        </draw:connector>
        <draw:connector draw:name="直線コネクタ 22" draw:style-name="gr21" draw:text-style-name="P27" draw:layer="layout" draw:type="line" svg:x1="13.506cm" svg:y1="9.124cm" svg:x2="10.333cm" svg:y2="15.526cm" draw:start-shape="id16" draw:start-glue-point="3" draw:end-shape="id14" draw:end-glue-point="0" svg:d="M13506 9124l-3173 6402" svg:viewBox="0 0 3174 6403">
          <text:p/>
        </draw:connector>
        <draw:connector draw:name="直線コネクタ 24" draw:style-name="gr21" draw:text-style-name="P27" draw:layer="layout" draw:type="line" svg:x1="13.506cm" svg:y1="9.124cm" svg:x2="13.5cm" svg:y2="13.524cm" draw:start-shape="id16" draw:start-glue-point="3" draw:end-shape="id18" draw:end-glue-point="3" svg:d="M13506 9124l-6 4400" svg:viewBox="0 0 7 4401">
          <text:p/>
        </draw:connector>
        <draw:connector draw:name="直線コネクタ 26" draw:style-name="gr21" draw:text-style-name="P27" draw:layer="layout" draw:type="line" svg:x1="7.099cm" svg:y1="9.124cm" svg:x2="7.069cm" svg:y2="13.524cm" draw:start-shape="id15" draw:start-glue-point="1" draw:end-shape="id17" draw:end-glue-point="1" svg:d="M7099 9124l-30 4400" svg:viewBox="0 0 31 4401">
          <text:p/>
        </draw:connector>
        <draw:connector draw:name="直線コネクタ 28" draw:style-name="gr21" draw:text-style-name="P27" draw:layer="layout" draw:type="line" svg:x1="13.5cm" svg:y1="13.524cm" svg:x2="10.333cm" svg:y2="15.526cm" draw:start-shape="id18" draw:start-glue-point="3" draw:end-shape="id14" draw:end-glue-point="0" svg:d="M13500 13524l-3167 2002" svg:viewBox="0 0 3168 2003">
          <text:p/>
        </draw:connector>
        <draw:connector draw:name="直線コネクタ 30" draw:style-name="gr21" draw:text-style-name="P27" draw:layer="layout" draw:type="line" svg:x1="13.5cm" svg:y1="13.524cm" svg:x2="7.069cm" svg:y2="13.524cm" draw:start-shape="id18" draw:start-glue-point="3" draw:end-shape="id17" draw:end-glue-point="1" svg:d="M13500 13524h-6431" svg:viewBox="0 0 6432 1">
          <text:p/>
        </draw:connector>
        <draw:connector draw:name="直線コネクタ 32" draw:style-name="gr21" draw:text-style-name="P27" draw:layer="layout" draw:type="line" svg:x1="13.5cm" svg:y1="13.524cm" svg:x2="7.099cm" svg:y2="9.124cm" draw:start-shape="id18" draw:start-glue-point="3" draw:end-shape="id15" draw:end-glue-point="1" svg:d="M13500 13524l-6401-4400" svg:viewBox="0 0 6402 4401">
          <text:p/>
        </draw:connector>
        <draw:connector draw:name="直線コネクタ 34" draw:style-name="gr21" draw:text-style-name="P27" draw:layer="layout" draw:type="line" svg:x1="10.333cm" svg:y1="15.526cm" svg:x2="7.069cm" svg:y2="13.524cm" draw:start-shape="id14" draw:start-glue-point="0" draw:end-shape="id17" draw:end-glue-point="1" svg:d="M10333 15526l-3264-2002" svg:viewBox="0 0 3265 2003">
          <text:p/>
        </draw:connector>
        <draw:connector draw:name="直線コネクタ 36" draw:style-name="gr21" draw:text-style-name="P27" draw:layer="layout" draw:type="line" svg:x1="10.333cm" svg:y1="15.526cm" svg:x2="7.099cm" svg:y2="9.124cm" draw:start-shape="id14" draw:start-glue-point="0" draw:end-shape="id15" draw:end-glue-point="1" svg:d="M10333 15526l-3234-6402" svg:viewBox="0 0 3235 6403">
          <text:p/>
        </draw:connector>
        <draw:custom-shape draw:name="角丸四角形 14" draw:style-name="gr40" draw:text-style-name="P31" draw:layer="layout" svg:width="3.999cm" svg:height="1.399cm" svg:x="20.701cm" svg:y="4.724cm">
          <text:p text:style-name="P30"><text:span text:style-name="T28">PT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15" draw:style-name="gr41" draw:text-style-name="P29" draw:layer="layout" svg:width="3.999cm" svg:height="1.399cm" svg:x="20.701cm" svg:y="6.745cm">
          <text:p text:style-name="P28"><text:span text:style-name="T29">腎臓</text:span><text:span text:style-name="T19">機能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17" draw:style-name="gr42" draw:text-style-name="P3" draw:layer="layout" svg:width="3.999cm" svg:height="1.399cm" svg:x="20.701cm" svg:y="8.765cm">
          <text:p text:style-name="P22"><text:span text:style-name="T19">甲状腺機能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18" draw:style-name="gr43" draw:text-style-name="P3" draw:layer="layout" svg:width="3.999cm" svg:height="1.399cm" svg:x="20.701cm" svg:y="10.785cm">
          <text:p text:style-name="P22"><text:span text:style-name="T19">加齢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19" draw:style-name="gr44" draw:text-style-name="P3" draw:layer="layout" svg:width="3.999cm" svg:height="1.399cm" svg:x="20.701cm" svg:y="12.805cm">
          <text:p text:style-name="P22"><text:span text:style-name="T19">糖尿病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20" draw:style-name="gr45" draw:text-style-name="P33" draw:layer="layout" svg:width="3.999cm" svg:height="1.399cm" svg:x="20.701cm" svg:y="14.826cm">
          <text:p text:style-name="P32"><text:span text:style-name="T30">酸化ストレス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21" draw:style-name="gr46" draw:text-style-name="P3" draw:layer="layout" svg:width="3.999cm" svg:height="1.999cm" svg:x="20.7cm" svg:y="16.926cm">
          <text:p text:style-name="P22"><text:span text:style-name="T31">その他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吹き出し 1" draw:style-name="gr47" draw:text-style-name="P35" draw:layer="layout" svg:width="4.199cm" svg:height="1.599cm" svg:x="15.699cm" svg:y="16.926cm">
          <text:p text:style-name="P34"><text:span text:style-name="T32">RA</text:span><text:span text:style-name="T33">などの</text:span></text:p>
          <text:p text:style-name="P34"><text:span text:style-name="T33">炎症性疾患</text:span></text:p>
          <draw:enhanced-geometry draw:mirror-horizontal="false" draw:mirror-vertical="false" svg:viewBox="0 0 0 0" draw:text-areas="?f38 ?f38 ?f39 ?f40" draw:type="ooxml-wedgeRoundRectCallout" draw:modifiers="67086 1655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presentation:notes draw:style-name="dp4">
          <draw:page-thumbnail draw:style-name="gr2" draw:layer="layout" svg:width="0.001cm" svg:height="0.001cm" svg:x="0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粗鬆症の原因は？ (4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骨粗</text:span><text:span text:style-name="T22">鬆症</text:span><text:span text:style-name="T22">の原</text:span><text:span text:style-name="T22">因</text:span><text:span text:style-name="T22">は？</text:span></text:p>
          </draw:text-box>
        </draw:frame>
        <draw:custom-shape draw:name="角丸四角形 3" draw:style-name="gr48" draw:text-style-name="P29" xml:id="id21" draw:id="id21" draw:layer="layout" svg:width="5.259cm" svg:height="2.799cm" svg:x="1.84cm" svg:y="7.725cm">
          <text:p text:style-name="P28"><text:span text:style-name="T25">破骨細胞の</text:span></text:p>
          <text:p text:style-name="P28"><text:span text:style-name="T25">活性化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4" draw:style-name="gr49" draw:text-style-name="P31" xml:id="id19" draw:id="id19" draw:layer="layout" svg:width="5.259cm" svg:height="2.799cm" svg:x="7.728cm" svg:y="4.324cm">
          <text:p text:style-name="P30"><text:span text:style-name="T26">Ca/P</text:span><text:span text:style-name="T27">の欠乏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5" draw:style-name="gr50" draw:text-style-name="P29" xml:id="id22" draw:id="id22" draw:layer="layout" svg:width="5.259cm" svg:height="2.799cm" svg:x="13.506cm" svg:y="7.725cm">
          <text:p text:style-name="P28"><text:span text:style-name="T25">骨吸収と骨形成</text:span></text:p>
          <text:p text:style-name="P28"><text:span text:style-name="T25">の</text:span></text:p>
          <text:p text:style-name="P28"><text:span text:style-name="T25">アンバランス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6" draw:style-name="gr51" draw:text-style-name="P29" xml:id="id23" draw:id="id23" draw:layer="layout" svg:width="5.259cm" svg:height="2.799cm" svg:x="1.81cm" svg:y="12.125cm">
          <text:p text:style-name="P28"><text:span text:style-name="T25">エストロゲンの</text:span></text:p>
          <text:p text:style-name="P28"><text:span text:style-name="T25">欠乏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7" draw:style-name="gr52" draw:text-style-name="P29" xml:id="id20" draw:id="id20" draw:layer="layout" svg:width="5.259cm" svg:height="2.799cm" svg:x="7.704cm" svg:y="15.526cm">
          <text:p text:style-name="P28"><text:span text:style-name="T25">若年期の</text:span></text:p>
          <text:p text:style-name="P28"><text:span text:style-name="T25">骨形成不良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8" draw:style-name="gr53" draw:text-style-name="P29" xml:id="id24" draw:id="id24" draw:layer="layout" svg:width="5.259cm" svg:height="2.799cm" svg:x="13.5cm" svg:y="12.125cm">
          <text:p text:style-name="P28"><text:span text:style-name="T34">骨リモデリング</text:span></text:p>
          <text:p text:style-name="P28"><text:span text:style-name="T34">の亢進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直線コネクタ 13" draw:style-name="gr21" draw:text-style-name="P27" draw:layer="layout" draw:type="line" svg:x1="10.357cm" svg:y1="7.123cm" svg:x2="10.333cm" svg:y2="15.526cm" draw:start-shape="id19" draw:start-glue-point="2" draw:end-shape="id20" draw:end-glue-point="0" svg:d="M10357 7123l-24 8403" svg:viewBox="0 0 25 8404">
          <text:p/>
        </draw:connector>
        <draw:connector draw:name="直線コネクタ 15" draw:style-name="gr21" draw:text-style-name="P27" draw:layer="layout" draw:type="line" svg:x1="10.357cm" svg:y1="7.123cm" svg:x2="7.099cm" svg:y2="9.124cm" draw:start-shape="id19" draw:start-glue-point="2" draw:end-shape="id21" draw:end-glue-point="1" svg:d="M10357 7123l-3258 2001" svg:viewBox="0 0 3259 2002">
          <text:p/>
        </draw:connector>
        <draw:connector draw:name="直線コネクタ 17" draw:style-name="gr21" draw:text-style-name="P27" draw:layer="layout" draw:type="line" svg:x1="10.357cm" svg:y1="7.123cm" svg:x2="13.506cm" svg:y2="9.124cm" draw:start-shape="id19" draw:start-glue-point="2" draw:end-shape="id22" draw:end-glue-point="3" svg:d="M10357 7123l3149 2001" svg:viewBox="0 0 3150 2002">
          <text:p/>
        </draw:connector>
        <draw:connector draw:name="直線コネクタ 19" draw:style-name="gr21" draw:text-style-name="P27" draw:layer="layout" draw:type="line" svg:x1="10.357cm" svg:y1="7.123cm" svg:x2="7.069cm" svg:y2="13.524cm" draw:start-shape="id19" draw:start-glue-point="2" draw:end-shape="id23" draw:end-glue-point="1" svg:d="M10357 7123l-3288 6401" svg:viewBox="0 0 3289 6402">
          <text:p/>
        </draw:connector>
        <draw:connector draw:name="直線コネクタ 21" draw:style-name="gr21" draw:text-style-name="P27" draw:layer="layout" draw:type="line" svg:x1="10.357cm" svg:y1="7.123cm" svg:x2="13.5cm" svg:y2="13.524cm" draw:start-shape="id19" draw:start-glue-point="2" draw:end-shape="id24" draw:end-glue-point="3" svg:d="M10357 7123l3143 6401" svg:viewBox="0 0 3144 6402">
          <text:p/>
        </draw:connector>
        <draw:connector draw:name="直線コネクタ 23" draw:style-name="gr21" draw:text-style-name="P27" draw:layer="layout" draw:type="line" svg:x1="13.506cm" svg:y1="9.124cm" svg:x2="7.099cm" svg:y2="9.124cm" draw:start-shape="id22" draw:start-glue-point="3" draw:end-shape="id21" draw:end-glue-point="1" svg:d="M13506 9124h-6407" svg:viewBox="0 0 6408 1">
          <text:p/>
        </draw:connector>
        <draw:connector draw:name="直線コネクタ 25" draw:style-name="gr21" draw:text-style-name="P27" draw:layer="layout" draw:type="line" svg:x1="13.506cm" svg:y1="9.124cm" svg:x2="7.069cm" svg:y2="13.524cm" draw:start-shape="id22" draw:start-glue-point="3" draw:end-shape="id23" draw:end-glue-point="1" svg:d="M13506 9124l-6437 4400" svg:viewBox="0 0 6438 4401">
          <text:p/>
        </draw:connector>
        <draw:connector draw:name="直線コネクタ 27" draw:style-name="gr21" draw:text-style-name="P27" draw:layer="layout" draw:type="line" svg:x1="13.506cm" svg:y1="9.124cm" svg:x2="10.333cm" svg:y2="15.526cm" draw:start-shape="id22" draw:start-glue-point="3" draw:end-shape="id20" draw:end-glue-point="0" svg:d="M13506 9124l-3173 6402" svg:viewBox="0 0 3174 6403">
          <text:p/>
        </draw:connector>
        <draw:connector draw:name="直線コネクタ 29" draw:style-name="gr21" draw:text-style-name="P27" draw:layer="layout" draw:type="line" svg:x1="13.506cm" svg:y1="9.124cm" svg:x2="13.5cm" svg:y2="13.524cm" draw:start-shape="id22" draw:start-glue-point="3" draw:end-shape="id24" draw:end-glue-point="3" svg:d="M13506 9124l-6 4400" svg:viewBox="0 0 7 4401">
          <text:p/>
        </draw:connector>
        <draw:connector draw:name="直線コネクタ 31" draw:style-name="gr21" draw:text-style-name="P27" draw:layer="layout" draw:type="line" svg:x1="7.099cm" svg:y1="9.124cm" svg:x2="7.069cm" svg:y2="13.524cm" draw:start-shape="id21" draw:start-glue-point="1" draw:end-shape="id23" draw:end-glue-point="1" svg:d="M7099 9124l-30 4400" svg:viewBox="0 0 31 4401">
          <text:p/>
        </draw:connector>
        <draw:connector draw:name="直線コネクタ 33" draw:style-name="gr21" draw:text-style-name="P27" draw:layer="layout" draw:type="line" svg:x1="13.5cm" svg:y1="13.524cm" svg:x2="10.333cm" svg:y2="15.526cm" draw:start-shape="id24" draw:start-glue-point="3" draw:end-shape="id20" draw:end-glue-point="0" svg:d="M13500 13524l-3167 2002" svg:viewBox="0 0 3168 2003">
          <text:p/>
        </draw:connector>
        <draw:connector draw:name="直線コネクタ 35" draw:style-name="gr21" draw:text-style-name="P27" draw:layer="layout" draw:type="line" svg:x1="13.5cm" svg:y1="13.524cm" svg:x2="7.069cm" svg:y2="13.524cm" draw:start-shape="id24" draw:start-glue-point="3" draw:end-shape="id23" draw:end-glue-point="1" svg:d="M13500 13524h-6431" svg:viewBox="0 0 6432 1">
          <text:p/>
        </draw:connector>
        <draw:connector draw:name="直線コネクタ 37" draw:style-name="gr21" draw:text-style-name="P27" draw:layer="layout" draw:type="line" svg:x1="13.5cm" svg:y1="13.524cm" svg:x2="7.099cm" svg:y2="9.124cm" draw:start-shape="id24" draw:start-glue-point="3" draw:end-shape="id21" draw:end-glue-point="1" svg:d="M13500 13524l-6401-4400" svg:viewBox="0 0 6402 4401">
          <text:p/>
        </draw:connector>
        <draw:connector draw:name="直線コネクタ 39" draw:style-name="gr21" draw:text-style-name="P27" draw:layer="layout" draw:type="line" svg:x1="10.333cm" svg:y1="15.526cm" svg:x2="7.069cm" svg:y2="13.524cm" draw:start-shape="id20" draw:start-glue-point="0" draw:end-shape="id23" draw:end-glue-point="1" svg:d="M10333 15526l-3264-2002" svg:viewBox="0 0 3265 2003">
          <text:p/>
        </draw:connector>
        <draw:connector draw:name="直線コネクタ 41" draw:style-name="gr21" draw:text-style-name="P27" draw:layer="layout" draw:type="line" svg:x1="10.333cm" svg:y1="15.526cm" svg:x2="7.099cm" svg:y2="9.124cm" draw:start-shape="id20" draw:start-glue-point="0" draw:end-shape="id21" draw:end-glue-point="1" svg:d="M10333 15526l-3234-6402" svg:viewBox="0 0 3235 6403">
          <text:p/>
        </draw:connector>
        <draw:custom-shape draw:name="角丸四角形 24" draw:style-name="gr54" draw:text-style-name="P31" draw:layer="layout" svg:width="3.999cm" svg:height="1.399cm" svg:x="20.701cm" svg:y="4.724cm">
          <text:p text:style-name="P30"><text:span text:style-name="T28">PT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26" draw:style-name="gr55" draw:text-style-name="P29" draw:layer="layout" svg:width="3.999cm" svg:height="1.399cm" svg:x="20.701cm" svg:y="6.745cm">
          <text:p text:style-name="P28"><text:span text:style-name="T29">腎臓機能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28" draw:style-name="gr56" draw:text-style-name="P29" draw:layer="layout" svg:width="3.999cm" svg:height="1.399cm" svg:x="20.701cm" svg:y="8.765cm">
          <text:p text:style-name="P28"><text:span text:style-name="T29">甲状腺機能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30" draw:style-name="gr57" draw:text-style-name="P29" draw:layer="layout" svg:width="3.999cm" svg:height="1.399cm" svg:x="20.701cm" svg:y="10.785cm">
          <text:p text:style-name="P28"><text:span text:style-name="T29">加齢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32" draw:style-name="gr58" draw:text-style-name="P29" draw:layer="layout" svg:width="3.999cm" svg:height="1.399cm" svg:x="20.701cm" svg:y="12.805cm">
          <text:p text:style-name="P28"><text:span text:style-name="T29">糖尿病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34" draw:style-name="gr59" draw:text-style-name="P29" draw:layer="layout" svg:width="3.999cm" svg:height="1.399cm" svg:x="20.701cm" svg:y="14.826cm">
          <text:p text:style-name="P28"><text:span text:style-name="T29">酸化ストレス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 36" draw:style-name="gr60" draw:text-style-name="P29" draw:layer="layout" svg:width="3.999cm" svg:height="1.999cm" svg:x="20.701cm" svg:y="16.926cm">
          <text:p text:style-name="P28"><text:span text:style-name="T29">その他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角丸四角形吹き出し 2" draw:style-name="gr61" draw:text-style-name="P31" draw:layer="layout" svg:width="4.199cm" svg:height="1.599cm" svg:x="15.7cm" svg:y="16.926cm">
          <text:p text:style-name="P30"><text:span text:style-name="T35">RA</text:span><text:span text:style-name="T36">などの</text:span></text:p>
          <text:p text:style-name="P30"><text:span text:style-name="T36">炎症性疾患</text:span></text:p>
          <draw:enhanced-geometry draw:mirror-horizontal="false" draw:mirror-vertical="false" svg:viewBox="0 0 0 0" draw:text-areas="?f38 ?f38 ?f39 ?f40" draw:type="ooxml-wedgeRoundRectCallout" draw:modifiers="67086 1655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リモデリング" draw:style-name="dp3" draw:master-page-name="タイトルとコンテンツ" presentation:presentation-page-layout-name="AL1T11">
        <draw:frame draw:name="タイトル 1" presentation:style-name="pr4" draw:text-style-name="P37" draw:layer="layout" svg:width="22.859cm" svg:height="3.174cm" svg:x="1.27cm" svg:y="0.763cm" presentation:class="title" presentation:user-transformed="true">
          <draw:text-box>
            <text:p text:style-name="P36"><text:span text:style-name="T2">骨リ</text:span><text:span text:style-name="T2">モデ</text:span><text:span text:style-name="T2">リン</text:span><text:span text:style-name="T2">グ</text:span></text:p>
          </draw:text-box>
        </draw:frame>
        <draw:custom-shape draw:name="角丸四角形 3" draw:style-name="gr62" draw:text-style-name="P38" draw:layer="layout" svg:width="10.6cm" svg:height="6.2cm" svg:x="2.899cm" svg:y="11.3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g draw:name="グループ化 13" draw:style-name="gr63">
          <draw:custom-shape draw:name="弦 3" draw:style-name="gr64" draw:text-style-name="P38" draw:layer="layout" svg:width="2.372cm" svg:height="2.675cm" draw:transform="rotate (-1.96611340237161) translate (6.49cm 9.357cm)">
            <text:p/>
            <draw:enhanced-geometry draw:mirror-horizontal="false" draw:mirror-vertical="false" svg:viewBox="0 0 0 0" draw:glue-points="?f50 ?f51 ?f52 ?f53 ?f54 ?f55 ?f56 ?f57" drawooo:sub-view-size="1830936 2065291" draw:text-areas="0 0 ?f58 ?f59" draw:type="ooxml-non-primitive" draw:enhanced-path="M 1830936 1771861 C 1488515 2091834 969709 2157249 553839 1932887 118819 1698193 -93718 1206332 39355 742253 169018 290066 503189 -23836 1098058 1421 N">
              <draw:equation draw:name="f0" draw:formula="1830827*logwidth/2160240"/>
              <draw:equation draw:name="f1" draw:formula="1794823*logheight/2088232"/>
              <draw:equation draw:name="f2" draw:formula="553730*logwidth/2160240"/>
              <draw:equation draw:name="f3" draw:formula="1955849*logheight/2088232"/>
              <draw:equation draw:name="f4" draw:formula="39246*logwidth/2160240"/>
              <draw:equation draw:name="f5" draw:formula="765215*logheight/2088232"/>
              <draw:equation draw:name="f6" draw:formula="1080119*logwidth/2160240"/>
              <draw:equation draw:name="f7" draw:formula="0*logheight/2088232"/>
              <draw:equation draw:name="f8" draw:formula="1830827*logwidth/2160240"/>
              <draw:equation draw:name="f9" draw:formula="1794823*logheight/2088232"/>
              <draw:equation draw:name="f10" draw:formula="1830936*logwidth/1830936"/>
              <draw:equation draw:name="f11" draw:formula="1719294*logheight/2012724"/>
              <draw:equation draw:name="f12" draw:formula="553839*logwidth/1830936"/>
              <draw:equation draw:name="f13" draw:formula="1880320*logheight/2012724"/>
              <draw:equation draw:name="f14" draw:formula="39355*logwidth/1830936"/>
              <draw:equation draw:name="f15" draw:formula="689686*logheight/2012724"/>
              <draw:equation draw:name="f16" draw:formula="1171668*logwidth/1830936"/>
              <draw:equation draw:name="f17" draw:formula="15911*logheight/2012724"/>
              <draw:equation draw:name="f18" draw:formula="1830936*logwidth/1830936"/>
              <draw:equation draw:name="f19" draw:formula="1701499*logheight/1994929"/>
              <draw:equation draw:name="f20" draw:formula="553839*logwidth/1830936"/>
              <draw:equation draw:name="f21" draw:formula="1862525*logheight/1994929"/>
              <draw:equation draw:name="f22" draw:formula="39355*logwidth/1830936"/>
              <draw:equation draw:name="f23" draw:formula="671891*logheight/1994929"/>
              <draw:equation draw:name="f24" draw:formula="1127254*logwidth/1830936"/>
              <draw:equation draw:name="f25" draw:formula="16650*logheight/1994929"/>
              <draw:equation draw:name="f26" draw:formula="1830936*logwidth/1830936"/>
              <draw:equation draw:name="f27" draw:formula="1773817*logheight/2067247"/>
              <draw:equation draw:name="f28" draw:formula="553839*logwidth/1830936"/>
              <draw:equation draw:name="f29" draw:formula="1934843*logheight/2067247"/>
              <draw:equation draw:name="f30" draw:formula="39355*logwidth/1830936"/>
              <draw:equation draw:name="f31" draw:formula="744209*logheight/2067247"/>
              <draw:equation draw:name="f32" draw:formula="1135082*logwidth/1830936"/>
              <draw:equation draw:name="f33" draw:formula="13999*logheight/2067247"/>
              <draw:equation draw:name="f34" draw:formula="1830936*logwidth/1830936"/>
              <draw:equation draw:name="f35" draw:formula="1761285*logheight/2054715"/>
              <draw:equation draw:name="f36" draw:formula="553839*logwidth/1830936"/>
              <draw:equation draw:name="f37" draw:formula="1922311*logheight/2054715"/>
              <draw:equation draw:name="f38" draw:formula="39355*logwidth/1830936"/>
              <draw:equation draw:name="f39" draw:formula="731677*logheight/2054715"/>
              <draw:equation draw:name="f40" draw:formula="1135082*logwidth/1830936"/>
              <draw:equation draw:name="f41" draw:formula="1467*logheight/2054715"/>
              <draw:equation draw:name="f42" draw:formula="1830936*logwidth/1830936"/>
              <draw:equation draw:name="f43" draw:formula="1759414*logheight/2052844"/>
              <draw:equation draw:name="f44" draw:formula="553839*logwidth/1830936"/>
              <draw:equation draw:name="f45" draw:formula="1920440*logheight/2052844"/>
              <draw:equation draw:name="f46" draw:formula="39355*logwidth/1830936"/>
              <draw:equation draw:name="f47" draw:formula="729806*logheight/2052844"/>
              <draw:equation draw:name="f48" draw:formula="1083718*logwidth/1830936"/>
              <draw:equation draw:name="f49" draw:formula="1475*logheight/2052844"/>
              <draw:equation draw:name="f50" draw:formula="1830936*logwidth/1830936"/>
              <draw:equation draw:name="f51" draw:formula="1771861*logheight/2065291"/>
              <draw:equation draw:name="f52" draw:formula="553839*logwidth/1830936"/>
              <draw:equation draw:name="f53" draw:formula="1932887*logheight/2065291"/>
              <draw:equation draw:name="f54" draw:formula="39355*logwidth/1830936"/>
              <draw:equation draw:name="f55" draw:formula="742253*logheight/2065291"/>
              <draw:equation draw:name="f56" draw:formula="1098058*logwidth/1830936"/>
              <draw:equation draw:name="f57" draw:formula="1421*logheight/2065291"/>
              <draw:equation draw:name="f58" draw:formula="logwidth"/>
              <draw:equation draw:name="f59" draw:formula="logheight"/>
            </draw:enhanced-geometry>
          </draw:custom-shape>
          <draw:custom-shape draw:name="フリーフォーム 5" draw:style-name="gr64" draw:text-style-name="P38" draw:layer="layout" svg:width="2.514cm" svg:height="0.654cm" svg:x="3.441cm" svg:y="10.633cm">
            <text:p/>
            <draw:enhanced-geometry draw:mirror-horizontal="false" draw:mirror-vertical="false" svg:viewBox="0 0 0 0" draw:glue-points="?f0 ?f1 ?f2 ?f3 ?f4 ?f5 ?f6 ?f7 ?f8 ?f9 ?f10 ?f11 ?f12 ?f13 ?f14 ?f15 ?f16 ?f17" drawooo:sub-view-size="5762625 1443037" draw:text-areas="0 0 ?f18 ?f19" draw:type="ooxml-non-primitive" draw:enhanced-path="M 0 4762 C 241697 721518 483394 1438275 723900 1438275 964406 1438275 1203325 3968 1443037 4762 1682749 5556 1921669 1443831 2162175 1443037 2402681 1442243 2646363 0 2886075 0 3125787 0 3359944 1443037 3600450 1443037 3840956 1443037 4087812 794 4329112 0 4570412 -794 4809331 1437481 5048250 1438275 5287169 1439069 5524897 721915 5762625 4762 N">
              <draw:equation draw:name="f0" draw:formula="0*logwidth/5762625"/>
              <draw:equation draw:name="f1" draw:formula="4762*logheight/1443037"/>
              <draw:equation draw:name="f2" draw:formula="723900*logwidth/5762625"/>
              <draw:equation draw:name="f3" draw:formula="1438275*logheight/1443037"/>
              <draw:equation draw:name="f4" draw:formula="1443037*logwidth/5762625"/>
              <draw:equation draw:name="f5" draw:formula="4762*logheight/1443037"/>
              <draw:equation draw:name="f6" draw:formula="2162175*logwidth/5762625"/>
              <draw:equation draw:name="f7" draw:formula="1443037*logheight/1443037"/>
              <draw:equation draw:name="f8" draw:formula="2886075*logwidth/5762625"/>
              <draw:equation draw:name="f9" draw:formula="0*logheight/1443037"/>
              <draw:equation draw:name="f10" draw:formula="3600450*logwidth/5762625"/>
              <draw:equation draw:name="f11" draw:formula="1443037*logheight/1443037"/>
              <draw:equation draw:name="f12" draw:formula="4329112*logwidth/5762625"/>
              <draw:equation draw:name="f13" draw:formula="0*logheight/1443037"/>
              <draw:equation draw:name="f14" draw:formula="5048250*logwidth/5762625"/>
              <draw:equation draw:name="f15" draw:formula="1438275*logheight/1443037"/>
              <draw:equation draw:name="f16" draw:formula="5762625*logwidth/5762625"/>
              <draw:equation draw:name="f17" draw:formula="4762*logheight/1443037"/>
              <draw:equation draw:name="f18" draw:formula="logwidth"/>
              <draw:equation draw:name="f19" draw:formula="logheight"/>
            </draw:enhanced-geometry>
          </draw:custom-shape>
        </draw:g>
        <draw:custom-shape draw:name="テキスト ボックス 14" draw:style-name="gr65" draw:text-style-name="P40" draw:layer="layout" svg:width="3.482cm" svg:height="1.013cm" svg:x="2.017cm" svg:y="7.699cm">
          <text:p text:style-name="P39"><text:span text:style-name="T1">破骨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" draw:style-name="gr66" draw:text-style-name="P40" draw:layer="layout" svg:width="8cm" svg:height="1.944cm" svg:x="14.7cm" svg:y="5.525cm">
          <text:p text:style-name="P39"><text:span text:style-name="T37">骨吸収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リモデリング (2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骨リ</text:span><text:span text:style-name="T22">モデ</text:span><text:span text:style-name="T22">リン</text:span><text:span text:style-name="T22">グ</text:span></text:p>
          </draw:text-box>
        </draw:frame>
        <draw:custom-shape draw:name="角丸四角形 3" draw:style-name="gr62" draw:text-style-name="P38" draw:layer="layout" svg:width="10.6cm" svg:height="6.2cm" svg:x="2.899cm" svg:y="11.3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g draw:name="グループ化 13" draw:style-name="gr63">
          <draw:custom-shape draw:name="弦 3" draw:style-name="gr64" draw:text-style-name="P38" draw:layer="layout" svg:width="2.372cm" svg:height="2.675cm" draw:transform="rotate (-1.96611340237161) translate (6.49cm 9.357cm)">
            <text:p/>
            <draw:enhanced-geometry draw:mirror-horizontal="false" draw:mirror-vertical="false" svg:viewBox="0 0 0 0" draw:glue-points="?f50 ?f51 ?f52 ?f53 ?f54 ?f55 ?f56 ?f57" drawooo:sub-view-size="1830936 2065291" draw:text-areas="0 0 ?f58 ?f59" draw:type="ooxml-non-primitive" draw:enhanced-path="M 1830936 1771861 C 1488515 2091834 969709 2157249 553839 1932887 118819 1698193 -93718 1206332 39355 742253 169018 290066 503189 -23836 1098058 1421 N">
              <draw:equation draw:name="f0" draw:formula="1830827*logwidth/2160240"/>
              <draw:equation draw:name="f1" draw:formula="1794823*logheight/2088232"/>
              <draw:equation draw:name="f2" draw:formula="553730*logwidth/2160240"/>
              <draw:equation draw:name="f3" draw:formula="1955849*logheight/2088232"/>
              <draw:equation draw:name="f4" draw:formula="39246*logwidth/2160240"/>
              <draw:equation draw:name="f5" draw:formula="765215*logheight/2088232"/>
              <draw:equation draw:name="f6" draw:formula="1080119*logwidth/2160240"/>
              <draw:equation draw:name="f7" draw:formula="0*logheight/2088232"/>
              <draw:equation draw:name="f8" draw:formula="1830827*logwidth/2160240"/>
              <draw:equation draw:name="f9" draw:formula="1794823*logheight/2088232"/>
              <draw:equation draw:name="f10" draw:formula="1830936*logwidth/1830936"/>
              <draw:equation draw:name="f11" draw:formula="1719294*logheight/2012724"/>
              <draw:equation draw:name="f12" draw:formula="553839*logwidth/1830936"/>
              <draw:equation draw:name="f13" draw:formula="1880320*logheight/2012724"/>
              <draw:equation draw:name="f14" draw:formula="39355*logwidth/1830936"/>
              <draw:equation draw:name="f15" draw:formula="689686*logheight/2012724"/>
              <draw:equation draw:name="f16" draw:formula="1171668*logwidth/1830936"/>
              <draw:equation draw:name="f17" draw:formula="15911*logheight/2012724"/>
              <draw:equation draw:name="f18" draw:formula="1830936*logwidth/1830936"/>
              <draw:equation draw:name="f19" draw:formula="1701499*logheight/1994929"/>
              <draw:equation draw:name="f20" draw:formula="553839*logwidth/1830936"/>
              <draw:equation draw:name="f21" draw:formula="1862525*logheight/1994929"/>
              <draw:equation draw:name="f22" draw:formula="39355*logwidth/1830936"/>
              <draw:equation draw:name="f23" draw:formula="671891*logheight/1994929"/>
              <draw:equation draw:name="f24" draw:formula="1127254*logwidth/1830936"/>
              <draw:equation draw:name="f25" draw:formula="16650*logheight/1994929"/>
              <draw:equation draw:name="f26" draw:formula="1830936*logwidth/1830936"/>
              <draw:equation draw:name="f27" draw:formula="1773817*logheight/2067247"/>
              <draw:equation draw:name="f28" draw:formula="553839*logwidth/1830936"/>
              <draw:equation draw:name="f29" draw:formula="1934843*logheight/2067247"/>
              <draw:equation draw:name="f30" draw:formula="39355*logwidth/1830936"/>
              <draw:equation draw:name="f31" draw:formula="744209*logheight/2067247"/>
              <draw:equation draw:name="f32" draw:formula="1135082*logwidth/1830936"/>
              <draw:equation draw:name="f33" draw:formula="13999*logheight/2067247"/>
              <draw:equation draw:name="f34" draw:formula="1830936*logwidth/1830936"/>
              <draw:equation draw:name="f35" draw:formula="1761285*logheight/2054715"/>
              <draw:equation draw:name="f36" draw:formula="553839*logwidth/1830936"/>
              <draw:equation draw:name="f37" draw:formula="1922311*logheight/2054715"/>
              <draw:equation draw:name="f38" draw:formula="39355*logwidth/1830936"/>
              <draw:equation draw:name="f39" draw:formula="731677*logheight/2054715"/>
              <draw:equation draw:name="f40" draw:formula="1135082*logwidth/1830936"/>
              <draw:equation draw:name="f41" draw:formula="1467*logheight/2054715"/>
              <draw:equation draw:name="f42" draw:formula="1830936*logwidth/1830936"/>
              <draw:equation draw:name="f43" draw:formula="1759414*logheight/2052844"/>
              <draw:equation draw:name="f44" draw:formula="553839*logwidth/1830936"/>
              <draw:equation draw:name="f45" draw:formula="1920440*logheight/2052844"/>
              <draw:equation draw:name="f46" draw:formula="39355*logwidth/1830936"/>
              <draw:equation draw:name="f47" draw:formula="729806*logheight/2052844"/>
              <draw:equation draw:name="f48" draw:formula="1083718*logwidth/1830936"/>
              <draw:equation draw:name="f49" draw:formula="1475*logheight/2052844"/>
              <draw:equation draw:name="f50" draw:formula="1830936*logwidth/1830936"/>
              <draw:equation draw:name="f51" draw:formula="1771861*logheight/2065291"/>
              <draw:equation draw:name="f52" draw:formula="553839*logwidth/1830936"/>
              <draw:equation draw:name="f53" draw:formula="1932887*logheight/2065291"/>
              <draw:equation draw:name="f54" draw:formula="39355*logwidth/1830936"/>
              <draw:equation draw:name="f55" draw:formula="742253*logheight/2065291"/>
              <draw:equation draw:name="f56" draw:formula="1098058*logwidth/1830936"/>
              <draw:equation draw:name="f57" draw:formula="1421*logheight/2065291"/>
              <draw:equation draw:name="f58" draw:formula="logwidth"/>
              <draw:equation draw:name="f59" draw:formula="logheight"/>
            </draw:enhanced-geometry>
          </draw:custom-shape>
          <draw:custom-shape draw:name="フリーフォーム 5" draw:style-name="gr64" draw:text-style-name="P38" draw:layer="layout" svg:width="2.514cm" svg:height="0.654cm" svg:x="3.441cm" svg:y="10.633cm">
            <text:p/>
            <draw:enhanced-geometry draw:mirror-horizontal="false" draw:mirror-vertical="false" svg:viewBox="0 0 0 0" draw:glue-points="?f0 ?f1 ?f2 ?f3 ?f4 ?f5 ?f6 ?f7 ?f8 ?f9 ?f10 ?f11 ?f12 ?f13 ?f14 ?f15 ?f16 ?f17" drawooo:sub-view-size="5762625 1443037" draw:text-areas="0 0 ?f18 ?f19" draw:type="ooxml-non-primitive" draw:enhanced-path="M 0 4762 C 241697 721518 483394 1438275 723900 1438275 964406 1438275 1203325 3968 1443037 4762 1682749 5556 1921669 1443831 2162175 1443037 2402681 1442243 2646363 0 2886075 0 3125787 0 3359944 1443037 3600450 1443037 3840956 1443037 4087812 794 4329112 0 4570412 -794 4809331 1437481 5048250 1438275 5287169 1439069 5524897 721915 5762625 4762 N">
              <draw:equation draw:name="f0" draw:formula="0*logwidth/5762625"/>
              <draw:equation draw:name="f1" draw:formula="4762*logheight/1443037"/>
              <draw:equation draw:name="f2" draw:formula="723900*logwidth/5762625"/>
              <draw:equation draw:name="f3" draw:formula="1438275*logheight/1443037"/>
              <draw:equation draw:name="f4" draw:formula="1443037*logwidth/5762625"/>
              <draw:equation draw:name="f5" draw:formula="4762*logheight/1443037"/>
              <draw:equation draw:name="f6" draw:formula="2162175*logwidth/5762625"/>
              <draw:equation draw:name="f7" draw:formula="1443037*logheight/1443037"/>
              <draw:equation draw:name="f8" draw:formula="2886075*logwidth/5762625"/>
              <draw:equation draw:name="f9" draw:formula="0*logheight/1443037"/>
              <draw:equation draw:name="f10" draw:formula="3600450*logwidth/5762625"/>
              <draw:equation draw:name="f11" draw:formula="1443037*logheight/1443037"/>
              <draw:equation draw:name="f12" draw:formula="4329112*logwidth/5762625"/>
              <draw:equation draw:name="f13" draw:formula="0*logheight/1443037"/>
              <draw:equation draw:name="f14" draw:formula="5048250*logwidth/5762625"/>
              <draw:equation draw:name="f15" draw:formula="1438275*logheight/1443037"/>
              <draw:equation draw:name="f16" draw:formula="5762625*logwidth/5762625"/>
              <draw:equation draw:name="f17" draw:formula="4762*logheight/1443037"/>
              <draw:equation draw:name="f18" draw:formula="logwidth"/>
              <draw:equation draw:name="f19" draw:formula="logheight"/>
            </draw:enhanced-geometry>
          </draw:custom-shape>
          <draw:custom-shape draw:name="円/楕円 6" draw:style-name="gr67" draw:text-style-name="P41" draw:layer="layout" svg:width="0.593cm" svg:height="0.678cm" svg:x="4.024cm" svg:y="9.227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" draw:style-name="gr67" draw:text-style-name="P41" draw:layer="layout" svg:width="0.593cm" svg:height="0.678cm" svg:x="4.788cm" svg:y="9.65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円/楕円 10" draw:style-name="gr68" draw:text-style-name="P42" draw:layer="layout" svg:width="1.399cm" svg:height="1.304cm" svg:x="6.072cm" svg:y="10.32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テキスト ボックス 11" draw:style-name="gr69" draw:text-style-name="P31" draw:layer="layout" svg:width="1.399cm" svg:height="1.013cm" svg:x="6.072cm" svg:y="10.465cm">
          <text:p text:style-name="P30"><text:span text:style-name="T26">H</text:span><text:span text:style-name="T3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70" draw:text-style-name="P44" draw:layer="layout" svg:width="3.482cm" svg:height="1.013cm" svg:x="2.017cm" svg:y="7.699cm">
          <text:p text:style-name="P43"><text:span text:style-name="T25">破骨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" draw:style-name="gr71" draw:text-style-name="P44" draw:layer="layout" svg:width="8cm" svg:height="1.944cm" svg:x="14.7cm" svg:y="5.525cm">
          <text:p text:style-name="P43"><text:span text:style-name="T39">骨吸収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リモデリング (3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骨リ</text:span><text:span text:style-name="T22">モデ</text:span><text:span text:style-name="T22">リン</text:span><text:span text:style-name="T22">グ</text:span></text:p>
          </draw:text-box>
        </draw:frame>
        <draw:custom-shape draw:name="角丸四角形 3" draw:style-name="gr62" draw:text-style-name="P38" draw:layer="layout" svg:width="10.6cm" svg:height="6.2cm" svg:x="2.899cm" svg:y="11.3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テキスト ボックス 14" draw:style-name="gr72" draw:text-style-name="P44" draw:layer="layout" svg:width="3.482cm" svg:height="1.013cm" svg:x="2.017cm" svg:y="7.699cm">
          <text:p text:style-name="P43"><text:span text:style-name="T25">破骨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2" draw:style-name="gr73" draw:text-style-name="P45" draw:layer="layout" svg:width="3.799cm" svg:height="3.799cm" svg:x="5.361cm" svg:y="11.12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0" draw:style-name="gr68" draw:text-style-name="P42" draw:layer="layout" svg:width="1.399cm" svg:height="1.304cm" svg:x="5.099cm" svg:y="12.62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テキスト ボックス 11" draw:style-name="gr74" draw:text-style-name="P31" draw:layer="layout" svg:width="1.399cm" svg:height="1.013cm" svg:x="5.099cm" svg:y="12.795cm">
          <text:p text:style-name="P30"><text:span text:style-name="T26">H</text:span><text:span text:style-name="T3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1" draw:style-name="gr75" draw:text-style-name="P44" draw:layer="layout" svg:width="8cm" svg:height="1.944cm" svg:x="14.7cm" svg:y="5.525cm">
          <text:p text:style-name="P43"><text:span text:style-name="T39">骨吸収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5" draw:style-name="gr63">
          <draw:custom-shape draw:name="弦 3" draw:style-name="gr64" draw:text-style-name="P38" draw:layer="layout" svg:width="2.372cm" svg:height="2.675cm" draw:transform="rotate (-1.96611340237161) translate (6.49cm 9.357cm)">
            <text:p/>
            <draw:enhanced-geometry draw:mirror-horizontal="false" draw:mirror-vertical="false" svg:viewBox="0 0 0 0" draw:glue-points="?f50 ?f51 ?f52 ?f53 ?f54 ?f55 ?f56 ?f57" drawooo:sub-view-size="1830936 2065291" draw:text-areas="0 0 ?f58 ?f59" draw:type="ooxml-non-primitive" draw:enhanced-path="M 1830936 1771861 C 1488515 2091834 969709 2157249 553839 1932887 118819 1698193 -93718 1206332 39355 742253 169018 290066 503189 -23836 1098058 1421 N">
              <draw:equation draw:name="f0" draw:formula="1830827*logwidth/2160240"/>
              <draw:equation draw:name="f1" draw:formula="1794823*logheight/2088232"/>
              <draw:equation draw:name="f2" draw:formula="553730*logwidth/2160240"/>
              <draw:equation draw:name="f3" draw:formula="1955849*logheight/2088232"/>
              <draw:equation draw:name="f4" draw:formula="39246*logwidth/2160240"/>
              <draw:equation draw:name="f5" draw:formula="765215*logheight/2088232"/>
              <draw:equation draw:name="f6" draw:formula="1080119*logwidth/2160240"/>
              <draw:equation draw:name="f7" draw:formula="0*logheight/2088232"/>
              <draw:equation draw:name="f8" draw:formula="1830827*logwidth/2160240"/>
              <draw:equation draw:name="f9" draw:formula="1794823*logheight/2088232"/>
              <draw:equation draw:name="f10" draw:formula="1830936*logwidth/1830936"/>
              <draw:equation draw:name="f11" draw:formula="1719294*logheight/2012724"/>
              <draw:equation draw:name="f12" draw:formula="553839*logwidth/1830936"/>
              <draw:equation draw:name="f13" draw:formula="1880320*logheight/2012724"/>
              <draw:equation draw:name="f14" draw:formula="39355*logwidth/1830936"/>
              <draw:equation draw:name="f15" draw:formula="689686*logheight/2012724"/>
              <draw:equation draw:name="f16" draw:formula="1171668*logwidth/1830936"/>
              <draw:equation draw:name="f17" draw:formula="15911*logheight/2012724"/>
              <draw:equation draw:name="f18" draw:formula="1830936*logwidth/1830936"/>
              <draw:equation draw:name="f19" draw:formula="1701499*logheight/1994929"/>
              <draw:equation draw:name="f20" draw:formula="553839*logwidth/1830936"/>
              <draw:equation draw:name="f21" draw:formula="1862525*logheight/1994929"/>
              <draw:equation draw:name="f22" draw:formula="39355*logwidth/1830936"/>
              <draw:equation draw:name="f23" draw:formula="671891*logheight/1994929"/>
              <draw:equation draw:name="f24" draw:formula="1127254*logwidth/1830936"/>
              <draw:equation draw:name="f25" draw:formula="16650*logheight/1994929"/>
              <draw:equation draw:name="f26" draw:formula="1830936*logwidth/1830936"/>
              <draw:equation draw:name="f27" draw:formula="1773817*logheight/2067247"/>
              <draw:equation draw:name="f28" draw:formula="553839*logwidth/1830936"/>
              <draw:equation draw:name="f29" draw:formula="1934843*logheight/2067247"/>
              <draw:equation draw:name="f30" draw:formula="39355*logwidth/1830936"/>
              <draw:equation draw:name="f31" draw:formula="744209*logheight/2067247"/>
              <draw:equation draw:name="f32" draw:formula="1135082*logwidth/1830936"/>
              <draw:equation draw:name="f33" draw:formula="13999*logheight/2067247"/>
              <draw:equation draw:name="f34" draw:formula="1830936*logwidth/1830936"/>
              <draw:equation draw:name="f35" draw:formula="1761285*logheight/2054715"/>
              <draw:equation draw:name="f36" draw:formula="553839*logwidth/1830936"/>
              <draw:equation draw:name="f37" draw:formula="1922311*logheight/2054715"/>
              <draw:equation draw:name="f38" draw:formula="39355*logwidth/1830936"/>
              <draw:equation draw:name="f39" draw:formula="731677*logheight/2054715"/>
              <draw:equation draw:name="f40" draw:formula="1135082*logwidth/1830936"/>
              <draw:equation draw:name="f41" draw:formula="1467*logheight/2054715"/>
              <draw:equation draw:name="f42" draw:formula="1830936*logwidth/1830936"/>
              <draw:equation draw:name="f43" draw:formula="1759414*logheight/2052844"/>
              <draw:equation draw:name="f44" draw:formula="553839*logwidth/1830936"/>
              <draw:equation draw:name="f45" draw:formula="1920440*logheight/2052844"/>
              <draw:equation draw:name="f46" draw:formula="39355*logwidth/1830936"/>
              <draw:equation draw:name="f47" draw:formula="729806*logheight/2052844"/>
              <draw:equation draw:name="f48" draw:formula="1083718*logwidth/1830936"/>
              <draw:equation draw:name="f49" draw:formula="1475*logheight/2052844"/>
              <draw:equation draw:name="f50" draw:formula="1830936*logwidth/1830936"/>
              <draw:equation draw:name="f51" draw:formula="1771861*logheight/2065291"/>
              <draw:equation draw:name="f52" draw:formula="553839*logwidth/1830936"/>
              <draw:equation draw:name="f53" draw:formula="1932887*logheight/2065291"/>
              <draw:equation draw:name="f54" draw:formula="39355*logwidth/1830936"/>
              <draw:equation draw:name="f55" draw:formula="742253*logheight/2065291"/>
              <draw:equation draw:name="f56" draw:formula="1098058*logwidth/1830936"/>
              <draw:equation draw:name="f57" draw:formula="1421*logheight/2065291"/>
              <draw:equation draw:name="f58" draw:formula="logwidth"/>
              <draw:equation draw:name="f59" draw:formula="logheight"/>
            </draw:enhanced-geometry>
          </draw:custom-shape>
          <draw:custom-shape draw:name="フリーフォーム 17" draw:style-name="gr64" draw:text-style-name="P38" draw:layer="layout" svg:width="2.514cm" svg:height="0.654cm" svg:x="3.441cm" svg:y="10.633cm">
            <text:p/>
            <draw:enhanced-geometry draw:mirror-horizontal="false" draw:mirror-vertical="false" svg:viewBox="0 0 0 0" draw:glue-points="?f0 ?f1 ?f2 ?f3 ?f4 ?f5 ?f6 ?f7 ?f8 ?f9 ?f10 ?f11 ?f12 ?f13 ?f14 ?f15 ?f16 ?f17" drawooo:sub-view-size="5762625 1443037" draw:text-areas="0 0 ?f18 ?f19" draw:type="ooxml-non-primitive" draw:enhanced-path="M 0 4762 C 241697 721518 483394 1438275 723900 1438275 964406 1438275 1203325 3968 1443037 4762 1682749 5556 1921669 1443831 2162175 1443037 2402681 1442243 2646363 0 2886075 0 3125787 0 3359944 1443037 3600450 1443037 3840956 1443037 4087812 794 4329112 0 4570412 -794 4809331 1437481 5048250 1438275 5287169 1439069 5524897 721915 5762625 4762 N">
              <draw:equation draw:name="f0" draw:formula="0*logwidth/5762625"/>
              <draw:equation draw:name="f1" draw:formula="4762*logheight/1443037"/>
              <draw:equation draw:name="f2" draw:formula="723900*logwidth/5762625"/>
              <draw:equation draw:name="f3" draw:formula="1438275*logheight/1443037"/>
              <draw:equation draw:name="f4" draw:formula="1443037*logwidth/5762625"/>
              <draw:equation draw:name="f5" draw:formula="4762*logheight/1443037"/>
              <draw:equation draw:name="f6" draw:formula="2162175*logwidth/5762625"/>
              <draw:equation draw:name="f7" draw:formula="1443037*logheight/1443037"/>
              <draw:equation draw:name="f8" draw:formula="2886075*logwidth/5762625"/>
              <draw:equation draw:name="f9" draw:formula="0*logheight/1443037"/>
              <draw:equation draw:name="f10" draw:formula="3600450*logwidth/5762625"/>
              <draw:equation draw:name="f11" draw:formula="1443037*logheight/1443037"/>
              <draw:equation draw:name="f12" draw:formula="4329112*logwidth/5762625"/>
              <draw:equation draw:name="f13" draw:formula="0*logheight/1443037"/>
              <draw:equation draw:name="f14" draw:formula="5048250*logwidth/5762625"/>
              <draw:equation draw:name="f15" draw:formula="1438275*logheight/1443037"/>
              <draw:equation draw:name="f16" draw:formula="5762625*logwidth/5762625"/>
              <draw:equation draw:name="f17" draw:formula="4762*logheight/1443037"/>
              <draw:equation draw:name="f18" draw:formula="logwidth"/>
              <draw:equation draw:name="f19" draw:formula="logheight"/>
            </draw:enhanced-geometry>
          </draw:custom-shape>
          <draw:custom-shape draw:name="円/楕円 18" draw:style-name="gr67" draw:text-style-name="P41" draw:layer="layout" svg:width="0.593cm" svg:height="0.678cm" svg:x="4.024cm" svg:y="9.227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9" draw:style-name="gr67" draw:text-style-name="P41" draw:layer="layout" svg:width="0.593cm" svg:height="0.678cm" svg:x="4.788cm" svg:y="9.65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リモデリング (4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骨リ</text:span><text:span text:style-name="T22">モデ</text:span><text:span text:style-name="T22">リン</text:span><text:span text:style-name="T22">グ</text:span></text:p>
          </draw:text-box>
        </draw:frame>
        <draw:custom-shape draw:name="角丸四角形 3" draw:style-name="gr62" draw:text-style-name="P38" draw:layer="layout" svg:width="10.6cm" svg:height="6.2cm" svg:x="2.899cm" svg:y="11.3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テキスト ボックス 14" draw:style-name="gr76" draw:text-style-name="P44" draw:layer="layout" svg:width="3.482cm" svg:height="1.013cm" svg:x="2.017cm" svg:y="7.699cm">
          <text:p text:style-name="P43"><text:span text:style-name="T25">破骨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2" draw:style-name="gr73" draw:text-style-name="P45" draw:layer="layout" svg:width="3.799cm" svg:height="3.799cm" svg:x="5.361cm" svg:y="11.12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0" draw:style-name="gr68" draw:text-style-name="P42" draw:layer="layout" svg:width="1.399cm" svg:height="1.304cm" svg:x="5.099cm" svg:y="12.62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テキスト ボックス 11" draw:style-name="gr77" draw:text-style-name="P31" draw:layer="layout" svg:width="1.399cm" svg:height="1.013cm" svg:x="5.099cm" svg:y="12.795cm">
          <text:p text:style-name="P30"><text:span text:style-name="T26">H</text:span><text:span text:style-name="T3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右矢印 7" draw:style-name="gr78" draw:text-style-name="P38" draw:layer="layout" svg:width="2.779cm" svg:height="1.558cm" draw:transform="rotate (0.704589419030111) translate (8.172cm 11.3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円/楕円 15" draw:style-name="gr79" draw:text-style-name="P47" draw:layer="layout" svg:width="2.322cm" svg:height="2.274cm" svg:x="9.117cm" svg:y="7.45cm">
          <text:p text:style-name="P46"><text:span text:style-name="T40">Ca</text:span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角丸四角形 16" draw:style-name="gr80" draw:text-style-name="P48" draw:layer="layout" svg:width="1.859cm" svg:height="1.775cm" svg:x="11.84cm" svg:y="8.549cm">
          <text:p text:style-name="P30"><text:span text:style-name="T41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テキスト ボックス 18" draw:style-name="gr81" draw:text-style-name="P44" draw:layer="layout" svg:width="8cm" svg:height="1.944cm" svg:x="14.7cm" svg:y="5.525cm">
          <text:p text:style-name="P43"><text:span text:style-name="T39">骨吸収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7" draw:style-name="gr63">
          <draw:custom-shape draw:name="弦 3" draw:style-name="gr64" draw:text-style-name="P38" draw:layer="layout" svg:width="2.372cm" svg:height="2.675cm" draw:transform="rotate (-1.96611340237161) translate (6.49cm 9.357cm)">
            <text:p/>
            <draw:enhanced-geometry draw:mirror-horizontal="false" draw:mirror-vertical="false" svg:viewBox="0 0 0 0" draw:glue-points="?f50 ?f51 ?f52 ?f53 ?f54 ?f55 ?f56 ?f57" drawooo:sub-view-size="1830936 2065291" draw:text-areas="0 0 ?f58 ?f59" draw:type="ooxml-non-primitive" draw:enhanced-path="M 1830936 1771861 C 1488515 2091834 969709 2157249 553839 1932887 118819 1698193 -93718 1206332 39355 742253 169018 290066 503189 -23836 1098058 1421 N">
              <draw:equation draw:name="f0" draw:formula="1830827*logwidth/2160240"/>
              <draw:equation draw:name="f1" draw:formula="1794823*logheight/2088232"/>
              <draw:equation draw:name="f2" draw:formula="553730*logwidth/2160240"/>
              <draw:equation draw:name="f3" draw:formula="1955849*logheight/2088232"/>
              <draw:equation draw:name="f4" draw:formula="39246*logwidth/2160240"/>
              <draw:equation draw:name="f5" draw:formula="765215*logheight/2088232"/>
              <draw:equation draw:name="f6" draw:formula="1080119*logwidth/2160240"/>
              <draw:equation draw:name="f7" draw:formula="0*logheight/2088232"/>
              <draw:equation draw:name="f8" draw:formula="1830827*logwidth/2160240"/>
              <draw:equation draw:name="f9" draw:formula="1794823*logheight/2088232"/>
              <draw:equation draw:name="f10" draw:formula="1830936*logwidth/1830936"/>
              <draw:equation draw:name="f11" draw:formula="1719294*logheight/2012724"/>
              <draw:equation draw:name="f12" draw:formula="553839*logwidth/1830936"/>
              <draw:equation draw:name="f13" draw:formula="1880320*logheight/2012724"/>
              <draw:equation draw:name="f14" draw:formula="39355*logwidth/1830936"/>
              <draw:equation draw:name="f15" draw:formula="689686*logheight/2012724"/>
              <draw:equation draw:name="f16" draw:formula="1171668*logwidth/1830936"/>
              <draw:equation draw:name="f17" draw:formula="15911*logheight/2012724"/>
              <draw:equation draw:name="f18" draw:formula="1830936*logwidth/1830936"/>
              <draw:equation draw:name="f19" draw:formula="1701499*logheight/1994929"/>
              <draw:equation draw:name="f20" draw:formula="553839*logwidth/1830936"/>
              <draw:equation draw:name="f21" draw:formula="1862525*logheight/1994929"/>
              <draw:equation draw:name="f22" draw:formula="39355*logwidth/1830936"/>
              <draw:equation draw:name="f23" draw:formula="671891*logheight/1994929"/>
              <draw:equation draw:name="f24" draw:formula="1127254*logwidth/1830936"/>
              <draw:equation draw:name="f25" draw:formula="16650*logheight/1994929"/>
              <draw:equation draw:name="f26" draw:formula="1830936*logwidth/1830936"/>
              <draw:equation draw:name="f27" draw:formula="1773817*logheight/2067247"/>
              <draw:equation draw:name="f28" draw:formula="553839*logwidth/1830936"/>
              <draw:equation draw:name="f29" draw:formula="1934843*logheight/2067247"/>
              <draw:equation draw:name="f30" draw:formula="39355*logwidth/1830936"/>
              <draw:equation draw:name="f31" draw:formula="744209*logheight/2067247"/>
              <draw:equation draw:name="f32" draw:formula="1135082*logwidth/1830936"/>
              <draw:equation draw:name="f33" draw:formula="13999*logheight/2067247"/>
              <draw:equation draw:name="f34" draw:formula="1830936*logwidth/1830936"/>
              <draw:equation draw:name="f35" draw:formula="1761285*logheight/2054715"/>
              <draw:equation draw:name="f36" draw:formula="553839*logwidth/1830936"/>
              <draw:equation draw:name="f37" draw:formula="1922311*logheight/2054715"/>
              <draw:equation draw:name="f38" draw:formula="39355*logwidth/1830936"/>
              <draw:equation draw:name="f39" draw:formula="731677*logheight/2054715"/>
              <draw:equation draw:name="f40" draw:formula="1135082*logwidth/1830936"/>
              <draw:equation draw:name="f41" draw:formula="1467*logheight/2054715"/>
              <draw:equation draw:name="f42" draw:formula="1830936*logwidth/1830936"/>
              <draw:equation draw:name="f43" draw:formula="1759414*logheight/2052844"/>
              <draw:equation draw:name="f44" draw:formula="553839*logwidth/1830936"/>
              <draw:equation draw:name="f45" draw:formula="1920440*logheight/2052844"/>
              <draw:equation draw:name="f46" draw:formula="39355*logwidth/1830936"/>
              <draw:equation draw:name="f47" draw:formula="729806*logheight/2052844"/>
              <draw:equation draw:name="f48" draw:formula="1083718*logwidth/1830936"/>
              <draw:equation draw:name="f49" draw:formula="1475*logheight/2052844"/>
              <draw:equation draw:name="f50" draw:formula="1830936*logwidth/1830936"/>
              <draw:equation draw:name="f51" draw:formula="1771861*logheight/2065291"/>
              <draw:equation draw:name="f52" draw:formula="553839*logwidth/1830936"/>
              <draw:equation draw:name="f53" draw:formula="1932887*logheight/2065291"/>
              <draw:equation draw:name="f54" draw:formula="39355*logwidth/1830936"/>
              <draw:equation draw:name="f55" draw:formula="742253*logheight/2065291"/>
              <draw:equation draw:name="f56" draw:formula="1098058*logwidth/1830936"/>
              <draw:equation draw:name="f57" draw:formula="1421*logheight/2065291"/>
              <draw:equation draw:name="f58" draw:formula="logwidth"/>
              <draw:equation draw:name="f59" draw:formula="logheight"/>
            </draw:enhanced-geometry>
          </draw:custom-shape>
          <draw:custom-shape draw:name="フリーフォーム 20" draw:style-name="gr64" draw:text-style-name="P38" draw:layer="layout" svg:width="2.514cm" svg:height="0.654cm" svg:x="3.441cm" svg:y="10.633cm">
            <text:p/>
            <draw:enhanced-geometry draw:mirror-horizontal="false" draw:mirror-vertical="false" svg:viewBox="0 0 0 0" draw:glue-points="?f0 ?f1 ?f2 ?f3 ?f4 ?f5 ?f6 ?f7 ?f8 ?f9 ?f10 ?f11 ?f12 ?f13 ?f14 ?f15 ?f16 ?f17" drawooo:sub-view-size="5762625 1443037" draw:text-areas="0 0 ?f18 ?f19" draw:type="ooxml-non-primitive" draw:enhanced-path="M 0 4762 C 241697 721518 483394 1438275 723900 1438275 964406 1438275 1203325 3968 1443037 4762 1682749 5556 1921669 1443831 2162175 1443037 2402681 1442243 2646363 0 2886075 0 3125787 0 3359944 1443037 3600450 1443037 3840956 1443037 4087812 794 4329112 0 4570412 -794 4809331 1437481 5048250 1438275 5287169 1439069 5524897 721915 5762625 4762 N">
              <draw:equation draw:name="f0" draw:formula="0*logwidth/5762625"/>
              <draw:equation draw:name="f1" draw:formula="4762*logheight/1443037"/>
              <draw:equation draw:name="f2" draw:formula="723900*logwidth/5762625"/>
              <draw:equation draw:name="f3" draw:formula="1438275*logheight/1443037"/>
              <draw:equation draw:name="f4" draw:formula="1443037*logwidth/5762625"/>
              <draw:equation draw:name="f5" draw:formula="4762*logheight/1443037"/>
              <draw:equation draw:name="f6" draw:formula="2162175*logwidth/5762625"/>
              <draw:equation draw:name="f7" draw:formula="1443037*logheight/1443037"/>
              <draw:equation draw:name="f8" draw:formula="2886075*logwidth/5762625"/>
              <draw:equation draw:name="f9" draw:formula="0*logheight/1443037"/>
              <draw:equation draw:name="f10" draw:formula="3600450*logwidth/5762625"/>
              <draw:equation draw:name="f11" draw:formula="1443037*logheight/1443037"/>
              <draw:equation draw:name="f12" draw:formula="4329112*logwidth/5762625"/>
              <draw:equation draw:name="f13" draw:formula="0*logheight/1443037"/>
              <draw:equation draw:name="f14" draw:formula="5048250*logwidth/5762625"/>
              <draw:equation draw:name="f15" draw:formula="1438275*logheight/1443037"/>
              <draw:equation draw:name="f16" draw:formula="5762625*logwidth/5762625"/>
              <draw:equation draw:name="f17" draw:formula="4762*logheight/1443037"/>
              <draw:equation draw:name="f18" draw:formula="logwidth"/>
              <draw:equation draw:name="f19" draw:formula="logheight"/>
            </draw:enhanced-geometry>
          </draw:custom-shape>
          <draw:custom-shape draw:name="円/楕円 21" draw:style-name="gr67" draw:text-style-name="P41" draw:layer="layout" svg:width="0.593cm" svg:height="0.678cm" svg:x="4.024cm" svg:y="9.227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2" draw:style-name="gr67" draw:text-style-name="P41" draw:layer="layout" svg:width="0.593cm" svg:height="0.678cm" svg:x="4.788cm" svg:y="9.65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リモデリング (5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骨リ</text:span><text:span text:style-name="T22">モデ</text:span><text:span text:style-name="T22">リン</text:span><text:span text:style-name="T22">グ</text:span></text:p>
          </draw:text-box>
        </draw:frame>
        <draw:custom-shape draw:name="角丸四角形 3" draw:style-name="gr62" draw:text-style-name="P38" draw:layer="layout" svg:width="10.6cm" svg:height="6.2cm" svg:x="2.899cm" svg:y="11.3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テキスト ボックス 14" draw:style-name="gr82" draw:text-style-name="P44" draw:layer="layout" svg:width="3.482cm" svg:height="1.013cm" svg:x="2.017cm" svg:y="7.699cm">
          <text:p text:style-name="P43"><text:span text:style-name="T25">破骨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2" draw:style-name="gr73" draw:text-style-name="P45" draw:layer="layout" svg:width="3.799cm" svg:height="3.799cm" svg:x="5.361cm" svg:y="11.12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0" draw:style-name="gr68" draw:text-style-name="P42" draw:layer="layout" svg:width="1.399cm" svg:height="1.304cm" svg:x="5.099cm" svg:y="12.62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テキスト ボックス 11" draw:style-name="gr83" draw:text-style-name="P31" draw:layer="layout" svg:width="1.399cm" svg:height="1.013cm" svg:x="5.099cm" svg:y="12.795cm">
          <text:p text:style-name="P30"><text:span text:style-name="T26">H</text:span><text:span text:style-name="T3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右矢印 7" draw:style-name="gr78" draw:text-style-name="P38" draw:layer="layout" svg:width="2.779cm" svg:height="1.558cm" draw:transform="rotate (0.704589419030111) translate (8.172cm 11.3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円/楕円 15" draw:style-name="gr84" draw:text-style-name="P47" draw:layer="layout" svg:width="2.322cm" svg:height="2.274cm" svg:x="9.117cm" svg:y="7.45cm">
          <text:p text:style-name="P46"><text:span text:style-name="T40">Ca</text:span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角丸四角形 16" draw:style-name="gr85" draw:text-style-name="P48" draw:layer="layout" svg:width="1.859cm" svg:height="1.775cm" svg:x="11.84cm" svg:y="8.549cm">
          <text:p text:style-name="P30"><text:span text:style-name="T41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テキスト ボックス 9" draw:style-name="gr86" draw:text-style-name="P31" xml:id="id25" draw:id="id25" draw:layer="layout" svg:width="4.727cm" svg:height="1.098cm" svg:x="4.699cm" svg:y="5.725cm">
          <text:p text:style-name="P30"><text:span text:style-name="T42">TRACP-5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矢印コネクタ 17" draw:style-name="gr87" draw:text-style-name="P27" draw:layer="layout" draw:type="line" svg:x1="5.582cm" svg:y1="9.033cm" svg:x2="7.062cm" svg:y2="6.823cm" draw:end-shape="id25" draw:end-glue-point="2" svg:d="M5582 9033l1480-2210" svg:viewBox="0 0 1481 2211">
          <text:p/>
        </draw:connector>
        <draw:custom-shape draw:name="テキスト ボックス 18" draw:style-name="gr88" draw:text-style-name="P44" draw:layer="layout" svg:width="8cm" svg:height="1.944cm" svg:x="14.7cm" svg:y="5.525cm">
          <text:p text:style-name="P43"><text:span text:style-name="T39">骨吸収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 19" draw:style-name="gr3" draw:layer="layout" svg:width="11.657cm" svg:height="4.37cm" svg:x="13.69cm" svg:y="11.837cm">
          <table:table>
            <table:table-column table:style-name="co5"/>
            <table:table-column table:style-name="co6"/>
            <table:table-row table:style-name="ro5" table:default-cell-style-name="ce7">
              <table:table-cell/>
              <table:table-cell/>
            </table:table-row>
            <table:table-row table:style-name="ro5" table:default-cell-style-name="ce8">
              <table:table-cell>
                <text:p text:style-name="P49"><text:span text:style-name="T43">DPD</text:span></text:p>
              </table:table-cell>
              <table:table-cell>
                <text:p text:style-name="P49"><text:span text:style-name="T44">デオキシピジノリン</text:span></text:p>
              </table:table-cell>
            </table:table-row>
            <table:table-row table:style-name="ro5" table:default-cell-style-name="ce8">
              <table:table-cell>
                <text:p text:style-name="P49"><text:span text:style-name="T43">NTX</text:span></text:p>
              </table:table-cell>
              <table:table-cell>
                <text:p text:style-name="P49"><text:span text:style-name="T43">I</text:span><text:span text:style-name="T45">型コラーゲン架橋</text:span><text:span text:style-name="T45">N-</text:span><text:span text:style-name="T45">テロペプチド</text:span></text:p>
              </table:table-cell>
            </table:table-row>
            <table:table-row table:style-name="ro6" table:default-cell-style-name="ce8">
              <table:table-cell>
                <text:p text:style-name="P49"><text:span text:style-name="T43">CTX</text:span></text:p>
              </table:table-cell>
              <table:table-cell>
                <text:p text:style-name="P49"><text:span text:style-name="T43">I</text:span><text:span text:style-name="T45">型コラーゲン架橋</text:span><text:span text:style-name="T45">C-</text:span><text:span text:style-name="T45">テロペプチド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name="直線矢印コネクタ 21" draw:style-name="gr89" draw:text-style-name="P27" draw:layer="layout" draw:type="line" svg:x1="9.117cm" svg:y1="13.525cm" svg:x2="13.7cm" svg:y2="14.425cm" svg:d="M9117 13525l4583 900" svg:viewBox="0 0 4584 901">
          <text:p/>
        </draw:connector>
        <draw:g draw:name="グループ化 20" draw:style-name="gr63">
          <draw:custom-shape draw:name="弦 3" draw:style-name="gr64" draw:text-style-name="P38" draw:layer="layout" svg:width="2.372cm" svg:height="2.675cm" draw:transform="rotate (-1.96611340237161) translate (6.49cm 9.357cm)">
            <text:p/>
            <draw:enhanced-geometry draw:mirror-horizontal="false" draw:mirror-vertical="false" svg:viewBox="0 0 0 0" draw:glue-points="?f50 ?f51 ?f52 ?f53 ?f54 ?f55 ?f56 ?f57" drawooo:sub-view-size="1830936 2065291" draw:text-areas="0 0 ?f58 ?f59" draw:type="ooxml-non-primitive" draw:enhanced-path="M 1830936 1771861 C 1488515 2091834 969709 2157249 553839 1932887 118819 1698193 -93718 1206332 39355 742253 169018 290066 503189 -23836 1098058 1421 N">
              <draw:equation draw:name="f0" draw:formula="1830827*logwidth/2160240"/>
              <draw:equation draw:name="f1" draw:formula="1794823*logheight/2088232"/>
              <draw:equation draw:name="f2" draw:formula="553730*logwidth/2160240"/>
              <draw:equation draw:name="f3" draw:formula="1955849*logheight/2088232"/>
              <draw:equation draw:name="f4" draw:formula="39246*logwidth/2160240"/>
              <draw:equation draw:name="f5" draw:formula="765215*logheight/2088232"/>
              <draw:equation draw:name="f6" draw:formula="1080119*logwidth/2160240"/>
              <draw:equation draw:name="f7" draw:formula="0*logheight/2088232"/>
              <draw:equation draw:name="f8" draw:formula="1830827*logwidth/2160240"/>
              <draw:equation draw:name="f9" draw:formula="1794823*logheight/2088232"/>
              <draw:equation draw:name="f10" draw:formula="1830936*logwidth/1830936"/>
              <draw:equation draw:name="f11" draw:formula="1719294*logheight/2012724"/>
              <draw:equation draw:name="f12" draw:formula="553839*logwidth/1830936"/>
              <draw:equation draw:name="f13" draw:formula="1880320*logheight/2012724"/>
              <draw:equation draw:name="f14" draw:formula="39355*logwidth/1830936"/>
              <draw:equation draw:name="f15" draw:formula="689686*logheight/2012724"/>
              <draw:equation draw:name="f16" draw:formula="1171668*logwidth/1830936"/>
              <draw:equation draw:name="f17" draw:formula="15911*logheight/2012724"/>
              <draw:equation draw:name="f18" draw:formula="1830936*logwidth/1830936"/>
              <draw:equation draw:name="f19" draw:formula="1701499*logheight/1994929"/>
              <draw:equation draw:name="f20" draw:formula="553839*logwidth/1830936"/>
              <draw:equation draw:name="f21" draw:formula="1862525*logheight/1994929"/>
              <draw:equation draw:name="f22" draw:formula="39355*logwidth/1830936"/>
              <draw:equation draw:name="f23" draw:formula="671891*logheight/1994929"/>
              <draw:equation draw:name="f24" draw:formula="1127254*logwidth/1830936"/>
              <draw:equation draw:name="f25" draw:formula="16650*logheight/1994929"/>
              <draw:equation draw:name="f26" draw:formula="1830936*logwidth/1830936"/>
              <draw:equation draw:name="f27" draw:formula="1773817*logheight/2067247"/>
              <draw:equation draw:name="f28" draw:formula="553839*logwidth/1830936"/>
              <draw:equation draw:name="f29" draw:formula="1934843*logheight/2067247"/>
              <draw:equation draw:name="f30" draw:formula="39355*logwidth/1830936"/>
              <draw:equation draw:name="f31" draw:formula="744209*logheight/2067247"/>
              <draw:equation draw:name="f32" draw:formula="1135082*logwidth/1830936"/>
              <draw:equation draw:name="f33" draw:formula="13999*logheight/2067247"/>
              <draw:equation draw:name="f34" draw:formula="1830936*logwidth/1830936"/>
              <draw:equation draw:name="f35" draw:formula="1761285*logheight/2054715"/>
              <draw:equation draw:name="f36" draw:formula="553839*logwidth/1830936"/>
              <draw:equation draw:name="f37" draw:formula="1922311*logheight/2054715"/>
              <draw:equation draw:name="f38" draw:formula="39355*logwidth/1830936"/>
              <draw:equation draw:name="f39" draw:formula="731677*logheight/2054715"/>
              <draw:equation draw:name="f40" draw:formula="1135082*logwidth/1830936"/>
              <draw:equation draw:name="f41" draw:formula="1467*logheight/2054715"/>
              <draw:equation draw:name="f42" draw:formula="1830936*logwidth/1830936"/>
              <draw:equation draw:name="f43" draw:formula="1759414*logheight/2052844"/>
              <draw:equation draw:name="f44" draw:formula="553839*logwidth/1830936"/>
              <draw:equation draw:name="f45" draw:formula="1920440*logheight/2052844"/>
              <draw:equation draw:name="f46" draw:formula="39355*logwidth/1830936"/>
              <draw:equation draw:name="f47" draw:formula="729806*logheight/2052844"/>
              <draw:equation draw:name="f48" draw:formula="1083718*logwidth/1830936"/>
              <draw:equation draw:name="f49" draw:formula="1475*logheight/2052844"/>
              <draw:equation draw:name="f50" draw:formula="1830936*logwidth/1830936"/>
              <draw:equation draw:name="f51" draw:formula="1771861*logheight/2065291"/>
              <draw:equation draw:name="f52" draw:formula="553839*logwidth/1830936"/>
              <draw:equation draw:name="f53" draw:formula="1932887*logheight/2065291"/>
              <draw:equation draw:name="f54" draw:formula="39355*logwidth/1830936"/>
              <draw:equation draw:name="f55" draw:formula="742253*logheight/2065291"/>
              <draw:equation draw:name="f56" draw:formula="1098058*logwidth/1830936"/>
              <draw:equation draw:name="f57" draw:formula="1421*logheight/2065291"/>
              <draw:equation draw:name="f58" draw:formula="logwidth"/>
              <draw:equation draw:name="f59" draw:formula="logheight"/>
            </draw:enhanced-geometry>
          </draw:custom-shape>
          <draw:custom-shape draw:name="フリーフォーム 23" draw:style-name="gr64" draw:text-style-name="P38" draw:layer="layout" svg:width="2.514cm" svg:height="0.654cm" svg:x="3.441cm" svg:y="10.633cm">
            <text:p/>
            <draw:enhanced-geometry draw:mirror-horizontal="false" draw:mirror-vertical="false" svg:viewBox="0 0 0 0" draw:glue-points="?f0 ?f1 ?f2 ?f3 ?f4 ?f5 ?f6 ?f7 ?f8 ?f9 ?f10 ?f11 ?f12 ?f13 ?f14 ?f15 ?f16 ?f17" drawooo:sub-view-size="5762625 1443037" draw:text-areas="0 0 ?f18 ?f19" draw:type="ooxml-non-primitive" draw:enhanced-path="M 0 4762 C 241697 721518 483394 1438275 723900 1438275 964406 1438275 1203325 3968 1443037 4762 1682749 5556 1921669 1443831 2162175 1443037 2402681 1442243 2646363 0 2886075 0 3125787 0 3359944 1443037 3600450 1443037 3840956 1443037 4087812 794 4329112 0 4570412 -794 4809331 1437481 5048250 1438275 5287169 1439069 5524897 721915 5762625 4762 N">
              <draw:equation draw:name="f0" draw:formula="0*logwidth/5762625"/>
              <draw:equation draw:name="f1" draw:formula="4762*logheight/1443037"/>
              <draw:equation draw:name="f2" draw:formula="723900*logwidth/5762625"/>
              <draw:equation draw:name="f3" draw:formula="1438275*logheight/1443037"/>
              <draw:equation draw:name="f4" draw:formula="1443037*logwidth/5762625"/>
              <draw:equation draw:name="f5" draw:formula="4762*logheight/1443037"/>
              <draw:equation draw:name="f6" draw:formula="2162175*logwidth/5762625"/>
              <draw:equation draw:name="f7" draw:formula="1443037*logheight/1443037"/>
              <draw:equation draw:name="f8" draw:formula="2886075*logwidth/5762625"/>
              <draw:equation draw:name="f9" draw:formula="0*logheight/1443037"/>
              <draw:equation draw:name="f10" draw:formula="3600450*logwidth/5762625"/>
              <draw:equation draw:name="f11" draw:formula="1443037*logheight/1443037"/>
              <draw:equation draw:name="f12" draw:formula="4329112*logwidth/5762625"/>
              <draw:equation draw:name="f13" draw:formula="0*logheight/1443037"/>
              <draw:equation draw:name="f14" draw:formula="5048250*logwidth/5762625"/>
              <draw:equation draw:name="f15" draw:formula="1438275*logheight/1443037"/>
              <draw:equation draw:name="f16" draw:formula="5762625*logwidth/5762625"/>
              <draw:equation draw:name="f17" draw:formula="4762*logheight/1443037"/>
              <draw:equation draw:name="f18" draw:formula="logwidth"/>
              <draw:equation draw:name="f19" draw:formula="logheight"/>
            </draw:enhanced-geometry>
          </draw:custom-shape>
          <draw:custom-shape draw:name="円/楕円 24" draw:style-name="gr67" draw:text-style-name="P41" draw:layer="layout" svg:width="0.593cm" svg:height="0.678cm" svg:x="4.024cm" svg:y="9.227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5" draw:style-name="gr67" draw:text-style-name="P41" draw:layer="layout" svg:width="0.593cm" svg:height="0.678cm" svg:x="4.788cm" svg:y="9.65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リモデリング (6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骨リ</text:span><text:span text:style-name="T22">モデ</text:span><text:span text:style-name="T22">リン</text:span><text:span text:style-name="T22">グ</text:span></text:p>
          </draw:text-box>
        </draw:frame>
        <draw:custom-shape draw:name="角丸四角形 3" draw:style-name="gr62" draw:text-style-name="P38" draw:layer="layout" svg:width="10.6cm" svg:height="6.2cm" svg:x="2.899cm" svg:y="11.3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テキスト ボックス 14" draw:style-name="gr90" draw:text-style-name="P44" draw:layer="layout" svg:width="3.482cm" svg:height="1.013cm" svg:x="2.017cm" svg:y="7.699cm">
          <text:p text:style-name="P43"><text:span text:style-name="T25">破骨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91" draw:text-style-name="P31" xml:id="id26" draw:id="id26" draw:layer="layout" svg:width="4.727cm" svg:height="1.098cm" svg:x="4.699cm" svg:y="5.725cm">
          <text:p text:style-name="P30"><text:span text:style-name="T42">TRACP-5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矢印コネクタ 17" draw:style-name="gr87" draw:text-style-name="P27" draw:layer="layout" draw:type="line" svg:x1="5.582cm" svg:y1="9.033cm" svg:x2="7.062cm" svg:y2="6.823cm" draw:end-shape="id26" draw:end-glue-point="2" svg:d="M5582 9033l1480-2210" svg:viewBox="0 0 1481 2211">
          <text:p/>
        </draw:connector>
        <draw:custom-shape draw:name="角丸四角形 12" draw:style-name="gr73" draw:text-style-name="P45" draw:layer="layout" svg:width="8.804cm" svg:height="4.793cm" svg:x="4.095cm" svg:y="11.2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g draw:name="グループ化 24" draw:style-name="gr63">
          <draw:custom-shape draw:name="角丸四角形 22" draw:style-name="gr64" draw:text-style-name="P38" draw:layer="layout" svg:width="3.429cm" svg:height="2.257cm" svg:x="4.321cm" svg:y="13.79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円/楕円 23" draw:style-name="gr67" draw:text-style-name="P41" draw:layer="layout" svg:width="0.789cm" svg:height="0.902cm" svg:x="5.641cm" svg:y="14.47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テキスト ボックス 25" draw:style-name="gr92" draw:text-style-name="P44" draw:layer="layout" svg:width="3.482cm" svg:height="1.013cm" svg:x="4.798cm" svg:y="12.777cm">
          <text:p text:style-name="P43"><text:span text:style-name="T29">骨芽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6" draw:style-name="gr93" draw:text-style-name="P44" draw:layer="layout" svg:width="8cm" svg:height="1.944cm" svg:x="14.7cm" svg:y="5.525cm">
          <text:p text:style-name="P43"><text:span text:style-name="T39">骨形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8" draw:style-name="gr63">
          <draw:custom-shape draw:name="弦 3" draw:style-name="gr64" draw:text-style-name="P38" draw:layer="layout" svg:width="2.372cm" svg:height="2.675cm" draw:transform="rotate (-1.96611340237161) translate (6.49cm 9.357cm)">
            <text:p/>
            <draw:enhanced-geometry draw:mirror-horizontal="false" draw:mirror-vertical="false" svg:viewBox="0 0 0 0" draw:glue-points="?f50 ?f51 ?f52 ?f53 ?f54 ?f55 ?f56 ?f57" drawooo:sub-view-size="1830936 2065291" draw:text-areas="0 0 ?f58 ?f59" draw:type="ooxml-non-primitive" draw:enhanced-path="M 1830936 1771861 C 1488515 2091834 969709 2157249 553839 1932887 118819 1698193 -93718 1206332 39355 742253 169018 290066 503189 -23836 1098058 1421 N">
              <draw:equation draw:name="f0" draw:formula="1830827*logwidth/2160240"/>
              <draw:equation draw:name="f1" draw:formula="1794823*logheight/2088232"/>
              <draw:equation draw:name="f2" draw:formula="553730*logwidth/2160240"/>
              <draw:equation draw:name="f3" draw:formula="1955849*logheight/2088232"/>
              <draw:equation draw:name="f4" draw:formula="39246*logwidth/2160240"/>
              <draw:equation draw:name="f5" draw:formula="765215*logheight/2088232"/>
              <draw:equation draw:name="f6" draw:formula="1080119*logwidth/2160240"/>
              <draw:equation draw:name="f7" draw:formula="0*logheight/2088232"/>
              <draw:equation draw:name="f8" draw:formula="1830827*logwidth/2160240"/>
              <draw:equation draw:name="f9" draw:formula="1794823*logheight/2088232"/>
              <draw:equation draw:name="f10" draw:formula="1830936*logwidth/1830936"/>
              <draw:equation draw:name="f11" draw:formula="1719294*logheight/2012724"/>
              <draw:equation draw:name="f12" draw:formula="553839*logwidth/1830936"/>
              <draw:equation draw:name="f13" draw:formula="1880320*logheight/2012724"/>
              <draw:equation draw:name="f14" draw:formula="39355*logwidth/1830936"/>
              <draw:equation draw:name="f15" draw:formula="689686*logheight/2012724"/>
              <draw:equation draw:name="f16" draw:formula="1171668*logwidth/1830936"/>
              <draw:equation draw:name="f17" draw:formula="15911*logheight/2012724"/>
              <draw:equation draw:name="f18" draw:formula="1830936*logwidth/1830936"/>
              <draw:equation draw:name="f19" draw:formula="1701499*logheight/1994929"/>
              <draw:equation draw:name="f20" draw:formula="553839*logwidth/1830936"/>
              <draw:equation draw:name="f21" draw:formula="1862525*logheight/1994929"/>
              <draw:equation draw:name="f22" draw:formula="39355*logwidth/1830936"/>
              <draw:equation draw:name="f23" draw:formula="671891*logheight/1994929"/>
              <draw:equation draw:name="f24" draw:formula="1127254*logwidth/1830936"/>
              <draw:equation draw:name="f25" draw:formula="16650*logheight/1994929"/>
              <draw:equation draw:name="f26" draw:formula="1830936*logwidth/1830936"/>
              <draw:equation draw:name="f27" draw:formula="1773817*logheight/2067247"/>
              <draw:equation draw:name="f28" draw:formula="553839*logwidth/1830936"/>
              <draw:equation draw:name="f29" draw:formula="1934843*logheight/2067247"/>
              <draw:equation draw:name="f30" draw:formula="39355*logwidth/1830936"/>
              <draw:equation draw:name="f31" draw:formula="744209*logheight/2067247"/>
              <draw:equation draw:name="f32" draw:formula="1135082*logwidth/1830936"/>
              <draw:equation draw:name="f33" draw:formula="13999*logheight/2067247"/>
              <draw:equation draw:name="f34" draw:formula="1830936*logwidth/1830936"/>
              <draw:equation draw:name="f35" draw:formula="1761285*logheight/2054715"/>
              <draw:equation draw:name="f36" draw:formula="553839*logwidth/1830936"/>
              <draw:equation draw:name="f37" draw:formula="1922311*logheight/2054715"/>
              <draw:equation draw:name="f38" draw:formula="39355*logwidth/1830936"/>
              <draw:equation draw:name="f39" draw:formula="731677*logheight/2054715"/>
              <draw:equation draw:name="f40" draw:formula="1135082*logwidth/1830936"/>
              <draw:equation draw:name="f41" draw:formula="1467*logheight/2054715"/>
              <draw:equation draw:name="f42" draw:formula="1830936*logwidth/1830936"/>
              <draw:equation draw:name="f43" draw:formula="1759414*logheight/2052844"/>
              <draw:equation draw:name="f44" draw:formula="553839*logwidth/1830936"/>
              <draw:equation draw:name="f45" draw:formula="1920440*logheight/2052844"/>
              <draw:equation draw:name="f46" draw:formula="39355*logwidth/1830936"/>
              <draw:equation draw:name="f47" draw:formula="729806*logheight/2052844"/>
              <draw:equation draw:name="f48" draw:formula="1083718*logwidth/1830936"/>
              <draw:equation draw:name="f49" draw:formula="1475*logheight/2052844"/>
              <draw:equation draw:name="f50" draw:formula="1830936*logwidth/1830936"/>
              <draw:equation draw:name="f51" draw:formula="1771861*logheight/2065291"/>
              <draw:equation draw:name="f52" draw:formula="553839*logwidth/1830936"/>
              <draw:equation draw:name="f53" draw:formula="1932887*logheight/2065291"/>
              <draw:equation draw:name="f54" draw:formula="39355*logwidth/1830936"/>
              <draw:equation draw:name="f55" draw:formula="742253*logheight/2065291"/>
              <draw:equation draw:name="f56" draw:formula="1098058*logwidth/1830936"/>
              <draw:equation draw:name="f57" draw:formula="1421*logheight/2065291"/>
              <draw:equation draw:name="f58" draw:formula="logwidth"/>
              <draw:equation draw:name="f59" draw:formula="logheight"/>
            </draw:enhanced-geometry>
          </draw:custom-shape>
          <draw:custom-shape draw:name="フリーフォーム 20" draw:style-name="gr64" draw:text-style-name="P38" draw:layer="layout" svg:width="2.514cm" svg:height="0.654cm" svg:x="3.441cm" svg:y="10.633cm">
            <text:p/>
            <draw:enhanced-geometry draw:mirror-horizontal="false" draw:mirror-vertical="false" svg:viewBox="0 0 0 0" draw:glue-points="?f0 ?f1 ?f2 ?f3 ?f4 ?f5 ?f6 ?f7 ?f8 ?f9 ?f10 ?f11 ?f12 ?f13 ?f14 ?f15 ?f16 ?f17" drawooo:sub-view-size="5762625 1443037" draw:text-areas="0 0 ?f18 ?f19" draw:type="ooxml-non-primitive" draw:enhanced-path="M 0 4762 C 241697 721518 483394 1438275 723900 1438275 964406 1438275 1203325 3968 1443037 4762 1682749 5556 1921669 1443831 2162175 1443037 2402681 1442243 2646363 0 2886075 0 3125787 0 3359944 1443037 3600450 1443037 3840956 1443037 4087812 794 4329112 0 4570412 -794 4809331 1437481 5048250 1438275 5287169 1439069 5524897 721915 5762625 4762 N">
              <draw:equation draw:name="f0" draw:formula="0*logwidth/5762625"/>
              <draw:equation draw:name="f1" draw:formula="4762*logheight/1443037"/>
              <draw:equation draw:name="f2" draw:formula="723900*logwidth/5762625"/>
              <draw:equation draw:name="f3" draw:formula="1438275*logheight/1443037"/>
              <draw:equation draw:name="f4" draw:formula="1443037*logwidth/5762625"/>
              <draw:equation draw:name="f5" draw:formula="4762*logheight/1443037"/>
              <draw:equation draw:name="f6" draw:formula="2162175*logwidth/5762625"/>
              <draw:equation draw:name="f7" draw:formula="1443037*logheight/1443037"/>
              <draw:equation draw:name="f8" draw:formula="2886075*logwidth/5762625"/>
              <draw:equation draw:name="f9" draw:formula="0*logheight/1443037"/>
              <draw:equation draw:name="f10" draw:formula="3600450*logwidth/5762625"/>
              <draw:equation draw:name="f11" draw:formula="1443037*logheight/1443037"/>
              <draw:equation draw:name="f12" draw:formula="4329112*logwidth/5762625"/>
              <draw:equation draw:name="f13" draw:formula="0*logheight/1443037"/>
              <draw:equation draw:name="f14" draw:formula="5048250*logwidth/5762625"/>
              <draw:equation draw:name="f15" draw:formula="1438275*logheight/1443037"/>
              <draw:equation draw:name="f16" draw:formula="5762625*logwidth/5762625"/>
              <draw:equation draw:name="f17" draw:formula="4762*logheight/1443037"/>
              <draw:equation draw:name="f18" draw:formula="logwidth"/>
              <draw:equation draw:name="f19" draw:formula="logheight"/>
            </draw:enhanced-geometry>
          </draw:custom-shape>
          <draw:custom-shape draw:name="円/楕円 21" draw:style-name="gr67" draw:text-style-name="P41" draw:layer="layout" svg:width="0.593cm" svg:height="0.678cm" svg:x="4.024cm" svg:y="9.227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7" draw:style-name="gr67" draw:text-style-name="P41" draw:layer="layout" svg:width="0.593cm" svg:height="0.678cm" svg:x="4.788cm" svg:y="9.65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リモデリング (7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骨リ</text:span><text:span text:style-name="T22">モデ</text:span><text:span text:style-name="T22">リン</text:span><text:span text:style-name="T22">グ</text:span></text:p>
          </draw:text-box>
        </draw:frame>
        <draw:custom-shape draw:name="角丸四角形 3" draw:style-name="gr62" draw:text-style-name="P38" draw:layer="layout" svg:width="10.6cm" svg:height="6.2cm" svg:x="2.899cm" svg:y="11.3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テキスト ボックス 14" draw:style-name="gr94" draw:text-style-name="P44" draw:layer="layout" svg:width="3.482cm" svg:height="1.013cm" svg:x="2.017cm" svg:y="7.699cm">
          <text:p text:style-name="P43"><text:span text:style-name="T25">破骨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95" draw:text-style-name="P31" xml:id="id27" draw:id="id27" draw:layer="layout" svg:width="4.727cm" svg:height="1.098cm" svg:x="4.699cm" svg:y="5.725cm">
          <text:p text:style-name="P30"><text:span text:style-name="T42">TRACP-5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矢印コネクタ 17" draw:style-name="gr87" draw:text-style-name="P27" draw:layer="layout" draw:type="line" svg:x1="5.582cm" svg:y1="9.033cm" svg:x2="7.062cm" svg:y2="6.823cm" draw:end-shape="id27" draw:end-glue-point="2" svg:d="M5582 9033l1480-2210" svg:viewBox="0 0 1481 2211">
          <text:p/>
        </draw:connector>
        <draw:custom-shape draw:name="角丸四角形 12" draw:style-name="gr73" draw:text-style-name="P45" draw:layer="layout" svg:width="8.804cm" svg:height="4.793cm" svg:x="4.095cm" svg:y="11.2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g draw:name="グループ化 24" draw:style-name="gr63">
          <draw:custom-shape draw:name="角丸四角形 22" draw:style-name="gr64" draw:text-style-name="P38" draw:layer="layout" svg:width="3.429cm" svg:height="2.257cm" svg:x="4.321cm" svg:y="13.79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円/楕円 23" draw:style-name="gr67" draw:text-style-name="P41" draw:layer="layout" svg:width="0.789cm" svg:height="0.902cm" svg:x="5.641cm" svg:y="14.47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テキスト ボックス 25" draw:style-name="gr96" draw:text-style-name="P44" draw:layer="layout" svg:width="3.482cm" svg:height="1.013cm" svg:x="4.798cm" svg:y="12.777cm">
          <text:p text:style-name="P43"><text:span text:style-name="T29">骨芽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27" draw:style-name="gr97" draw:text-style-name="P50" draw:layer="layout" svg:width="2.603cm" svg:height="0.303cm" svg:x="7.299cm" svg:y="14.75cm">
          <text:p/>
          <draw:enhanced-geometry draw:mirror-horizontal="false" draw:mirror-vertical="false" svg:viewBox="0 0 0 0" draw:glue-points="?f0 ?f1 ?f2 ?f3 ?f4 ?f5 ?f6 ?f7 ?f8 ?f9 ?f10 ?f11 ?f12 ?f13 ?f14 ?f15" drawooo:sub-view-size="4306824 1435610" draw:text-areas="0 0 ?f16 ?f17" draw:type="ooxml-non-primitive" draw:enhanced-path="M 0 1 C 236982 717043 473964 1434085 713232 1435609 952500 1437133 1193292 10669 1435608 9145 1677924 7621 1929384 1427989 2167128 1426465 2404872 1424941 2624328 -1523 2862072 1 3099816 1525 3352800 1435609 3593592 1435609 3834384 1435609 4306824 1 4306824 1 L 4306824 1 N">
            <draw:equation draw:name="f0" draw:formula="0*logwidth/4306824"/>
            <draw:equation draw:name="f1" draw:formula="1*logheight/1435610"/>
            <draw:equation draw:name="f2" draw:formula="713232*logwidth/4306824"/>
            <draw:equation draw:name="f3" draw:formula="1435609*logheight/1435610"/>
            <draw:equation draw:name="f4" draw:formula="1435608*logwidth/4306824"/>
            <draw:equation draw:name="f5" draw:formula="9145*logheight/1435610"/>
            <draw:equation draw:name="f6" draw:formula="2167128*logwidth/4306824"/>
            <draw:equation draw:name="f7" draw:formula="1426465*logheight/1435610"/>
            <draw:equation draw:name="f8" draw:formula="2862072*logwidth/4306824"/>
            <draw:equation draw:name="f9" draw:formula="1*logheight/1435610"/>
            <draw:equation draw:name="f10" draw:formula="3593592*logwidth/4306824"/>
            <draw:equation draw:name="f11" draw:formula="1435609*logheight/1435610"/>
            <draw:equation draw:name="f12" draw:formula="4306824*logwidth/4306824"/>
            <draw:equation draw:name="f13" draw:formula="1*logheight/1435610"/>
            <draw:equation draw:name="f14" draw:formula="4306824*logwidth/4306824"/>
            <draw:equation draw:name="f15" draw:formula="1*logheight/1435610"/>
            <draw:equation draw:name="f16" draw:formula="logwidth"/>
            <draw:equation draw:name="f17" draw:formula="logheight"/>
          </draw:enhanced-geometry>
        </draw:custom-shape>
        <draw:custom-shape draw:name="フリーフォーム 29" draw:style-name="gr97" draw:text-style-name="P50" draw:layer="layout" svg:width="2.603cm" svg:height="0.303cm" svg:x="7.628cm" svg:y="14.726cm">
          <text:p/>
          <draw:enhanced-geometry draw:mirror-horizontal="false" draw:mirror-vertical="false" svg:viewBox="0 0 0 0" draw:glue-points="?f0 ?f1 ?f2 ?f3 ?f4 ?f5 ?f6 ?f7 ?f8 ?f9 ?f10 ?f11 ?f12 ?f13 ?f14 ?f15" drawooo:sub-view-size="4306824 1435610" draw:text-areas="0 0 ?f16 ?f17" draw:type="ooxml-non-primitive" draw:enhanced-path="M 0 1 C 236982 717043 473964 1434085 713232 1435609 952500 1437133 1193292 10669 1435608 9145 1677924 7621 1929384 1427989 2167128 1426465 2404872 1424941 2624328 -1523 2862072 1 3099816 1525 3352800 1435609 3593592 1435609 3834384 1435609 4306824 1 4306824 1 L 4306824 1 N">
            <draw:equation draw:name="f0" draw:formula="0*logwidth/4306824"/>
            <draw:equation draw:name="f1" draw:formula="1*logheight/1435610"/>
            <draw:equation draw:name="f2" draw:formula="713232*logwidth/4306824"/>
            <draw:equation draw:name="f3" draw:formula="1435609*logheight/1435610"/>
            <draw:equation draw:name="f4" draw:formula="1435608*logwidth/4306824"/>
            <draw:equation draw:name="f5" draw:formula="9145*logheight/1435610"/>
            <draw:equation draw:name="f6" draw:formula="2167128*logwidth/4306824"/>
            <draw:equation draw:name="f7" draw:formula="1426465*logheight/1435610"/>
            <draw:equation draw:name="f8" draw:formula="2862072*logwidth/4306824"/>
            <draw:equation draw:name="f9" draw:formula="1*logheight/1435610"/>
            <draw:equation draw:name="f10" draw:formula="3593592*logwidth/4306824"/>
            <draw:equation draw:name="f11" draw:formula="1435609*logheight/1435610"/>
            <draw:equation draw:name="f12" draw:formula="4306824*logwidth/4306824"/>
            <draw:equation draw:name="f13" draw:formula="1*logheight/1435610"/>
            <draw:equation draw:name="f14" draw:formula="4306824*logwidth/4306824"/>
            <draw:equation draw:name="f15" draw:formula="1*logheight/1435610"/>
            <draw:equation draw:name="f16" draw:formula="logwidth"/>
            <draw:equation draw:name="f17" draw:formula="logheight"/>
          </draw:enhanced-geometry>
        </draw:custom-shape>
        <draw:custom-shape draw:name="テキスト ボックス 31" draw:style-name="gr98" draw:text-style-name="P31" draw:layer="layout" svg:width="4.628cm" svg:height="0.844cm" svg:x="7.071cm" svg:y="15.071cm">
          <text:p text:style-name="P30"><text:span text:style-name="T46">I</text:span><text:span text:style-name="T47">型コラーゲ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7" draw:style-name="gr99" draw:text-style-name="P44" draw:layer="layout" svg:width="8cm" svg:height="1.944cm" svg:x="14.7cm" svg:y="5.525cm">
          <text:p text:style-name="P43"><text:span text:style-name="T39">骨形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0" draw:style-name="gr63">
          <draw:custom-shape draw:name="弦 3" draw:style-name="gr64" draw:text-style-name="P38" draw:layer="layout" svg:width="2.372cm" svg:height="2.675cm" draw:transform="rotate (-1.96611340237161) translate (6.49cm 9.357cm)">
            <text:p/>
            <draw:enhanced-geometry draw:mirror-horizontal="false" draw:mirror-vertical="false" svg:viewBox="0 0 0 0" draw:glue-points="?f50 ?f51 ?f52 ?f53 ?f54 ?f55 ?f56 ?f57" drawooo:sub-view-size="1830936 2065291" draw:text-areas="0 0 ?f58 ?f59" draw:type="ooxml-non-primitive" draw:enhanced-path="M 1830936 1771861 C 1488515 2091834 969709 2157249 553839 1932887 118819 1698193 -93718 1206332 39355 742253 169018 290066 503189 -23836 1098058 1421 N">
              <draw:equation draw:name="f0" draw:formula="1830827*logwidth/2160240"/>
              <draw:equation draw:name="f1" draw:formula="1794823*logheight/2088232"/>
              <draw:equation draw:name="f2" draw:formula="553730*logwidth/2160240"/>
              <draw:equation draw:name="f3" draw:formula="1955849*logheight/2088232"/>
              <draw:equation draw:name="f4" draw:formula="39246*logwidth/2160240"/>
              <draw:equation draw:name="f5" draw:formula="765215*logheight/2088232"/>
              <draw:equation draw:name="f6" draw:formula="1080119*logwidth/2160240"/>
              <draw:equation draw:name="f7" draw:formula="0*logheight/2088232"/>
              <draw:equation draw:name="f8" draw:formula="1830827*logwidth/2160240"/>
              <draw:equation draw:name="f9" draw:formula="1794823*logheight/2088232"/>
              <draw:equation draw:name="f10" draw:formula="1830936*logwidth/1830936"/>
              <draw:equation draw:name="f11" draw:formula="1719294*logheight/2012724"/>
              <draw:equation draw:name="f12" draw:formula="553839*logwidth/1830936"/>
              <draw:equation draw:name="f13" draw:formula="1880320*logheight/2012724"/>
              <draw:equation draw:name="f14" draw:formula="39355*logwidth/1830936"/>
              <draw:equation draw:name="f15" draw:formula="689686*logheight/2012724"/>
              <draw:equation draw:name="f16" draw:formula="1171668*logwidth/1830936"/>
              <draw:equation draw:name="f17" draw:formula="15911*logheight/2012724"/>
              <draw:equation draw:name="f18" draw:formula="1830936*logwidth/1830936"/>
              <draw:equation draw:name="f19" draw:formula="1701499*logheight/1994929"/>
              <draw:equation draw:name="f20" draw:formula="553839*logwidth/1830936"/>
              <draw:equation draw:name="f21" draw:formula="1862525*logheight/1994929"/>
              <draw:equation draw:name="f22" draw:formula="39355*logwidth/1830936"/>
              <draw:equation draw:name="f23" draw:formula="671891*logheight/1994929"/>
              <draw:equation draw:name="f24" draw:formula="1127254*logwidth/1830936"/>
              <draw:equation draw:name="f25" draw:formula="16650*logheight/1994929"/>
              <draw:equation draw:name="f26" draw:formula="1830936*logwidth/1830936"/>
              <draw:equation draw:name="f27" draw:formula="1773817*logheight/2067247"/>
              <draw:equation draw:name="f28" draw:formula="553839*logwidth/1830936"/>
              <draw:equation draw:name="f29" draw:formula="1934843*logheight/2067247"/>
              <draw:equation draw:name="f30" draw:formula="39355*logwidth/1830936"/>
              <draw:equation draw:name="f31" draw:formula="744209*logheight/2067247"/>
              <draw:equation draw:name="f32" draw:formula="1135082*logwidth/1830936"/>
              <draw:equation draw:name="f33" draw:formula="13999*logheight/2067247"/>
              <draw:equation draw:name="f34" draw:formula="1830936*logwidth/1830936"/>
              <draw:equation draw:name="f35" draw:formula="1761285*logheight/2054715"/>
              <draw:equation draw:name="f36" draw:formula="553839*logwidth/1830936"/>
              <draw:equation draw:name="f37" draw:formula="1922311*logheight/2054715"/>
              <draw:equation draw:name="f38" draw:formula="39355*logwidth/1830936"/>
              <draw:equation draw:name="f39" draw:formula="731677*logheight/2054715"/>
              <draw:equation draw:name="f40" draw:formula="1135082*logwidth/1830936"/>
              <draw:equation draw:name="f41" draw:formula="1467*logheight/2054715"/>
              <draw:equation draw:name="f42" draw:formula="1830936*logwidth/1830936"/>
              <draw:equation draw:name="f43" draw:formula="1759414*logheight/2052844"/>
              <draw:equation draw:name="f44" draw:formula="553839*logwidth/1830936"/>
              <draw:equation draw:name="f45" draw:formula="1920440*logheight/2052844"/>
              <draw:equation draw:name="f46" draw:formula="39355*logwidth/1830936"/>
              <draw:equation draw:name="f47" draw:formula="729806*logheight/2052844"/>
              <draw:equation draw:name="f48" draw:formula="1083718*logwidth/1830936"/>
              <draw:equation draw:name="f49" draw:formula="1475*logheight/2052844"/>
              <draw:equation draw:name="f50" draw:formula="1830936*logwidth/1830936"/>
              <draw:equation draw:name="f51" draw:formula="1771861*logheight/2065291"/>
              <draw:equation draw:name="f52" draw:formula="553839*logwidth/1830936"/>
              <draw:equation draw:name="f53" draw:formula="1932887*logheight/2065291"/>
              <draw:equation draw:name="f54" draw:formula="39355*logwidth/1830936"/>
              <draw:equation draw:name="f55" draw:formula="742253*logheight/2065291"/>
              <draw:equation draw:name="f56" draw:formula="1098058*logwidth/1830936"/>
              <draw:equation draw:name="f57" draw:formula="1421*logheight/2065291"/>
              <draw:equation draw:name="f58" draw:formula="logwidth"/>
              <draw:equation draw:name="f59" draw:formula="logheight"/>
            </draw:enhanced-geometry>
          </draw:custom-shape>
          <draw:custom-shape draw:name="フリーフォーム 26" draw:style-name="gr64" draw:text-style-name="P38" draw:layer="layout" svg:width="2.514cm" svg:height="0.654cm" svg:x="3.441cm" svg:y="10.633cm">
            <text:p/>
            <draw:enhanced-geometry draw:mirror-horizontal="false" draw:mirror-vertical="false" svg:viewBox="0 0 0 0" draw:glue-points="?f0 ?f1 ?f2 ?f3 ?f4 ?f5 ?f6 ?f7 ?f8 ?f9 ?f10 ?f11 ?f12 ?f13 ?f14 ?f15 ?f16 ?f17" drawooo:sub-view-size="5762625 1443037" draw:text-areas="0 0 ?f18 ?f19" draw:type="ooxml-non-primitive" draw:enhanced-path="M 0 4762 C 241697 721518 483394 1438275 723900 1438275 964406 1438275 1203325 3968 1443037 4762 1682749 5556 1921669 1443831 2162175 1443037 2402681 1442243 2646363 0 2886075 0 3125787 0 3359944 1443037 3600450 1443037 3840956 1443037 4087812 794 4329112 0 4570412 -794 4809331 1437481 5048250 1438275 5287169 1439069 5524897 721915 5762625 4762 N">
              <draw:equation draw:name="f0" draw:formula="0*logwidth/5762625"/>
              <draw:equation draw:name="f1" draw:formula="4762*logheight/1443037"/>
              <draw:equation draw:name="f2" draw:formula="723900*logwidth/5762625"/>
              <draw:equation draw:name="f3" draw:formula="1438275*logheight/1443037"/>
              <draw:equation draw:name="f4" draw:formula="1443037*logwidth/5762625"/>
              <draw:equation draw:name="f5" draw:formula="4762*logheight/1443037"/>
              <draw:equation draw:name="f6" draw:formula="2162175*logwidth/5762625"/>
              <draw:equation draw:name="f7" draw:formula="1443037*logheight/1443037"/>
              <draw:equation draw:name="f8" draw:formula="2886075*logwidth/5762625"/>
              <draw:equation draw:name="f9" draw:formula="0*logheight/1443037"/>
              <draw:equation draw:name="f10" draw:formula="3600450*logwidth/5762625"/>
              <draw:equation draw:name="f11" draw:formula="1443037*logheight/1443037"/>
              <draw:equation draw:name="f12" draw:formula="4329112*logwidth/5762625"/>
              <draw:equation draw:name="f13" draw:formula="0*logheight/1443037"/>
              <draw:equation draw:name="f14" draw:formula="5048250*logwidth/5762625"/>
              <draw:equation draw:name="f15" draw:formula="1438275*logheight/1443037"/>
              <draw:equation draw:name="f16" draw:formula="5762625*logwidth/5762625"/>
              <draw:equation draw:name="f17" draw:formula="4762*logheight/1443037"/>
              <draw:equation draw:name="f18" draw:formula="logwidth"/>
              <draw:equation draw:name="f19" draw:formula="logheight"/>
            </draw:enhanced-geometry>
          </draw:custom-shape>
          <draw:custom-shape draw:name="円/楕円 28" draw:style-name="gr67" draw:text-style-name="P41" draw:layer="layout" svg:width="0.593cm" svg:height="0.678cm" svg:x="4.024cm" svg:y="9.227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0" draw:style-name="gr67" draw:text-style-name="P41" draw:layer="layout" svg:width="0.593cm" svg:height="0.678cm" svg:x="4.788cm" svg:y="9.65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リモデリング (8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骨リ</text:span><text:span text:style-name="T22">モデ</text:span><text:span text:style-name="T22">リン</text:span><text:span text:style-name="T22">グ</text:span></text:p>
          </draw:text-box>
        </draw:frame>
        <draw:custom-shape draw:name="角丸四角形 3" draw:style-name="gr62" draw:text-style-name="P38" draw:layer="layout" svg:width="10.6cm" svg:height="6.2cm" svg:x="2.899cm" svg:y="11.3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テキスト ボックス 14" draw:style-name="gr100" draw:text-style-name="P44" draw:layer="layout" svg:width="3.482cm" svg:height="1.013cm" svg:x="2.017cm" svg:y="7.699cm">
          <text:p text:style-name="P43"><text:span text:style-name="T25">破骨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101" draw:text-style-name="P31" xml:id="id28" draw:id="id28" draw:layer="layout" svg:width="4.727cm" svg:height="1.098cm" svg:x="4.699cm" svg:y="5.725cm">
          <text:p text:style-name="P30"><text:span text:style-name="T42">TRACP-5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矢印コネクタ 17" draw:style-name="gr87" draw:text-style-name="P27" draw:layer="layout" draw:type="line" svg:x1="5.582cm" svg:y1="9.033cm" svg:x2="7.062cm" svg:y2="6.823cm" draw:end-shape="id28" draw:end-glue-point="2" svg:d="M5582 9033l1480-2210" svg:viewBox="0 0 1481 2211">
          <text:p/>
        </draw:connector>
        <draw:custom-shape draw:name="角丸四角形 12" draw:style-name="gr73" draw:text-style-name="P45" draw:layer="layout" svg:width="8.804cm" svg:height="4.793cm" svg:x="4.095cm" svg:y="11.2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g draw:name="グループ化 24" draw:style-name="gr63">
          <draw:custom-shape draw:name="角丸四角形 22" draw:style-name="gr64" draw:text-style-name="P38" draw:layer="layout" svg:width="3.429cm" svg:height="2.257cm" svg:x="4.321cm" svg:y="13.79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円/楕円 23" draw:style-name="gr67" draw:text-style-name="P41" draw:layer="layout" svg:width="0.789cm" svg:height="0.902cm" svg:x="5.641cm" svg:y="14.47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テキスト ボックス 25" draw:style-name="gr102" draw:text-style-name="P44" draw:layer="layout" svg:width="3.482cm" svg:height="1.013cm" svg:x="4.798cm" svg:y="12.777cm">
          <text:p text:style-name="P43"><text:span text:style-name="T29">骨芽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27" draw:style-name="gr97" draw:text-style-name="P50" draw:layer="layout" svg:width="2.603cm" svg:height="0.303cm" svg:x="7.299cm" svg:y="14.75cm">
          <text:p/>
          <draw:enhanced-geometry draw:mirror-horizontal="false" draw:mirror-vertical="false" svg:viewBox="0 0 0 0" draw:glue-points="?f0 ?f1 ?f2 ?f3 ?f4 ?f5 ?f6 ?f7 ?f8 ?f9 ?f10 ?f11 ?f12 ?f13 ?f14 ?f15" drawooo:sub-view-size="4306824 1435610" draw:text-areas="0 0 ?f16 ?f17" draw:type="ooxml-non-primitive" draw:enhanced-path="M 0 1 C 236982 717043 473964 1434085 713232 1435609 952500 1437133 1193292 10669 1435608 9145 1677924 7621 1929384 1427989 2167128 1426465 2404872 1424941 2624328 -1523 2862072 1 3099816 1525 3352800 1435609 3593592 1435609 3834384 1435609 4306824 1 4306824 1 L 4306824 1 N">
            <draw:equation draw:name="f0" draw:formula="0*logwidth/4306824"/>
            <draw:equation draw:name="f1" draw:formula="1*logheight/1435610"/>
            <draw:equation draw:name="f2" draw:formula="713232*logwidth/4306824"/>
            <draw:equation draw:name="f3" draw:formula="1435609*logheight/1435610"/>
            <draw:equation draw:name="f4" draw:formula="1435608*logwidth/4306824"/>
            <draw:equation draw:name="f5" draw:formula="9145*logheight/1435610"/>
            <draw:equation draw:name="f6" draw:formula="2167128*logwidth/4306824"/>
            <draw:equation draw:name="f7" draw:formula="1426465*logheight/1435610"/>
            <draw:equation draw:name="f8" draw:formula="2862072*logwidth/4306824"/>
            <draw:equation draw:name="f9" draw:formula="1*logheight/1435610"/>
            <draw:equation draw:name="f10" draw:formula="3593592*logwidth/4306824"/>
            <draw:equation draw:name="f11" draw:formula="1435609*logheight/1435610"/>
            <draw:equation draw:name="f12" draw:formula="4306824*logwidth/4306824"/>
            <draw:equation draw:name="f13" draw:formula="1*logheight/1435610"/>
            <draw:equation draw:name="f14" draw:formula="4306824*logwidth/4306824"/>
            <draw:equation draw:name="f15" draw:formula="1*logheight/1435610"/>
            <draw:equation draw:name="f16" draw:formula="logwidth"/>
            <draw:equation draw:name="f17" draw:formula="logheight"/>
          </draw:enhanced-geometry>
        </draw:custom-shape>
        <draw:custom-shape draw:name="フリーフォーム 29" draw:style-name="gr97" draw:text-style-name="P50" draw:layer="layout" svg:width="2.603cm" svg:height="0.303cm" svg:x="7.628cm" svg:y="14.726cm">
          <text:p/>
          <draw:enhanced-geometry draw:mirror-horizontal="false" draw:mirror-vertical="false" svg:viewBox="0 0 0 0" draw:glue-points="?f0 ?f1 ?f2 ?f3 ?f4 ?f5 ?f6 ?f7 ?f8 ?f9 ?f10 ?f11 ?f12 ?f13 ?f14 ?f15" drawooo:sub-view-size="4306824 1435610" draw:text-areas="0 0 ?f16 ?f17" draw:type="ooxml-non-primitive" draw:enhanced-path="M 0 1 C 236982 717043 473964 1434085 713232 1435609 952500 1437133 1193292 10669 1435608 9145 1677924 7621 1929384 1427989 2167128 1426465 2404872 1424941 2624328 -1523 2862072 1 3099816 1525 3352800 1435609 3593592 1435609 3834384 1435609 4306824 1 4306824 1 L 4306824 1 N">
            <draw:equation draw:name="f0" draw:formula="0*logwidth/4306824"/>
            <draw:equation draw:name="f1" draw:formula="1*logheight/1435610"/>
            <draw:equation draw:name="f2" draw:formula="713232*logwidth/4306824"/>
            <draw:equation draw:name="f3" draw:formula="1435609*logheight/1435610"/>
            <draw:equation draw:name="f4" draw:formula="1435608*logwidth/4306824"/>
            <draw:equation draw:name="f5" draw:formula="9145*logheight/1435610"/>
            <draw:equation draw:name="f6" draw:formula="2167128*logwidth/4306824"/>
            <draw:equation draw:name="f7" draw:formula="1426465*logheight/1435610"/>
            <draw:equation draw:name="f8" draw:formula="2862072*logwidth/4306824"/>
            <draw:equation draw:name="f9" draw:formula="1*logheight/1435610"/>
            <draw:equation draw:name="f10" draw:formula="3593592*logwidth/4306824"/>
            <draw:equation draw:name="f11" draw:formula="1435609*logheight/1435610"/>
            <draw:equation draw:name="f12" draw:formula="4306824*logwidth/4306824"/>
            <draw:equation draw:name="f13" draw:formula="1*logheight/1435610"/>
            <draw:equation draw:name="f14" draw:formula="4306824*logwidth/4306824"/>
            <draw:equation draw:name="f15" draw:formula="1*logheight/1435610"/>
            <draw:equation draw:name="f16" draw:formula="logwidth"/>
            <draw:equation draw:name="f17" draw:formula="logheight"/>
          </draw:enhanced-geometry>
        </draw:custom-shape>
        <draw:custom-shape draw:name="テキスト ボックス 31" draw:style-name="gr103" draw:text-style-name="P31" draw:layer="layout" svg:width="4.628cm" svg:height="0.844cm" svg:x="7.071cm" svg:y="15.071cm">
          <text:p text:style-name="P30"><text:span text:style-name="T46">I</text:span><text:span text:style-name="T47">型コラーゲ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32" draw:style-name="gr104" draw:text-style-name="P38" draw:layer="layout" svg:width="2.399cm" svg:height="2.731cm" svg:x="10.489cm" svg:y="12.39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テキスト ボックス 33" draw:style-name="gr105" draw:text-style-name="P29" draw:layer="layout" svg:width="1.999cm" svg:height="1.013cm" svg:x="10.689cm" svg:y="13.246cm">
          <text:p text:style-name="P28"><text:span text:style-name="T48">類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6" draw:style-name="gr106" draw:text-style-name="P44" draw:layer="layout" svg:width="8cm" svg:height="1.944cm" svg:x="14.7cm" svg:y="5.525cm">
          <text:p text:style-name="P43"><text:span text:style-name="T39">骨形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8" draw:style-name="gr63">
          <draw:custom-shape draw:name="弦 3" draw:style-name="gr64" draw:text-style-name="P38" draw:layer="layout" svg:width="2.372cm" svg:height="2.675cm" draw:transform="rotate (-1.96611340237161) translate (6.49cm 9.357cm)">
            <text:p/>
            <draw:enhanced-geometry draw:mirror-horizontal="false" draw:mirror-vertical="false" svg:viewBox="0 0 0 0" draw:glue-points="?f50 ?f51 ?f52 ?f53 ?f54 ?f55 ?f56 ?f57" drawooo:sub-view-size="1830936 2065291" draw:text-areas="0 0 ?f58 ?f59" draw:type="ooxml-non-primitive" draw:enhanced-path="M 1830936 1771861 C 1488515 2091834 969709 2157249 553839 1932887 118819 1698193 -93718 1206332 39355 742253 169018 290066 503189 -23836 1098058 1421 N">
              <draw:equation draw:name="f0" draw:formula="1830827*logwidth/2160240"/>
              <draw:equation draw:name="f1" draw:formula="1794823*logheight/2088232"/>
              <draw:equation draw:name="f2" draw:formula="553730*logwidth/2160240"/>
              <draw:equation draw:name="f3" draw:formula="1955849*logheight/2088232"/>
              <draw:equation draw:name="f4" draw:formula="39246*logwidth/2160240"/>
              <draw:equation draw:name="f5" draw:formula="765215*logheight/2088232"/>
              <draw:equation draw:name="f6" draw:formula="1080119*logwidth/2160240"/>
              <draw:equation draw:name="f7" draw:formula="0*logheight/2088232"/>
              <draw:equation draw:name="f8" draw:formula="1830827*logwidth/2160240"/>
              <draw:equation draw:name="f9" draw:formula="1794823*logheight/2088232"/>
              <draw:equation draw:name="f10" draw:formula="1830936*logwidth/1830936"/>
              <draw:equation draw:name="f11" draw:formula="1719294*logheight/2012724"/>
              <draw:equation draw:name="f12" draw:formula="553839*logwidth/1830936"/>
              <draw:equation draw:name="f13" draw:formula="1880320*logheight/2012724"/>
              <draw:equation draw:name="f14" draw:formula="39355*logwidth/1830936"/>
              <draw:equation draw:name="f15" draw:formula="689686*logheight/2012724"/>
              <draw:equation draw:name="f16" draw:formula="1171668*logwidth/1830936"/>
              <draw:equation draw:name="f17" draw:formula="15911*logheight/2012724"/>
              <draw:equation draw:name="f18" draw:formula="1830936*logwidth/1830936"/>
              <draw:equation draw:name="f19" draw:formula="1701499*logheight/1994929"/>
              <draw:equation draw:name="f20" draw:formula="553839*logwidth/1830936"/>
              <draw:equation draw:name="f21" draw:formula="1862525*logheight/1994929"/>
              <draw:equation draw:name="f22" draw:formula="39355*logwidth/1830936"/>
              <draw:equation draw:name="f23" draw:formula="671891*logheight/1994929"/>
              <draw:equation draw:name="f24" draw:formula="1127254*logwidth/1830936"/>
              <draw:equation draw:name="f25" draw:formula="16650*logheight/1994929"/>
              <draw:equation draw:name="f26" draw:formula="1830936*logwidth/1830936"/>
              <draw:equation draw:name="f27" draw:formula="1773817*logheight/2067247"/>
              <draw:equation draw:name="f28" draw:formula="553839*logwidth/1830936"/>
              <draw:equation draw:name="f29" draw:formula="1934843*logheight/2067247"/>
              <draw:equation draw:name="f30" draw:formula="39355*logwidth/1830936"/>
              <draw:equation draw:name="f31" draw:formula="744209*logheight/2067247"/>
              <draw:equation draw:name="f32" draw:formula="1135082*logwidth/1830936"/>
              <draw:equation draw:name="f33" draw:formula="13999*logheight/2067247"/>
              <draw:equation draw:name="f34" draw:formula="1830936*logwidth/1830936"/>
              <draw:equation draw:name="f35" draw:formula="1761285*logheight/2054715"/>
              <draw:equation draw:name="f36" draw:formula="553839*logwidth/1830936"/>
              <draw:equation draw:name="f37" draw:formula="1922311*logheight/2054715"/>
              <draw:equation draw:name="f38" draw:formula="39355*logwidth/1830936"/>
              <draw:equation draw:name="f39" draw:formula="731677*logheight/2054715"/>
              <draw:equation draw:name="f40" draw:formula="1135082*logwidth/1830936"/>
              <draw:equation draw:name="f41" draw:formula="1467*logheight/2054715"/>
              <draw:equation draw:name="f42" draw:formula="1830936*logwidth/1830936"/>
              <draw:equation draw:name="f43" draw:formula="1759414*logheight/2052844"/>
              <draw:equation draw:name="f44" draw:formula="553839*logwidth/1830936"/>
              <draw:equation draw:name="f45" draw:formula="1920440*logheight/2052844"/>
              <draw:equation draw:name="f46" draw:formula="39355*logwidth/1830936"/>
              <draw:equation draw:name="f47" draw:formula="729806*logheight/2052844"/>
              <draw:equation draw:name="f48" draw:formula="1083718*logwidth/1830936"/>
              <draw:equation draw:name="f49" draw:formula="1475*logheight/2052844"/>
              <draw:equation draw:name="f50" draw:formula="1830936*logwidth/1830936"/>
              <draw:equation draw:name="f51" draw:formula="1771861*logheight/2065291"/>
              <draw:equation draw:name="f52" draw:formula="553839*logwidth/1830936"/>
              <draw:equation draw:name="f53" draw:formula="1932887*logheight/2065291"/>
              <draw:equation draw:name="f54" draw:formula="39355*logwidth/1830936"/>
              <draw:equation draw:name="f55" draw:formula="742253*logheight/2065291"/>
              <draw:equation draw:name="f56" draw:formula="1098058*logwidth/1830936"/>
              <draw:equation draw:name="f57" draw:formula="1421*logheight/2065291"/>
              <draw:equation draw:name="f58" draw:formula="logwidth"/>
              <draw:equation draw:name="f59" draw:formula="logheight"/>
            </draw:enhanced-geometry>
          </draw:custom-shape>
          <draw:custom-shape draw:name="フリーフォーム 34" draw:style-name="gr64" draw:text-style-name="P38" draw:layer="layout" svg:width="2.514cm" svg:height="0.654cm" svg:x="3.441cm" svg:y="10.633cm">
            <text:p/>
            <draw:enhanced-geometry draw:mirror-horizontal="false" draw:mirror-vertical="false" svg:viewBox="0 0 0 0" draw:glue-points="?f0 ?f1 ?f2 ?f3 ?f4 ?f5 ?f6 ?f7 ?f8 ?f9 ?f10 ?f11 ?f12 ?f13 ?f14 ?f15 ?f16 ?f17" drawooo:sub-view-size="5762625 1443037" draw:text-areas="0 0 ?f18 ?f19" draw:type="ooxml-non-primitive" draw:enhanced-path="M 0 4762 C 241697 721518 483394 1438275 723900 1438275 964406 1438275 1203325 3968 1443037 4762 1682749 5556 1921669 1443831 2162175 1443037 2402681 1442243 2646363 0 2886075 0 3125787 0 3359944 1443037 3600450 1443037 3840956 1443037 4087812 794 4329112 0 4570412 -794 4809331 1437481 5048250 1438275 5287169 1439069 5524897 721915 5762625 4762 N">
              <draw:equation draw:name="f0" draw:formula="0*logwidth/5762625"/>
              <draw:equation draw:name="f1" draw:formula="4762*logheight/1443037"/>
              <draw:equation draw:name="f2" draw:formula="723900*logwidth/5762625"/>
              <draw:equation draw:name="f3" draw:formula="1438275*logheight/1443037"/>
              <draw:equation draw:name="f4" draw:formula="1443037*logwidth/5762625"/>
              <draw:equation draw:name="f5" draw:formula="4762*logheight/1443037"/>
              <draw:equation draw:name="f6" draw:formula="2162175*logwidth/5762625"/>
              <draw:equation draw:name="f7" draw:formula="1443037*logheight/1443037"/>
              <draw:equation draw:name="f8" draw:formula="2886075*logwidth/5762625"/>
              <draw:equation draw:name="f9" draw:formula="0*logheight/1443037"/>
              <draw:equation draw:name="f10" draw:formula="3600450*logwidth/5762625"/>
              <draw:equation draw:name="f11" draw:formula="1443037*logheight/1443037"/>
              <draw:equation draw:name="f12" draw:formula="4329112*logwidth/5762625"/>
              <draw:equation draw:name="f13" draw:formula="0*logheight/1443037"/>
              <draw:equation draw:name="f14" draw:formula="5048250*logwidth/5762625"/>
              <draw:equation draw:name="f15" draw:formula="1438275*logheight/1443037"/>
              <draw:equation draw:name="f16" draw:formula="5762625*logwidth/5762625"/>
              <draw:equation draw:name="f17" draw:formula="4762*logheight/1443037"/>
              <draw:equation draw:name="f18" draw:formula="logwidth"/>
              <draw:equation draw:name="f19" draw:formula="logheight"/>
            </draw:enhanced-geometry>
          </draw:custom-shape>
          <draw:custom-shape draw:name="円/楕円 35" draw:style-name="gr67" draw:text-style-name="P41" draw:layer="layout" svg:width="0.593cm" svg:height="0.678cm" svg:x="4.024cm" svg:y="9.227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6" draw:style-name="gr67" draw:text-style-name="P41" draw:layer="layout" svg:width="0.593cm" svg:height="0.678cm" svg:x="4.788cm" svg:y="9.65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リモデリング (9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骨リ</text:span><text:span text:style-name="T22">モデ</text:span><text:span text:style-name="T22">リン</text:span><text:span text:style-name="T22">グ</text:span></text:p>
          </draw:text-box>
        </draw:frame>
        <draw:custom-shape draw:name="角丸四角形 3" draw:style-name="gr62" draw:text-style-name="P38" draw:layer="layout" svg:width="10.6cm" svg:height="6.2cm" svg:x="2.899cm" svg:y="11.3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テキスト ボックス 14" draw:style-name="gr107" draw:text-style-name="P44" draw:layer="layout" svg:width="3.482cm" svg:height="1.013cm" svg:x="2.017cm" svg:y="7.699cm">
          <text:p text:style-name="P43"><text:span text:style-name="T25">破骨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108" draw:text-style-name="P31" xml:id="id29" draw:id="id29" draw:layer="layout" svg:width="4.727cm" svg:height="1.098cm" svg:x="4.699cm" svg:y="5.725cm">
          <text:p text:style-name="P30"><text:span text:style-name="T42">TRACP-5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矢印コネクタ 17" draw:style-name="gr87" draw:text-style-name="P27" draw:layer="layout" draw:type="line" svg:x1="5.582cm" svg:y1="9.033cm" svg:x2="7.062cm" svg:y2="6.823cm" draw:end-shape="id29" draw:end-glue-point="2" svg:d="M5582 9033l1480-2210" svg:viewBox="0 0 1481 2211">
          <text:p/>
        </draw:connector>
        <draw:custom-shape draw:name="角丸四角形 12" draw:style-name="gr73" draw:text-style-name="P45" draw:layer="layout" svg:width="8.804cm" svg:height="4.793cm" svg:x="4.095cm" svg:y="11.2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g draw:name="グループ化 24" draw:style-name="gr63">
          <draw:custom-shape draw:name="角丸四角形 22" draw:style-name="gr64" draw:text-style-name="P38" draw:layer="layout" svg:width="3.429cm" svg:height="2.257cm" svg:x="4.321cm" svg:y="13.79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円/楕円 23" draw:style-name="gr67" draw:text-style-name="P41" draw:layer="layout" svg:width="0.789cm" svg:height="0.902cm" svg:x="5.641cm" svg:y="14.47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テキスト ボックス 25" draw:style-name="gr109" draw:text-style-name="P44" draw:layer="layout" svg:width="3.482cm" svg:height="1.013cm" svg:x="4.798cm" svg:y="12.777cm">
          <text:p text:style-name="P43"><text:span text:style-name="T29">骨芽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27" draw:style-name="gr97" draw:text-style-name="P50" draw:layer="layout" svg:width="2.603cm" svg:height="0.303cm" svg:x="7.299cm" svg:y="14.75cm">
          <text:p/>
          <draw:enhanced-geometry draw:mirror-horizontal="false" draw:mirror-vertical="false" svg:viewBox="0 0 0 0" draw:glue-points="?f0 ?f1 ?f2 ?f3 ?f4 ?f5 ?f6 ?f7 ?f8 ?f9 ?f10 ?f11 ?f12 ?f13 ?f14 ?f15" drawooo:sub-view-size="4306824 1435610" draw:text-areas="0 0 ?f16 ?f17" draw:type="ooxml-non-primitive" draw:enhanced-path="M 0 1 C 236982 717043 473964 1434085 713232 1435609 952500 1437133 1193292 10669 1435608 9145 1677924 7621 1929384 1427989 2167128 1426465 2404872 1424941 2624328 -1523 2862072 1 3099816 1525 3352800 1435609 3593592 1435609 3834384 1435609 4306824 1 4306824 1 L 4306824 1 N">
            <draw:equation draw:name="f0" draw:formula="0*logwidth/4306824"/>
            <draw:equation draw:name="f1" draw:formula="1*logheight/1435610"/>
            <draw:equation draw:name="f2" draw:formula="713232*logwidth/4306824"/>
            <draw:equation draw:name="f3" draw:formula="1435609*logheight/1435610"/>
            <draw:equation draw:name="f4" draw:formula="1435608*logwidth/4306824"/>
            <draw:equation draw:name="f5" draw:formula="9145*logheight/1435610"/>
            <draw:equation draw:name="f6" draw:formula="2167128*logwidth/4306824"/>
            <draw:equation draw:name="f7" draw:formula="1426465*logheight/1435610"/>
            <draw:equation draw:name="f8" draw:formula="2862072*logwidth/4306824"/>
            <draw:equation draw:name="f9" draw:formula="1*logheight/1435610"/>
            <draw:equation draw:name="f10" draw:formula="3593592*logwidth/4306824"/>
            <draw:equation draw:name="f11" draw:formula="1435609*logheight/1435610"/>
            <draw:equation draw:name="f12" draw:formula="4306824*logwidth/4306824"/>
            <draw:equation draw:name="f13" draw:formula="1*logheight/1435610"/>
            <draw:equation draw:name="f14" draw:formula="4306824*logwidth/4306824"/>
            <draw:equation draw:name="f15" draw:formula="1*logheight/1435610"/>
            <draw:equation draw:name="f16" draw:formula="logwidth"/>
            <draw:equation draw:name="f17" draw:formula="logheight"/>
          </draw:enhanced-geometry>
        </draw:custom-shape>
        <draw:custom-shape draw:name="フリーフォーム 29" draw:style-name="gr97" draw:text-style-name="P50" draw:layer="layout" svg:width="2.603cm" svg:height="0.303cm" svg:x="7.628cm" svg:y="14.726cm">
          <text:p/>
          <draw:enhanced-geometry draw:mirror-horizontal="false" draw:mirror-vertical="false" svg:viewBox="0 0 0 0" draw:glue-points="?f0 ?f1 ?f2 ?f3 ?f4 ?f5 ?f6 ?f7 ?f8 ?f9 ?f10 ?f11 ?f12 ?f13 ?f14 ?f15" drawooo:sub-view-size="4306824 1435610" draw:text-areas="0 0 ?f16 ?f17" draw:type="ooxml-non-primitive" draw:enhanced-path="M 0 1 C 236982 717043 473964 1434085 713232 1435609 952500 1437133 1193292 10669 1435608 9145 1677924 7621 1929384 1427989 2167128 1426465 2404872 1424941 2624328 -1523 2862072 1 3099816 1525 3352800 1435609 3593592 1435609 3834384 1435609 4306824 1 4306824 1 L 4306824 1 N">
            <draw:equation draw:name="f0" draw:formula="0*logwidth/4306824"/>
            <draw:equation draw:name="f1" draw:formula="1*logheight/1435610"/>
            <draw:equation draw:name="f2" draw:formula="713232*logwidth/4306824"/>
            <draw:equation draw:name="f3" draw:formula="1435609*logheight/1435610"/>
            <draw:equation draw:name="f4" draw:formula="1435608*logwidth/4306824"/>
            <draw:equation draw:name="f5" draw:formula="9145*logheight/1435610"/>
            <draw:equation draw:name="f6" draw:formula="2167128*logwidth/4306824"/>
            <draw:equation draw:name="f7" draw:formula="1426465*logheight/1435610"/>
            <draw:equation draw:name="f8" draw:formula="2862072*logwidth/4306824"/>
            <draw:equation draw:name="f9" draw:formula="1*logheight/1435610"/>
            <draw:equation draw:name="f10" draw:formula="3593592*logwidth/4306824"/>
            <draw:equation draw:name="f11" draw:formula="1435609*logheight/1435610"/>
            <draw:equation draw:name="f12" draw:formula="4306824*logwidth/4306824"/>
            <draw:equation draw:name="f13" draw:formula="1*logheight/1435610"/>
            <draw:equation draw:name="f14" draw:formula="4306824*logwidth/4306824"/>
            <draw:equation draw:name="f15" draw:formula="1*logheight/1435610"/>
            <draw:equation draw:name="f16" draw:formula="logwidth"/>
            <draw:equation draw:name="f17" draw:formula="logheight"/>
          </draw:enhanced-geometry>
        </draw:custom-shape>
        <draw:custom-shape draw:name="テキスト ボックス 31" draw:style-name="gr110" draw:text-style-name="P31" draw:layer="layout" svg:width="4.628cm" svg:height="0.844cm" svg:x="7.071cm" svg:y="15.071cm">
          <text:p text:style-name="P30"><text:span text:style-name="T46">I</text:span><text:span text:style-name="T47">型コラーゲ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32" draw:style-name="gr104" draw:text-style-name="P38" xml:id="id30" draw:id="id30" draw:layer="layout" svg:width="2.399cm" svg:height="2.731cm" svg:x="10.489cm" svg:y="12.393cm">
          <text:p text:style-name="P25"><text:span text:style-name="T29"/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テキスト ボックス 33" draw:style-name="gr111" draw:text-style-name="P29" draw:layer="layout" svg:width="1.999cm" svg:height="1.013cm" svg:x="10.689cm" svg:y="13.246cm">
          <text:p text:style-name="P28"><text:span text:style-name="T48">類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矢印コネクタ 35" draw:style-name="gr87" draw:text-style-name="P27" draw:layer="layout" draw:type="line" svg:x1="8.497cm" svg:y1="14.146cm" svg:x2="9.998cm" svg:y2="10.547cm" svg:d="M8497 14146l1501-3599" svg:viewBox="0 0 1502 3600">
          <text:p/>
        </draw:connector>
        <draw:custom-shape draw:name="テキスト ボックス 26" draw:style-name="gr112" draw:text-style-name="P44" draw:layer="layout" svg:width="8cm" svg:height="1.944cm" svg:x="14.7cm" svg:y="5.525cm">
          <text:p text:style-name="P43"><text:span text:style-name="T39">骨形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113" draw:text-style-name="P52" draw:layer="layout" svg:width="8cm" svg:height="2.283cm" svg:x="16.7cm" svg:y="11.481cm">
          <text:p text:style-name="P51"><text:span text:style-name="T49">Ca</text:span><text:span text:style-name="T50">と</text:span><text:span text:style-name="T50">P</text:span><text:span text:style-name="T50">が沈着して</text:span></text:p>
          <text:p text:style-name="P51"><text:span text:style-name="T50">骨にな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矢印コネクタ 10" draw:style-name="gr114" draw:text-style-name="P27" draw:layer="layout" draw:type="line" svg:x1="16.3cm" svg:y1="12.635cm" svg:x2="12.888cm" svg:y2="13.759cm" draw:end-shape="id30" draw:end-glue-point="10" svg:d="M16300 12635l-3412 1124" svg:viewBox="0 0 3413 1125">
          <text:p/>
        </draw:connector>
        <draw:g draw:name="グループ化 28" draw:style-name="gr63">
          <draw:custom-shape draw:name="弦 3" draw:style-name="gr64" draw:text-style-name="P38" draw:layer="layout" svg:width="2.372cm" svg:height="2.675cm" draw:transform="rotate (-1.96611340237161) translate (6.49cm 9.332cm)">
            <text:p/>
            <draw:enhanced-geometry draw:mirror-horizontal="false" draw:mirror-vertical="false" svg:viewBox="0 0 0 0" draw:glue-points="?f50 ?f51 ?f52 ?f53 ?f54 ?f55 ?f56 ?f57" drawooo:sub-view-size="1830936 2065291" draw:text-areas="0 0 ?f58 ?f59" draw:type="ooxml-non-primitive" draw:enhanced-path="M 1830936 1771861 C 1488515 2091834 969709 2157249 553839 1932887 118819 1698193 -93718 1206332 39355 742253 169018 290066 503189 -23836 1098058 1421 N">
              <draw:equation draw:name="f0" draw:formula="1830827*logwidth/2160240"/>
              <draw:equation draw:name="f1" draw:formula="1794823*logheight/2088232"/>
              <draw:equation draw:name="f2" draw:formula="553730*logwidth/2160240"/>
              <draw:equation draw:name="f3" draw:formula="1955849*logheight/2088232"/>
              <draw:equation draw:name="f4" draw:formula="39246*logwidth/2160240"/>
              <draw:equation draw:name="f5" draw:formula="765215*logheight/2088232"/>
              <draw:equation draw:name="f6" draw:formula="1080119*logwidth/2160240"/>
              <draw:equation draw:name="f7" draw:formula="0*logheight/2088232"/>
              <draw:equation draw:name="f8" draw:formula="1830827*logwidth/2160240"/>
              <draw:equation draw:name="f9" draw:formula="1794823*logheight/2088232"/>
              <draw:equation draw:name="f10" draw:formula="1830936*logwidth/1830936"/>
              <draw:equation draw:name="f11" draw:formula="1719294*logheight/2012724"/>
              <draw:equation draw:name="f12" draw:formula="553839*logwidth/1830936"/>
              <draw:equation draw:name="f13" draw:formula="1880320*logheight/2012724"/>
              <draw:equation draw:name="f14" draw:formula="39355*logwidth/1830936"/>
              <draw:equation draw:name="f15" draw:formula="689686*logheight/2012724"/>
              <draw:equation draw:name="f16" draw:formula="1171668*logwidth/1830936"/>
              <draw:equation draw:name="f17" draw:formula="15911*logheight/2012724"/>
              <draw:equation draw:name="f18" draw:formula="1830936*logwidth/1830936"/>
              <draw:equation draw:name="f19" draw:formula="1701499*logheight/1994929"/>
              <draw:equation draw:name="f20" draw:formula="553839*logwidth/1830936"/>
              <draw:equation draw:name="f21" draw:formula="1862525*logheight/1994929"/>
              <draw:equation draw:name="f22" draw:formula="39355*logwidth/1830936"/>
              <draw:equation draw:name="f23" draw:formula="671891*logheight/1994929"/>
              <draw:equation draw:name="f24" draw:formula="1127254*logwidth/1830936"/>
              <draw:equation draw:name="f25" draw:formula="16650*logheight/1994929"/>
              <draw:equation draw:name="f26" draw:formula="1830936*logwidth/1830936"/>
              <draw:equation draw:name="f27" draw:formula="1773817*logheight/2067247"/>
              <draw:equation draw:name="f28" draw:formula="553839*logwidth/1830936"/>
              <draw:equation draw:name="f29" draw:formula="1934843*logheight/2067247"/>
              <draw:equation draw:name="f30" draw:formula="39355*logwidth/1830936"/>
              <draw:equation draw:name="f31" draw:formula="744209*logheight/2067247"/>
              <draw:equation draw:name="f32" draw:formula="1135082*logwidth/1830936"/>
              <draw:equation draw:name="f33" draw:formula="13999*logheight/2067247"/>
              <draw:equation draw:name="f34" draw:formula="1830936*logwidth/1830936"/>
              <draw:equation draw:name="f35" draw:formula="1761285*logheight/2054715"/>
              <draw:equation draw:name="f36" draw:formula="553839*logwidth/1830936"/>
              <draw:equation draw:name="f37" draw:formula="1922311*logheight/2054715"/>
              <draw:equation draw:name="f38" draw:formula="39355*logwidth/1830936"/>
              <draw:equation draw:name="f39" draw:formula="731677*logheight/2054715"/>
              <draw:equation draw:name="f40" draw:formula="1135082*logwidth/1830936"/>
              <draw:equation draw:name="f41" draw:formula="1467*logheight/2054715"/>
              <draw:equation draw:name="f42" draw:formula="1830936*logwidth/1830936"/>
              <draw:equation draw:name="f43" draw:formula="1759414*logheight/2052844"/>
              <draw:equation draw:name="f44" draw:formula="553839*logwidth/1830936"/>
              <draw:equation draw:name="f45" draw:formula="1920440*logheight/2052844"/>
              <draw:equation draw:name="f46" draw:formula="39355*logwidth/1830936"/>
              <draw:equation draw:name="f47" draw:formula="729806*logheight/2052844"/>
              <draw:equation draw:name="f48" draw:formula="1083718*logwidth/1830936"/>
              <draw:equation draw:name="f49" draw:formula="1475*logheight/2052844"/>
              <draw:equation draw:name="f50" draw:formula="1830936*logwidth/1830936"/>
              <draw:equation draw:name="f51" draw:formula="1771861*logheight/2065291"/>
              <draw:equation draw:name="f52" draw:formula="553839*logwidth/1830936"/>
              <draw:equation draw:name="f53" draw:formula="1932887*logheight/2065291"/>
              <draw:equation draw:name="f54" draw:formula="39355*logwidth/1830936"/>
              <draw:equation draw:name="f55" draw:formula="742253*logheight/2065291"/>
              <draw:equation draw:name="f56" draw:formula="1098058*logwidth/1830936"/>
              <draw:equation draw:name="f57" draw:formula="1421*logheight/2065291"/>
              <draw:equation draw:name="f58" draw:formula="logwidth"/>
              <draw:equation draw:name="f59" draw:formula="logheight"/>
            </draw:enhanced-geometry>
          </draw:custom-shape>
          <draw:custom-shape draw:name="フリーフォーム 34" draw:style-name="gr64" draw:text-style-name="P38" draw:layer="layout" svg:width="2.514cm" svg:height="0.654cm" svg:x="3.441cm" svg:y="10.608cm">
            <text:p/>
            <draw:enhanced-geometry draw:mirror-horizontal="false" draw:mirror-vertical="false" svg:viewBox="0 0 0 0" draw:glue-points="?f0 ?f1 ?f2 ?f3 ?f4 ?f5 ?f6 ?f7 ?f8 ?f9 ?f10 ?f11 ?f12 ?f13 ?f14 ?f15 ?f16 ?f17" drawooo:sub-view-size="5762625 1443037" draw:text-areas="0 0 ?f18 ?f19" draw:type="ooxml-non-primitive" draw:enhanced-path="M 0 4762 C 241697 721518 483394 1438275 723900 1438275 964406 1438275 1203325 3968 1443037 4762 1682749 5556 1921669 1443831 2162175 1443037 2402681 1442243 2646363 0 2886075 0 3125787 0 3359944 1443037 3600450 1443037 3840956 1443037 4087812 794 4329112 0 4570412 -794 4809331 1437481 5048250 1438275 5287169 1439069 5524897 721915 5762625 4762 N">
              <draw:equation draw:name="f0" draw:formula="0*logwidth/5762625"/>
              <draw:equation draw:name="f1" draw:formula="4762*logheight/1443037"/>
              <draw:equation draw:name="f2" draw:formula="723900*logwidth/5762625"/>
              <draw:equation draw:name="f3" draw:formula="1438275*logheight/1443037"/>
              <draw:equation draw:name="f4" draw:formula="1443037*logwidth/5762625"/>
              <draw:equation draw:name="f5" draw:formula="4762*logheight/1443037"/>
              <draw:equation draw:name="f6" draw:formula="2162175*logwidth/5762625"/>
              <draw:equation draw:name="f7" draw:formula="1443037*logheight/1443037"/>
              <draw:equation draw:name="f8" draw:formula="2886075*logwidth/5762625"/>
              <draw:equation draw:name="f9" draw:formula="0*logheight/1443037"/>
              <draw:equation draw:name="f10" draw:formula="3600450*logwidth/5762625"/>
              <draw:equation draw:name="f11" draw:formula="1443037*logheight/1443037"/>
              <draw:equation draw:name="f12" draw:formula="4329112*logwidth/5762625"/>
              <draw:equation draw:name="f13" draw:formula="0*logheight/1443037"/>
              <draw:equation draw:name="f14" draw:formula="5048250*logwidth/5762625"/>
              <draw:equation draw:name="f15" draw:formula="1438275*logheight/1443037"/>
              <draw:equation draw:name="f16" draw:formula="5762625*logwidth/5762625"/>
              <draw:equation draw:name="f17" draw:formula="4762*logheight/1443037"/>
              <draw:equation draw:name="f18" draw:formula="logwidth"/>
              <draw:equation draw:name="f19" draw:formula="logheight"/>
            </draw:enhanced-geometry>
          </draw:custom-shape>
          <draw:custom-shape draw:name="円/楕円 36" draw:style-name="gr67" draw:text-style-name="P41" draw:layer="layout" svg:width="0.593cm" svg:height="0.678cm" svg:x="4.024cm" svg:y="9.20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7" draw:style-name="gr67" draw:text-style-name="P41" draw:layer="layout" svg:width="0.593cm" svg:height="0.678cm" svg:x="4.788cm" svg:y="9.626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3" draw:layer="layout" svg:width="14.098cm" svg:height="2.339cm" svg:x="9.557cm" svg:y="8.082cm">
          <table:table table:template-name="table" table:use-first-row-styles="true" table:use-banding-rows-styles="true">
            <table:table-column table:style-name="co7"/>
            <table:table-column table:style-name="co8"/>
            <table:table-row table:style-name="ro7" table:default-cell-style-name="ce9">
              <table:table-cell>
                <text:p text:style-name="P53"><text:span text:style-name="T51">BAP</text:span></text:p>
              </table:table-cell>
              <table:table-cell>
                <text:p text:style-name="P53"><text:span text:style-name="T51">アルカリフォスファターゼ</text:span></text:p>
              </table:table-cell>
            </table:table-row>
            <table:table-row table:style-name="ro7" table:default-cell-style-name="ce9">
              <table:table-cell>
                <text:p text:style-name="P53"><text:span text:style-name="T51">PINP</text:span></text:p>
              </table:table-cell>
              <table:table-cell>
                <text:p text:style-name="P53"><text:span text:style-name="T51">I</text:span><text:span text:style-name="T51">型プロコラーゲン</text:span><text:span text:style-name="T51">N-</text:span><text:span text:style-name="T51">プロペプチド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リモデリング (10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骨リ</text:span><text:span text:style-name="T22">モデ</text:span><text:span text:style-name="T22">リン</text:span><text:span text:style-name="T22">グ</text:span></text:p>
          </draw:text-box>
        </draw:frame>
        <draw:custom-shape draw:name="角丸四角形 3" draw:style-name="gr62" draw:text-style-name="P38" draw:layer="layout" svg:width="10.6cm" svg:height="6.2cm" svg:x="0.981cm" svg:y="11.3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テキスト ボックス 14" draw:style-name="gr115" draw:text-style-name="P44" draw:layer="layout" svg:width="3.482cm" svg:height="1.013cm" svg:x="0.099cm" svg:y="7.699cm">
          <text:p text:style-name="P43"><text:span text:style-name="T25">破骨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116" draw:text-style-name="P31" xml:id="id31" draw:id="id31" draw:layer="layout" svg:width="4.727cm" svg:height="1.098cm" svg:x="2.781cm" svg:y="5.725cm">
          <text:p text:style-name="P30"><text:span text:style-name="T42">TRACP-5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矢印コネクタ 17" draw:style-name="gr87" draw:text-style-name="P27" draw:layer="layout" draw:type="line" svg:x1="3.664cm" svg:y1="9.033cm" svg:x2="5.144cm" svg:y2="6.823cm" draw:end-shape="id31" draw:end-glue-point="2" svg:d="M3664 9033l1480-2210" svg:viewBox="0 0 1481 2211">
          <text:p/>
        </draw:connector>
        <draw:custom-shape draw:name="角丸四角形 12" draw:style-name="gr73" draw:text-style-name="P45" draw:layer="layout" svg:width="8.804cm" svg:height="4.793cm" svg:x="2.177cm" svg:y="11.2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g draw:name="グループ化 24" draw:style-name="gr63">
          <draw:custom-shape draw:name="角丸四角形 22" draw:style-name="gr64" draw:text-style-name="P38" draw:layer="layout" svg:width="3.429cm" svg:height="2.257cm" svg:x="2.403cm" svg:y="13.79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円/楕円 23" draw:style-name="gr67" draw:text-style-name="P41" draw:layer="layout" svg:width="0.789cm" svg:height="0.902cm" svg:x="3.723cm" svg:y="14.47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テキスト ボックス 25" draw:style-name="gr117" draw:text-style-name="P44" draw:layer="layout" svg:width="3.482cm" svg:height="1.013cm" svg:x="2.88cm" svg:y="12.777cm">
          <text:p text:style-name="P43"><text:span text:style-name="T29">骨芽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27" draw:style-name="gr97" draw:text-style-name="P50" draw:layer="layout" svg:width="2.603cm" svg:height="0.303cm" svg:x="5.381cm" svg:y="14.75cm">
          <text:p/>
          <draw:enhanced-geometry draw:mirror-horizontal="false" draw:mirror-vertical="false" svg:viewBox="0 0 0 0" draw:glue-points="?f0 ?f1 ?f2 ?f3 ?f4 ?f5 ?f6 ?f7 ?f8 ?f9 ?f10 ?f11 ?f12 ?f13 ?f14 ?f15" drawooo:sub-view-size="4306824 1435610" draw:text-areas="0 0 ?f16 ?f17" draw:type="ooxml-non-primitive" draw:enhanced-path="M 0 1 C 236982 717043 473964 1434085 713232 1435609 952500 1437133 1193292 10669 1435608 9145 1677924 7621 1929384 1427989 2167128 1426465 2404872 1424941 2624328 -1523 2862072 1 3099816 1525 3352800 1435609 3593592 1435609 3834384 1435609 4306824 1 4306824 1 L 4306824 1 N">
            <draw:equation draw:name="f0" draw:formula="0*logwidth/4306824"/>
            <draw:equation draw:name="f1" draw:formula="1*logheight/1435610"/>
            <draw:equation draw:name="f2" draw:formula="713232*logwidth/4306824"/>
            <draw:equation draw:name="f3" draw:formula="1435609*logheight/1435610"/>
            <draw:equation draw:name="f4" draw:formula="1435608*logwidth/4306824"/>
            <draw:equation draw:name="f5" draw:formula="9145*logheight/1435610"/>
            <draw:equation draw:name="f6" draw:formula="2167128*logwidth/4306824"/>
            <draw:equation draw:name="f7" draw:formula="1426465*logheight/1435610"/>
            <draw:equation draw:name="f8" draw:formula="2862072*logwidth/4306824"/>
            <draw:equation draw:name="f9" draw:formula="1*logheight/1435610"/>
            <draw:equation draw:name="f10" draw:formula="3593592*logwidth/4306824"/>
            <draw:equation draw:name="f11" draw:formula="1435609*logheight/1435610"/>
            <draw:equation draw:name="f12" draw:formula="4306824*logwidth/4306824"/>
            <draw:equation draw:name="f13" draw:formula="1*logheight/1435610"/>
            <draw:equation draw:name="f14" draw:formula="4306824*logwidth/4306824"/>
            <draw:equation draw:name="f15" draw:formula="1*logheight/1435610"/>
            <draw:equation draw:name="f16" draw:formula="logwidth"/>
            <draw:equation draw:name="f17" draw:formula="logheight"/>
          </draw:enhanced-geometry>
        </draw:custom-shape>
        <draw:custom-shape draw:name="フリーフォーム 29" draw:style-name="gr97" draw:text-style-name="P50" draw:layer="layout" svg:width="2.603cm" svg:height="0.303cm" svg:x="5.71cm" svg:y="14.726cm">
          <text:p/>
          <draw:enhanced-geometry draw:mirror-horizontal="false" draw:mirror-vertical="false" svg:viewBox="0 0 0 0" draw:glue-points="?f0 ?f1 ?f2 ?f3 ?f4 ?f5 ?f6 ?f7 ?f8 ?f9 ?f10 ?f11 ?f12 ?f13 ?f14 ?f15" drawooo:sub-view-size="4306824 1435610" draw:text-areas="0 0 ?f16 ?f17" draw:type="ooxml-non-primitive" draw:enhanced-path="M 0 1 C 236982 717043 473964 1434085 713232 1435609 952500 1437133 1193292 10669 1435608 9145 1677924 7621 1929384 1427989 2167128 1426465 2404872 1424941 2624328 -1523 2862072 1 3099816 1525 3352800 1435609 3593592 1435609 3834384 1435609 4306824 1 4306824 1 L 4306824 1 N">
            <draw:equation draw:name="f0" draw:formula="0*logwidth/4306824"/>
            <draw:equation draw:name="f1" draw:formula="1*logheight/1435610"/>
            <draw:equation draw:name="f2" draw:formula="713232*logwidth/4306824"/>
            <draw:equation draw:name="f3" draw:formula="1435609*logheight/1435610"/>
            <draw:equation draw:name="f4" draw:formula="1435608*logwidth/4306824"/>
            <draw:equation draw:name="f5" draw:formula="9145*logheight/1435610"/>
            <draw:equation draw:name="f6" draw:formula="2167128*logwidth/4306824"/>
            <draw:equation draw:name="f7" draw:formula="1426465*logheight/1435610"/>
            <draw:equation draw:name="f8" draw:formula="2862072*logwidth/4306824"/>
            <draw:equation draw:name="f9" draw:formula="1*logheight/1435610"/>
            <draw:equation draw:name="f10" draw:formula="3593592*logwidth/4306824"/>
            <draw:equation draw:name="f11" draw:formula="1435609*logheight/1435610"/>
            <draw:equation draw:name="f12" draw:formula="4306824*logwidth/4306824"/>
            <draw:equation draw:name="f13" draw:formula="1*logheight/1435610"/>
            <draw:equation draw:name="f14" draw:formula="4306824*logwidth/4306824"/>
            <draw:equation draw:name="f15" draw:formula="1*logheight/1435610"/>
            <draw:equation draw:name="f16" draw:formula="logwidth"/>
            <draw:equation draw:name="f17" draw:formula="logheight"/>
          </draw:enhanced-geometry>
        </draw:custom-shape>
        <draw:custom-shape draw:name="テキスト ボックス 31" draw:style-name="gr118" draw:text-style-name="P31" draw:layer="layout" svg:width="4.628cm" svg:height="0.844cm" svg:x="5.153cm" svg:y="15.071cm">
          <text:p text:style-name="P30"><text:span text:style-name="T46">I</text:span><text:span text:style-name="T47">型コラーゲ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32" draw:style-name="gr104" draw:text-style-name="P38" draw:layer="layout" svg:width="2.399cm" svg:height="2.731cm" svg:x="8.571cm" svg:y="12.39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テキスト ボックス 33" draw:style-name="gr119" draw:text-style-name="P29" draw:layer="layout" svg:width="1.999cm" svg:height="1.013cm" svg:x="8.771cm" svg:y="13.246cm">
          <text:p text:style-name="P28"><text:span text:style-name="T48">類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4" draw:style-name="gr120" draw:text-style-name="P31" xml:id="id32" draw:id="id32" draw:layer="layout" svg:width="4.727cm" svg:height="1.098cm" svg:x="5.716cm" svg:y="9.437cm">
          <text:p text:style-name="P30"><text:span text:style-name="T42">PIN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矢印コネクタ 35" draw:style-name="gr87" draw:text-style-name="P27" draw:layer="layout" draw:type="line" svg:x1="7.171cm" svg:y1="14.146cm" svg:x2="8.079cm" svg:y2="10.535cm" draw:end-shape="id32" draw:end-glue-point="2" svg:d="M7171 14146l908-3611" svg:viewBox="0 0 909 3612">
          <text:p/>
        </draw:connector>
        <draw:frame draw:name="表 2" draw:style-name="gr3" draw:layer="layout" svg:width="10.457cm" svg:height="6.763cm" svg:x="14.042cm" svg:y="8.325cm">
          <table:table>
            <table:table-column table:style-name="co9"/>
            <table:table-column table:style-name="co9"/>
            <table:table-row table:style-name="ro8">
              <table:table-cell table:style-name="ce10" table:number-columns-spanned="2">
                <text:p text:style-name="P25"><text:span text:style-name="T52">骨代謝マーカー</text:span></text:p>
              </table:table-cell>
              <table:covered-table-cell table:style-name="standard"/>
            </table:table-row>
            <table:table-row table:style-name="ro9" table:default-cell-style-name="ce11">
              <table:table-cell>
                <text:p text:style-name="P25"><text:span text:style-name="T53">骨吸収</text:span></text:p>
              </table:table-cell>
              <table:table-cell>
                <text:p text:style-name="P25"><text:span text:style-name="T49">TRACP-5b</text:span></text:p>
              </table:table-cell>
            </table:table-row>
            <table:table-row table:style-name="ro10" table:default-cell-style-name="ce12">
              <table:table-cell>
                <text:p text:style-name="P25"><text:span text:style-name="T53">骨形成</text:span></text:p>
              </table:table-cell>
              <table:table-cell>
                <text:p text:style-name="P25"><text:span text:style-name="T49">Total PINP</text:span></text:p>
              </table:table-cell>
            </table:table-row>
          </table:table>
          <draw:image xlink:href="Pictures/TablePreview6.svm" xlink:type="simple" xlink:show="embed" xlink:actuate="onLoad"/>
        </draw:frame>
        <draw:g draw:name="グループ化 26" draw:style-name="gr63">
          <draw:custom-shape draw:name="弦 3" draw:style-name="gr64" draw:text-style-name="P38" draw:layer="layout" svg:width="2.372cm" svg:height="2.675cm" draw:transform="rotate (-1.96611340237161) translate (4.347cm 9.332cm)">
            <text:p/>
            <draw:enhanced-geometry draw:mirror-horizontal="false" draw:mirror-vertical="false" svg:viewBox="0 0 0 0" draw:glue-points="?f50 ?f51 ?f52 ?f53 ?f54 ?f55 ?f56 ?f57" drawooo:sub-view-size="1830936 2065291" draw:text-areas="0 0 ?f58 ?f59" draw:type="ooxml-non-primitive" draw:enhanced-path="M 1830936 1771861 C 1488515 2091834 969709 2157249 553839 1932887 118819 1698193 -93718 1206332 39355 742253 169018 290066 503189 -23836 1098058 1421 N">
              <draw:equation draw:name="f0" draw:formula="1830827*logwidth/2160240"/>
              <draw:equation draw:name="f1" draw:formula="1794823*logheight/2088232"/>
              <draw:equation draw:name="f2" draw:formula="553730*logwidth/2160240"/>
              <draw:equation draw:name="f3" draw:formula="1955849*logheight/2088232"/>
              <draw:equation draw:name="f4" draw:formula="39246*logwidth/2160240"/>
              <draw:equation draw:name="f5" draw:formula="765215*logheight/2088232"/>
              <draw:equation draw:name="f6" draw:formula="1080119*logwidth/2160240"/>
              <draw:equation draw:name="f7" draw:formula="0*logheight/2088232"/>
              <draw:equation draw:name="f8" draw:formula="1830827*logwidth/2160240"/>
              <draw:equation draw:name="f9" draw:formula="1794823*logheight/2088232"/>
              <draw:equation draw:name="f10" draw:formula="1830936*logwidth/1830936"/>
              <draw:equation draw:name="f11" draw:formula="1719294*logheight/2012724"/>
              <draw:equation draw:name="f12" draw:formula="553839*logwidth/1830936"/>
              <draw:equation draw:name="f13" draw:formula="1880320*logheight/2012724"/>
              <draw:equation draw:name="f14" draw:formula="39355*logwidth/1830936"/>
              <draw:equation draw:name="f15" draw:formula="689686*logheight/2012724"/>
              <draw:equation draw:name="f16" draw:formula="1171668*logwidth/1830936"/>
              <draw:equation draw:name="f17" draw:formula="15911*logheight/2012724"/>
              <draw:equation draw:name="f18" draw:formula="1830936*logwidth/1830936"/>
              <draw:equation draw:name="f19" draw:formula="1701499*logheight/1994929"/>
              <draw:equation draw:name="f20" draw:formula="553839*logwidth/1830936"/>
              <draw:equation draw:name="f21" draw:formula="1862525*logheight/1994929"/>
              <draw:equation draw:name="f22" draw:formula="39355*logwidth/1830936"/>
              <draw:equation draw:name="f23" draw:formula="671891*logheight/1994929"/>
              <draw:equation draw:name="f24" draw:formula="1127254*logwidth/1830936"/>
              <draw:equation draw:name="f25" draw:formula="16650*logheight/1994929"/>
              <draw:equation draw:name="f26" draw:formula="1830936*logwidth/1830936"/>
              <draw:equation draw:name="f27" draw:formula="1773817*logheight/2067247"/>
              <draw:equation draw:name="f28" draw:formula="553839*logwidth/1830936"/>
              <draw:equation draw:name="f29" draw:formula="1934843*logheight/2067247"/>
              <draw:equation draw:name="f30" draw:formula="39355*logwidth/1830936"/>
              <draw:equation draw:name="f31" draw:formula="744209*logheight/2067247"/>
              <draw:equation draw:name="f32" draw:formula="1135082*logwidth/1830936"/>
              <draw:equation draw:name="f33" draw:formula="13999*logheight/2067247"/>
              <draw:equation draw:name="f34" draw:formula="1830936*logwidth/1830936"/>
              <draw:equation draw:name="f35" draw:formula="1761285*logheight/2054715"/>
              <draw:equation draw:name="f36" draw:formula="553839*logwidth/1830936"/>
              <draw:equation draw:name="f37" draw:formula="1922311*logheight/2054715"/>
              <draw:equation draw:name="f38" draw:formula="39355*logwidth/1830936"/>
              <draw:equation draw:name="f39" draw:formula="731677*logheight/2054715"/>
              <draw:equation draw:name="f40" draw:formula="1135082*logwidth/1830936"/>
              <draw:equation draw:name="f41" draw:formula="1467*logheight/2054715"/>
              <draw:equation draw:name="f42" draw:formula="1830936*logwidth/1830936"/>
              <draw:equation draw:name="f43" draw:formula="1759414*logheight/2052844"/>
              <draw:equation draw:name="f44" draw:formula="553839*logwidth/1830936"/>
              <draw:equation draw:name="f45" draw:formula="1920440*logheight/2052844"/>
              <draw:equation draw:name="f46" draw:formula="39355*logwidth/1830936"/>
              <draw:equation draw:name="f47" draw:formula="729806*logheight/2052844"/>
              <draw:equation draw:name="f48" draw:formula="1083718*logwidth/1830936"/>
              <draw:equation draw:name="f49" draw:formula="1475*logheight/2052844"/>
              <draw:equation draw:name="f50" draw:formula="1830936*logwidth/1830936"/>
              <draw:equation draw:name="f51" draw:formula="1771861*logheight/2065291"/>
              <draw:equation draw:name="f52" draw:formula="553839*logwidth/1830936"/>
              <draw:equation draw:name="f53" draw:formula="1932887*logheight/2065291"/>
              <draw:equation draw:name="f54" draw:formula="39355*logwidth/1830936"/>
              <draw:equation draw:name="f55" draw:formula="742253*logheight/2065291"/>
              <draw:equation draw:name="f56" draw:formula="1098058*logwidth/1830936"/>
              <draw:equation draw:name="f57" draw:formula="1421*logheight/2065291"/>
              <draw:equation draw:name="f58" draw:formula="logwidth"/>
              <draw:equation draw:name="f59" draw:formula="logheight"/>
            </draw:enhanced-geometry>
          </draw:custom-shape>
          <draw:custom-shape draw:name="フリーフォーム 30" draw:style-name="gr64" draw:text-style-name="P38" draw:layer="layout" svg:width="2.514cm" svg:height="0.654cm" svg:x="1.299cm" svg:y="10.608cm">
            <text:p/>
            <draw:enhanced-geometry draw:mirror-horizontal="false" draw:mirror-vertical="false" svg:viewBox="0 0 0 0" draw:glue-points="?f0 ?f1 ?f2 ?f3 ?f4 ?f5 ?f6 ?f7 ?f8 ?f9 ?f10 ?f11 ?f12 ?f13 ?f14 ?f15 ?f16 ?f17" drawooo:sub-view-size="5762625 1443037" draw:text-areas="0 0 ?f18 ?f19" draw:type="ooxml-non-primitive" draw:enhanced-path="M 0 4762 C 241697 721518 483394 1438275 723900 1438275 964406 1438275 1203325 3968 1443037 4762 1682749 5556 1921669 1443831 2162175 1443037 2402681 1442243 2646363 0 2886075 0 3125787 0 3359944 1443037 3600450 1443037 3840956 1443037 4087812 794 4329112 0 4570412 -794 4809331 1437481 5048250 1438275 5287169 1439069 5524897 721915 5762625 4762 N">
              <draw:equation draw:name="f0" draw:formula="0*logwidth/5762625"/>
              <draw:equation draw:name="f1" draw:formula="4762*logheight/1443037"/>
              <draw:equation draw:name="f2" draw:formula="723900*logwidth/5762625"/>
              <draw:equation draw:name="f3" draw:formula="1438275*logheight/1443037"/>
              <draw:equation draw:name="f4" draw:formula="1443037*logwidth/5762625"/>
              <draw:equation draw:name="f5" draw:formula="4762*logheight/1443037"/>
              <draw:equation draw:name="f6" draw:formula="2162175*logwidth/5762625"/>
              <draw:equation draw:name="f7" draw:formula="1443037*logheight/1443037"/>
              <draw:equation draw:name="f8" draw:formula="2886075*logwidth/5762625"/>
              <draw:equation draw:name="f9" draw:formula="0*logheight/1443037"/>
              <draw:equation draw:name="f10" draw:formula="3600450*logwidth/5762625"/>
              <draw:equation draw:name="f11" draw:formula="1443037*logheight/1443037"/>
              <draw:equation draw:name="f12" draw:formula="4329112*logwidth/5762625"/>
              <draw:equation draw:name="f13" draw:formula="0*logheight/1443037"/>
              <draw:equation draw:name="f14" draw:formula="5048250*logwidth/5762625"/>
              <draw:equation draw:name="f15" draw:formula="1438275*logheight/1443037"/>
              <draw:equation draw:name="f16" draw:formula="5762625*logwidth/5762625"/>
              <draw:equation draw:name="f17" draw:formula="4762*logheight/1443037"/>
              <draw:equation draw:name="f18" draw:formula="logwidth"/>
              <draw:equation draw:name="f19" draw:formula="logheight"/>
            </draw:enhanced-geometry>
          </draw:custom-shape>
          <draw:custom-shape draw:name="円/楕円 36" draw:style-name="gr67" draw:text-style-name="P41" draw:layer="layout" svg:width="0.593cm" svg:height="0.678cm" svg:x="1.881cm" svg:y="9.20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7" draw:style-name="gr67" draw:text-style-name="P41" draw:layer="layout" svg:width="0.593cm" svg:height="0.678cm" svg:x="2.645cm" svg:y="9.626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nosumabとは？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54">Den</text:span><text:span text:style-name="T54">osu</text:span><text:span text:style-name="T54">mab</text:span><text:span text:style-name="T55">と</text:span><text:span text:style-name="T55">は？</text:span></text:p>
          </draw:text-box>
        </draw:frame>
        <draw:custom-shape draw:name="円/楕円 41" draw:style-name="gr121" draw:text-style-name="P29" draw:layer="layout" svg:width="4.808cm" svg:height="3.952cm" svg:x="8.231cm" svg:y="7.035cm">
          <text:p text:style-name="P28"><text:span text:style-name="T56">前駆</text:span></text:p>
          <text:p text:style-name="P28"><text:span text:style-name="T56">破骨細胞</text:span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nosumabとは？ (2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54">Den</text:span><text:span text:style-name="T54">osu</text:span><text:span text:style-name="T54">mab</text:span><text:span text:style-name="T55">と</text:span><text:span text:style-name="T55">は？</text:span></text:p>
          </draw:text-box>
        </draw:frame>
        <draw:custom-shape draw:name="アーチ 39" draw:style-name="gr122" draw:text-style-name="P54" draw:layer="layout" svg:width="1.965cm" svg:height="1.999cm" draw:transform="rotate (-1.5707963267949) translate (8.231cm 7.89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円/楕円 41" draw:style-name="gr123" draw:text-style-name="P29" draw:layer="layout" svg:width="4.808cm" svg:height="3.952cm" svg:x="8.231cm" svg:y="7.035cm">
          <text:p text:style-name="P28"><text:span text:style-name="T56">前駆</text:span></text:p>
          <text:p text:style-name="P28"><text:span text:style-name="T56">破骨細胞</text:span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角丸四角形 42" draw:style-name="gr124" draw:text-style-name="P31" draw:layer="layout" svg:width="2.799cm" svg:height="0.825cm" svg:x="6.431cm" svg:y="7.064cm">
          <text:p text:style-name="P30"><text:span text:style-name="T57">RAN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nosumabとは？ (3)" draw:style-name="dp5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54">Den</text:span><text:span text:style-name="T54">osu</text:span><text:span text:style-name="T54">mab</text:span><text:span text:style-name="T55">と</text:span><text:span text:style-name="T55">は？</text:span></text:p>
          </draw:text-box>
        </draw:frame>
        <draw:custom-shape draw:name="角丸四角形 3" draw:style-name="gr62" draw:text-style-name="P38" draw:layer="layout" svg:width="10.6cm" svg:height="6.2cm" svg:x="14.7cm" svg:y="10.3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テキスト ボックス 14" draw:style-name="gr125" draw:text-style-name="P44" draw:layer="layout" svg:width="3.482cm" svg:height="1.013cm" svg:x="15.218cm" svg:y="6.744cm">
          <text:p text:style-name="P43"><text:span text:style-name="T25">破骨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6" draw:style-name="gr63">
          <draw:custom-shape draw:name="弦 3" draw:style-name="gr64" draw:text-style-name="P38" draw:layer="layout" svg:width="2.372cm" svg:height="2.675cm" draw:transform="rotate (-1.96611340237161) translate (18.667cm 8.377cm)">
            <text:p/>
            <draw:enhanced-geometry draw:mirror-horizontal="false" draw:mirror-vertical="false" svg:viewBox="0 0 0 0" draw:glue-points="?f50 ?f51 ?f52 ?f53 ?f54 ?f55 ?f56 ?f57" drawooo:sub-view-size="1830936 2065291" draw:text-areas="0 0 ?f58 ?f59" draw:type="ooxml-non-primitive" draw:enhanced-path="M 1830936 1771861 C 1488515 2091834 969709 2157249 553839 1932887 118819 1698193 -93718 1206332 39355 742253 169018 290066 503189 -23836 1098058 1421 N">
              <draw:equation draw:name="f0" draw:formula="1830827*logwidth/2160240"/>
              <draw:equation draw:name="f1" draw:formula="1794823*logheight/2088232"/>
              <draw:equation draw:name="f2" draw:formula="553730*logwidth/2160240"/>
              <draw:equation draw:name="f3" draw:formula="1955849*logheight/2088232"/>
              <draw:equation draw:name="f4" draw:formula="39246*logwidth/2160240"/>
              <draw:equation draw:name="f5" draw:formula="765215*logheight/2088232"/>
              <draw:equation draw:name="f6" draw:formula="1080119*logwidth/2160240"/>
              <draw:equation draw:name="f7" draw:formula="0*logheight/2088232"/>
              <draw:equation draw:name="f8" draw:formula="1830827*logwidth/2160240"/>
              <draw:equation draw:name="f9" draw:formula="1794823*logheight/2088232"/>
              <draw:equation draw:name="f10" draw:formula="1830936*logwidth/1830936"/>
              <draw:equation draw:name="f11" draw:formula="1719294*logheight/2012724"/>
              <draw:equation draw:name="f12" draw:formula="553839*logwidth/1830936"/>
              <draw:equation draw:name="f13" draw:formula="1880320*logheight/2012724"/>
              <draw:equation draw:name="f14" draw:formula="39355*logwidth/1830936"/>
              <draw:equation draw:name="f15" draw:formula="689686*logheight/2012724"/>
              <draw:equation draw:name="f16" draw:formula="1171668*logwidth/1830936"/>
              <draw:equation draw:name="f17" draw:formula="15911*logheight/2012724"/>
              <draw:equation draw:name="f18" draw:formula="1830936*logwidth/1830936"/>
              <draw:equation draw:name="f19" draw:formula="1701499*logheight/1994929"/>
              <draw:equation draw:name="f20" draw:formula="553839*logwidth/1830936"/>
              <draw:equation draw:name="f21" draw:formula="1862525*logheight/1994929"/>
              <draw:equation draw:name="f22" draw:formula="39355*logwidth/1830936"/>
              <draw:equation draw:name="f23" draw:formula="671891*logheight/1994929"/>
              <draw:equation draw:name="f24" draw:formula="1127254*logwidth/1830936"/>
              <draw:equation draw:name="f25" draw:formula="16650*logheight/1994929"/>
              <draw:equation draw:name="f26" draw:formula="1830936*logwidth/1830936"/>
              <draw:equation draw:name="f27" draw:formula="1773817*logheight/2067247"/>
              <draw:equation draw:name="f28" draw:formula="553839*logwidth/1830936"/>
              <draw:equation draw:name="f29" draw:formula="1934843*logheight/2067247"/>
              <draw:equation draw:name="f30" draw:formula="39355*logwidth/1830936"/>
              <draw:equation draw:name="f31" draw:formula="744209*logheight/2067247"/>
              <draw:equation draw:name="f32" draw:formula="1135082*logwidth/1830936"/>
              <draw:equation draw:name="f33" draw:formula="13999*logheight/2067247"/>
              <draw:equation draw:name="f34" draw:formula="1830936*logwidth/1830936"/>
              <draw:equation draw:name="f35" draw:formula="1761285*logheight/2054715"/>
              <draw:equation draw:name="f36" draw:formula="553839*logwidth/1830936"/>
              <draw:equation draw:name="f37" draw:formula="1922311*logheight/2054715"/>
              <draw:equation draw:name="f38" draw:formula="39355*logwidth/1830936"/>
              <draw:equation draw:name="f39" draw:formula="731677*logheight/2054715"/>
              <draw:equation draw:name="f40" draw:formula="1135082*logwidth/1830936"/>
              <draw:equation draw:name="f41" draw:formula="1467*logheight/2054715"/>
              <draw:equation draw:name="f42" draw:formula="1830936*logwidth/1830936"/>
              <draw:equation draw:name="f43" draw:formula="1759414*logheight/2052844"/>
              <draw:equation draw:name="f44" draw:formula="553839*logwidth/1830936"/>
              <draw:equation draw:name="f45" draw:formula="1920440*logheight/2052844"/>
              <draw:equation draw:name="f46" draw:formula="39355*logwidth/1830936"/>
              <draw:equation draw:name="f47" draw:formula="729806*logheight/2052844"/>
              <draw:equation draw:name="f48" draw:formula="1083718*logwidth/1830936"/>
              <draw:equation draw:name="f49" draw:formula="1475*logheight/2052844"/>
              <draw:equation draw:name="f50" draw:formula="1830936*logwidth/1830936"/>
              <draw:equation draw:name="f51" draw:formula="1771861*logheight/2065291"/>
              <draw:equation draw:name="f52" draw:formula="553839*logwidth/1830936"/>
              <draw:equation draw:name="f53" draw:formula="1932887*logheight/2065291"/>
              <draw:equation draw:name="f54" draw:formula="39355*logwidth/1830936"/>
              <draw:equation draw:name="f55" draw:formula="742253*logheight/2065291"/>
              <draw:equation draw:name="f56" draw:formula="1098058*logwidth/1830936"/>
              <draw:equation draw:name="f57" draw:formula="1421*logheight/2065291"/>
              <draw:equation draw:name="f58" draw:formula="logwidth"/>
              <draw:equation draw:name="f59" draw:formula="logheight"/>
            </draw:enhanced-geometry>
          </draw:custom-shape>
          <draw:custom-shape draw:name="フリーフォーム 30" draw:style-name="gr64" draw:text-style-name="P38" draw:layer="layout" svg:width="2.514cm" svg:height="0.654cm" svg:x="15.618cm" svg:y="9.653cm">
            <text:p/>
            <draw:enhanced-geometry draw:mirror-horizontal="false" draw:mirror-vertical="false" svg:viewBox="0 0 0 0" draw:glue-points="?f0 ?f1 ?f2 ?f3 ?f4 ?f5 ?f6 ?f7 ?f8 ?f9 ?f10 ?f11 ?f12 ?f13 ?f14 ?f15 ?f16 ?f17" drawooo:sub-view-size="5762625 1443037" draw:text-areas="0 0 ?f18 ?f19" draw:type="ooxml-non-primitive" draw:enhanced-path="M 0 4762 C 241697 721518 483394 1438275 723900 1438275 964406 1438275 1203325 3968 1443037 4762 1682749 5556 1921669 1443831 2162175 1443037 2402681 1442243 2646363 0 2886075 0 3125787 0 3359944 1443037 3600450 1443037 3840956 1443037 4087812 794 4329112 0 4570412 -794 4809331 1437481 5048250 1438275 5287169 1439069 5524897 721915 5762625 4762 N">
              <draw:equation draw:name="f0" draw:formula="0*logwidth/5762625"/>
              <draw:equation draw:name="f1" draw:formula="4762*logheight/1443037"/>
              <draw:equation draw:name="f2" draw:formula="723900*logwidth/5762625"/>
              <draw:equation draw:name="f3" draw:formula="1438275*logheight/1443037"/>
              <draw:equation draw:name="f4" draw:formula="1443037*logwidth/5762625"/>
              <draw:equation draw:name="f5" draw:formula="4762*logheight/1443037"/>
              <draw:equation draw:name="f6" draw:formula="2162175*logwidth/5762625"/>
              <draw:equation draw:name="f7" draw:formula="1443037*logheight/1443037"/>
              <draw:equation draw:name="f8" draw:formula="2886075*logwidth/5762625"/>
              <draw:equation draw:name="f9" draw:formula="0*logheight/1443037"/>
              <draw:equation draw:name="f10" draw:formula="3600450*logwidth/5762625"/>
              <draw:equation draw:name="f11" draw:formula="1443037*logheight/1443037"/>
              <draw:equation draw:name="f12" draw:formula="4329112*logwidth/5762625"/>
              <draw:equation draw:name="f13" draw:formula="0*logheight/1443037"/>
              <draw:equation draw:name="f14" draw:formula="5048250*logwidth/5762625"/>
              <draw:equation draw:name="f15" draw:formula="1438275*logheight/1443037"/>
              <draw:equation draw:name="f16" draw:formula="5762625*logwidth/5762625"/>
              <draw:equation draw:name="f17" draw:formula="4762*logheight/1443037"/>
              <draw:equation draw:name="f18" draw:formula="logwidth"/>
              <draw:equation draw:name="f19" draw:formula="logheight"/>
            </draw:enhanced-geometry>
          </draw:custom-shape>
          <draw:custom-shape draw:name="円/楕円 36" draw:style-name="gr67" draw:text-style-name="P41" draw:layer="layout" svg:width="0.593cm" svg:height="0.678cm" svg:x="16.201cm" svg:y="8.246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7" draw:style-name="gr67" draw:text-style-name="P41" draw:layer="layout" svg:width="0.593cm" svg:height="0.678cm" svg:x="16.964cm" svg:y="8.67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アーチ 39" draw:style-name="gr122" draw:text-style-name="P54" draw:layer="layout" svg:width="1.965cm" svg:height="1.999cm" draw:transform="rotate (-1.5707963267949) translate (8.231cm 7.89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円/楕円 41" draw:style-name="gr126" draw:text-style-name="P29" draw:layer="layout" svg:width="4.808cm" svg:height="3.952cm" svg:x="8.231cm" svg:y="7.035cm">
          <text:p text:style-name="P28"><text:span text:style-name="T56">前駆</text:span></text:p>
          <text:p text:style-name="P28"><text:span text:style-name="T56">破骨細胞</text:span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角丸四角形 42" draw:style-name="gr127" draw:text-style-name="P31" draw:layer="layout" svg:width="2.799cm" svg:height="0.825cm" svg:x="6.431cm" svg:y="7.064cm">
          <text:p text:style-name="P30"><text:span text:style-name="T57">RAN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nosumabとは？ (4)" draw:style-name="dp5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54">Den</text:span><text:span text:style-name="T54">osu</text:span><text:span text:style-name="T54">mab</text:span><text:span text:style-name="T55">と</text:span><text:span text:style-name="T55">は？</text:span></text:p>
          </draw:text-box>
        </draw:frame>
        <draw:custom-shape draw:name="角丸四角形 3" draw:style-name="gr62" draw:text-style-name="P38" draw:layer="layout" svg:width="10.6cm" svg:height="6.2cm" svg:x="14.7cm" svg:y="10.3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テキスト ボックス 14" draw:style-name="gr128" draw:text-style-name="P44" draw:layer="layout" svg:width="3.482cm" svg:height="1.013cm" svg:x="15.218cm" svg:y="6.744cm">
          <text:p text:style-name="P43"><text:span text:style-name="T25">破骨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6" draw:style-name="gr63">
          <draw:custom-shape draw:name="弦 3" draw:style-name="gr64" draw:text-style-name="P38" draw:layer="layout" svg:width="2.372cm" svg:height="2.675cm" draw:transform="rotate (-1.96611340237161) translate (18.667cm 8.377cm)">
            <text:p/>
            <draw:enhanced-geometry draw:mirror-horizontal="false" draw:mirror-vertical="false" svg:viewBox="0 0 0 0" draw:glue-points="?f50 ?f51 ?f52 ?f53 ?f54 ?f55 ?f56 ?f57" drawooo:sub-view-size="1830936 2065291" draw:text-areas="0 0 ?f58 ?f59" draw:type="ooxml-non-primitive" draw:enhanced-path="M 1830936 1771861 C 1488515 2091834 969709 2157249 553839 1932887 118819 1698193 -93718 1206332 39355 742253 169018 290066 503189 -23836 1098058 1421 N">
              <draw:equation draw:name="f0" draw:formula="1830827*logwidth/2160240"/>
              <draw:equation draw:name="f1" draw:formula="1794823*logheight/2088232"/>
              <draw:equation draw:name="f2" draw:formula="553730*logwidth/2160240"/>
              <draw:equation draw:name="f3" draw:formula="1955849*logheight/2088232"/>
              <draw:equation draw:name="f4" draw:formula="39246*logwidth/2160240"/>
              <draw:equation draw:name="f5" draw:formula="765215*logheight/2088232"/>
              <draw:equation draw:name="f6" draw:formula="1080119*logwidth/2160240"/>
              <draw:equation draw:name="f7" draw:formula="0*logheight/2088232"/>
              <draw:equation draw:name="f8" draw:formula="1830827*logwidth/2160240"/>
              <draw:equation draw:name="f9" draw:formula="1794823*logheight/2088232"/>
              <draw:equation draw:name="f10" draw:formula="1830936*logwidth/1830936"/>
              <draw:equation draw:name="f11" draw:formula="1719294*logheight/2012724"/>
              <draw:equation draw:name="f12" draw:formula="553839*logwidth/1830936"/>
              <draw:equation draw:name="f13" draw:formula="1880320*logheight/2012724"/>
              <draw:equation draw:name="f14" draw:formula="39355*logwidth/1830936"/>
              <draw:equation draw:name="f15" draw:formula="689686*logheight/2012724"/>
              <draw:equation draw:name="f16" draw:formula="1171668*logwidth/1830936"/>
              <draw:equation draw:name="f17" draw:formula="15911*logheight/2012724"/>
              <draw:equation draw:name="f18" draw:formula="1830936*logwidth/1830936"/>
              <draw:equation draw:name="f19" draw:formula="1701499*logheight/1994929"/>
              <draw:equation draw:name="f20" draw:formula="553839*logwidth/1830936"/>
              <draw:equation draw:name="f21" draw:formula="1862525*logheight/1994929"/>
              <draw:equation draw:name="f22" draw:formula="39355*logwidth/1830936"/>
              <draw:equation draw:name="f23" draw:formula="671891*logheight/1994929"/>
              <draw:equation draw:name="f24" draw:formula="1127254*logwidth/1830936"/>
              <draw:equation draw:name="f25" draw:formula="16650*logheight/1994929"/>
              <draw:equation draw:name="f26" draw:formula="1830936*logwidth/1830936"/>
              <draw:equation draw:name="f27" draw:formula="1773817*logheight/2067247"/>
              <draw:equation draw:name="f28" draw:formula="553839*logwidth/1830936"/>
              <draw:equation draw:name="f29" draw:formula="1934843*logheight/2067247"/>
              <draw:equation draw:name="f30" draw:formula="39355*logwidth/1830936"/>
              <draw:equation draw:name="f31" draw:formula="744209*logheight/2067247"/>
              <draw:equation draw:name="f32" draw:formula="1135082*logwidth/1830936"/>
              <draw:equation draw:name="f33" draw:formula="13999*logheight/2067247"/>
              <draw:equation draw:name="f34" draw:formula="1830936*logwidth/1830936"/>
              <draw:equation draw:name="f35" draw:formula="1761285*logheight/2054715"/>
              <draw:equation draw:name="f36" draw:formula="553839*logwidth/1830936"/>
              <draw:equation draw:name="f37" draw:formula="1922311*logheight/2054715"/>
              <draw:equation draw:name="f38" draw:formula="39355*logwidth/1830936"/>
              <draw:equation draw:name="f39" draw:formula="731677*logheight/2054715"/>
              <draw:equation draw:name="f40" draw:formula="1135082*logwidth/1830936"/>
              <draw:equation draw:name="f41" draw:formula="1467*logheight/2054715"/>
              <draw:equation draw:name="f42" draw:formula="1830936*logwidth/1830936"/>
              <draw:equation draw:name="f43" draw:formula="1759414*logheight/2052844"/>
              <draw:equation draw:name="f44" draw:formula="553839*logwidth/1830936"/>
              <draw:equation draw:name="f45" draw:formula="1920440*logheight/2052844"/>
              <draw:equation draw:name="f46" draw:formula="39355*logwidth/1830936"/>
              <draw:equation draw:name="f47" draw:formula="729806*logheight/2052844"/>
              <draw:equation draw:name="f48" draw:formula="1083718*logwidth/1830936"/>
              <draw:equation draw:name="f49" draw:formula="1475*logheight/2052844"/>
              <draw:equation draw:name="f50" draw:formula="1830936*logwidth/1830936"/>
              <draw:equation draw:name="f51" draw:formula="1771861*logheight/2065291"/>
              <draw:equation draw:name="f52" draw:formula="553839*logwidth/1830936"/>
              <draw:equation draw:name="f53" draw:formula="1932887*logheight/2065291"/>
              <draw:equation draw:name="f54" draw:formula="39355*logwidth/1830936"/>
              <draw:equation draw:name="f55" draw:formula="742253*logheight/2065291"/>
              <draw:equation draw:name="f56" draw:formula="1098058*logwidth/1830936"/>
              <draw:equation draw:name="f57" draw:formula="1421*logheight/2065291"/>
              <draw:equation draw:name="f58" draw:formula="logwidth"/>
              <draw:equation draw:name="f59" draw:formula="logheight"/>
            </draw:enhanced-geometry>
          </draw:custom-shape>
          <draw:custom-shape draw:name="フリーフォーム 30" draw:style-name="gr64" draw:text-style-name="P38" draw:layer="layout" svg:width="2.514cm" svg:height="0.654cm" svg:x="15.618cm" svg:y="9.653cm">
            <text:p/>
            <draw:enhanced-geometry draw:mirror-horizontal="false" draw:mirror-vertical="false" svg:viewBox="0 0 0 0" draw:glue-points="?f0 ?f1 ?f2 ?f3 ?f4 ?f5 ?f6 ?f7 ?f8 ?f9 ?f10 ?f11 ?f12 ?f13 ?f14 ?f15 ?f16 ?f17" drawooo:sub-view-size="5762625 1443037" draw:text-areas="0 0 ?f18 ?f19" draw:type="ooxml-non-primitive" draw:enhanced-path="M 0 4762 C 241697 721518 483394 1438275 723900 1438275 964406 1438275 1203325 3968 1443037 4762 1682749 5556 1921669 1443831 2162175 1443037 2402681 1442243 2646363 0 2886075 0 3125787 0 3359944 1443037 3600450 1443037 3840956 1443037 4087812 794 4329112 0 4570412 -794 4809331 1437481 5048250 1438275 5287169 1439069 5524897 721915 5762625 4762 N">
              <draw:equation draw:name="f0" draw:formula="0*logwidth/5762625"/>
              <draw:equation draw:name="f1" draw:formula="4762*logheight/1443037"/>
              <draw:equation draw:name="f2" draw:formula="723900*logwidth/5762625"/>
              <draw:equation draw:name="f3" draw:formula="1438275*logheight/1443037"/>
              <draw:equation draw:name="f4" draw:formula="1443037*logwidth/5762625"/>
              <draw:equation draw:name="f5" draw:formula="4762*logheight/1443037"/>
              <draw:equation draw:name="f6" draw:formula="2162175*logwidth/5762625"/>
              <draw:equation draw:name="f7" draw:formula="1443037*logheight/1443037"/>
              <draw:equation draw:name="f8" draw:formula="2886075*logwidth/5762625"/>
              <draw:equation draw:name="f9" draw:formula="0*logheight/1443037"/>
              <draw:equation draw:name="f10" draw:formula="3600450*logwidth/5762625"/>
              <draw:equation draw:name="f11" draw:formula="1443037*logheight/1443037"/>
              <draw:equation draw:name="f12" draw:formula="4329112*logwidth/5762625"/>
              <draw:equation draw:name="f13" draw:formula="0*logheight/1443037"/>
              <draw:equation draw:name="f14" draw:formula="5048250*logwidth/5762625"/>
              <draw:equation draw:name="f15" draw:formula="1438275*logheight/1443037"/>
              <draw:equation draw:name="f16" draw:formula="5762625*logwidth/5762625"/>
              <draw:equation draw:name="f17" draw:formula="4762*logheight/1443037"/>
              <draw:equation draw:name="f18" draw:formula="logwidth"/>
              <draw:equation draw:name="f19" draw:formula="logheight"/>
            </draw:enhanced-geometry>
          </draw:custom-shape>
          <draw:custom-shape draw:name="円/楕円 36" draw:style-name="gr67" draw:text-style-name="P41" draw:layer="layout" svg:width="0.593cm" svg:height="0.678cm" svg:x="16.201cm" svg:y="8.246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7" draw:style-name="gr67" draw:text-style-name="P41" draw:layer="layout" svg:width="0.593cm" svg:height="0.678cm" svg:x="16.964cm" svg:y="8.67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アーチ 39" draw:style-name="gr122" draw:text-style-name="P54" draw:layer="layout" svg:width="1.965cm" svg:height="1.999cm" draw:transform="rotate (-1.5707963267949) translate (8.231cm 7.89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円/楕円 41" draw:style-name="gr129" draw:text-style-name="P29" draw:layer="layout" svg:width="4.808cm" svg:height="3.952cm" svg:x="8.231cm" svg:y="7.035cm">
          <text:p text:style-name="P28"><text:span text:style-name="T56">前駆</text:span></text:p>
          <text:p text:style-name="P28"><text:span text:style-name="T56">破骨細胞</text:span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角丸四角形 42" draw:style-name="gr130" draw:text-style-name="P31" draw:layer="layout" svg:width="2.799cm" svg:height="0.825cm" svg:x="6.431cm" svg:y="7.064cm">
          <text:p text:style-name="P30"><text:span text:style-name="T57">RAN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nosumabとは？ (5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54">Den</text:span><text:span text:style-name="T54">osu</text:span><text:span text:style-name="T54">mab</text:span><text:span text:style-name="T55">と</text:span><text:span text:style-name="T55">は？</text:span></text:p>
          </draw:text-box>
        </draw:frame>
        <draw:custom-shape draw:name="アーチ 39" draw:style-name="gr122" draw:text-style-name="P54" draw:layer="layout" svg:width="1.965cm" svg:height="1.999cm" draw:transform="rotate (-1.5707963267949) translate (8.231cm 7.89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テキスト ボックス 40" draw:style-name="gr131" draw:text-style-name="P55" draw:layer="layout" svg:width="4.341cm" svg:height="1.267cm" svg:x="0.099cm" svg:y="6.57cm">
          <text:p text:style-name="P30"><text:span text:style-name="T58">RANK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41" draw:style-name="gr132" draw:text-style-name="P29" draw:layer="layout" svg:width="4.808cm" svg:height="3.952cm" svg:x="8.231cm" svg:y="7.035cm">
          <text:p text:style-name="P28"><text:span text:style-name="T56">前駆</text:span></text:p>
          <text:p text:style-name="P28"><text:span text:style-name="T56">破骨細胞</text:span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角丸四角形 42" draw:style-name="gr133" draw:text-style-name="P31" draw:layer="layout" svg:width="2.799cm" svg:height="0.825cm" svg:x="6.431cm" svg:y="7.064cm">
          <text:p text:style-name="P30"><text:span text:style-name="T57">RAN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円/楕円 43" draw:style-name="gr134" draw:text-style-name="P56" xml:id="id33" draw:id="id33" draw:layer="layout" svg:width="1.249cm" svg:height="0.999cm" svg:x="1.49cm" svg:y="8.411cm">
          <text:p text:style-name="P25"><text:span text:style-name="T29"/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44" draw:style-name="gr134" draw:text-style-name="P56" xml:id="id34" draw:id="id34" draw:layer="layout" svg:width="1.249cm" svg:height="0.999cm" svg:x="6.371cm" svg:y="8.373cm">
          <text:p text:style-name="P25"><text:span text:style-name="T29"/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直線矢印コネクタ 45" draw:style-name="gr135" draw:text-style-name="P27" draw:layer="layout" draw:type="line" svg:x1="2.739cm" svg:y1="8.911cm" svg:x2="6.371cm" svg:y2="8.873cm" draw:start-shape="id33" draw:start-glue-point="10" draw:end-shape="id34" draw:end-glue-point="6" svg:d="M2739 8911l3632-38" svg:viewBox="0 0 3633 39">
          <text:p/>
        </draw:connecto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nosumabとは？ (6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54">Den</text:span><text:span text:style-name="T54">osu</text:span><text:span text:style-name="T54">mab</text:span><text:span text:style-name="T55">と</text:span><text:span text:style-name="T55">は？</text:span></text:p>
          </draw:text-box>
        </draw:frame>
        <draw:custom-shape draw:name="角丸四角形 3" draw:style-name="gr62" draw:text-style-name="P38" draw:layer="layout" svg:width="10.6cm" svg:height="6.2cm" svg:x="14.7cm" svg:y="10.3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テキスト ボックス 14" draw:style-name="gr136" draw:text-style-name="P44" draw:layer="layout" svg:width="3.482cm" svg:height="1.013cm" svg:x="15.218cm" svg:y="6.744cm">
          <text:p text:style-name="P43"><text:span text:style-name="T25">破骨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137" draw:text-style-name="P31" xml:id="id35" draw:id="id35" draw:layer="layout" svg:width="4.727cm" svg:height="1.098cm" svg:x="19.34cm" svg:y="5.325cm">
          <text:p text:style-name="P30"><text:span text:style-name="T42">TRACP-5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矢印コネクタ 17" draw:style-name="gr87" draw:text-style-name="P27" draw:layer="layout" draw:type="line" svg:x1="18.5cm" svg:y1="8.441cm" svg:x2="21.703cm" svg:y2="6.423cm" draw:end-shape="id35" draw:end-glue-point="2" svg:d="M18500 8441l3203-2018" svg:viewBox="0 0 3204 2019">
          <text:p/>
        </draw:connector>
        <draw:g draw:name="グループ化 26" draw:style-name="gr63">
          <draw:custom-shape draw:name="弦 3" draw:style-name="gr64" draw:text-style-name="P38" draw:layer="layout" svg:width="2.372cm" svg:height="2.675cm" draw:transform="rotate (-1.96611340237161) translate (18.667cm 8.377cm)">
            <text:p/>
            <draw:enhanced-geometry draw:mirror-horizontal="false" draw:mirror-vertical="false" svg:viewBox="0 0 0 0" draw:glue-points="?f50 ?f51 ?f52 ?f53 ?f54 ?f55 ?f56 ?f57" drawooo:sub-view-size="1830936 2065291" draw:text-areas="0 0 ?f58 ?f59" draw:type="ooxml-non-primitive" draw:enhanced-path="M 1830936 1771861 C 1488515 2091834 969709 2157249 553839 1932887 118819 1698193 -93718 1206332 39355 742253 169018 290066 503189 -23836 1098058 1421 N">
              <draw:equation draw:name="f0" draw:formula="1830827*logwidth/2160240"/>
              <draw:equation draw:name="f1" draw:formula="1794823*logheight/2088232"/>
              <draw:equation draw:name="f2" draw:formula="553730*logwidth/2160240"/>
              <draw:equation draw:name="f3" draw:formula="1955849*logheight/2088232"/>
              <draw:equation draw:name="f4" draw:formula="39246*logwidth/2160240"/>
              <draw:equation draw:name="f5" draw:formula="765215*logheight/2088232"/>
              <draw:equation draw:name="f6" draw:formula="1080119*logwidth/2160240"/>
              <draw:equation draw:name="f7" draw:formula="0*logheight/2088232"/>
              <draw:equation draw:name="f8" draw:formula="1830827*logwidth/2160240"/>
              <draw:equation draw:name="f9" draw:formula="1794823*logheight/2088232"/>
              <draw:equation draw:name="f10" draw:formula="1830936*logwidth/1830936"/>
              <draw:equation draw:name="f11" draw:formula="1719294*logheight/2012724"/>
              <draw:equation draw:name="f12" draw:formula="553839*logwidth/1830936"/>
              <draw:equation draw:name="f13" draw:formula="1880320*logheight/2012724"/>
              <draw:equation draw:name="f14" draw:formula="39355*logwidth/1830936"/>
              <draw:equation draw:name="f15" draw:formula="689686*logheight/2012724"/>
              <draw:equation draw:name="f16" draw:formula="1171668*logwidth/1830936"/>
              <draw:equation draw:name="f17" draw:formula="15911*logheight/2012724"/>
              <draw:equation draw:name="f18" draw:formula="1830936*logwidth/1830936"/>
              <draw:equation draw:name="f19" draw:formula="1701499*logheight/1994929"/>
              <draw:equation draw:name="f20" draw:formula="553839*logwidth/1830936"/>
              <draw:equation draw:name="f21" draw:formula="1862525*logheight/1994929"/>
              <draw:equation draw:name="f22" draw:formula="39355*logwidth/1830936"/>
              <draw:equation draw:name="f23" draw:formula="671891*logheight/1994929"/>
              <draw:equation draw:name="f24" draw:formula="1127254*logwidth/1830936"/>
              <draw:equation draw:name="f25" draw:formula="16650*logheight/1994929"/>
              <draw:equation draw:name="f26" draw:formula="1830936*logwidth/1830936"/>
              <draw:equation draw:name="f27" draw:formula="1773817*logheight/2067247"/>
              <draw:equation draw:name="f28" draw:formula="553839*logwidth/1830936"/>
              <draw:equation draw:name="f29" draw:formula="1934843*logheight/2067247"/>
              <draw:equation draw:name="f30" draw:formula="39355*logwidth/1830936"/>
              <draw:equation draw:name="f31" draw:formula="744209*logheight/2067247"/>
              <draw:equation draw:name="f32" draw:formula="1135082*logwidth/1830936"/>
              <draw:equation draw:name="f33" draw:formula="13999*logheight/2067247"/>
              <draw:equation draw:name="f34" draw:formula="1830936*logwidth/1830936"/>
              <draw:equation draw:name="f35" draw:formula="1761285*logheight/2054715"/>
              <draw:equation draw:name="f36" draw:formula="553839*logwidth/1830936"/>
              <draw:equation draw:name="f37" draw:formula="1922311*logheight/2054715"/>
              <draw:equation draw:name="f38" draw:formula="39355*logwidth/1830936"/>
              <draw:equation draw:name="f39" draw:formula="731677*logheight/2054715"/>
              <draw:equation draw:name="f40" draw:formula="1135082*logwidth/1830936"/>
              <draw:equation draw:name="f41" draw:formula="1467*logheight/2054715"/>
              <draw:equation draw:name="f42" draw:formula="1830936*logwidth/1830936"/>
              <draw:equation draw:name="f43" draw:formula="1759414*logheight/2052844"/>
              <draw:equation draw:name="f44" draw:formula="553839*logwidth/1830936"/>
              <draw:equation draw:name="f45" draw:formula="1920440*logheight/2052844"/>
              <draw:equation draw:name="f46" draw:formula="39355*logwidth/1830936"/>
              <draw:equation draw:name="f47" draw:formula="729806*logheight/2052844"/>
              <draw:equation draw:name="f48" draw:formula="1083718*logwidth/1830936"/>
              <draw:equation draw:name="f49" draw:formula="1475*logheight/2052844"/>
              <draw:equation draw:name="f50" draw:formula="1830936*logwidth/1830936"/>
              <draw:equation draw:name="f51" draw:formula="1771861*logheight/2065291"/>
              <draw:equation draw:name="f52" draw:formula="553839*logwidth/1830936"/>
              <draw:equation draw:name="f53" draw:formula="1932887*logheight/2065291"/>
              <draw:equation draw:name="f54" draw:formula="39355*logwidth/1830936"/>
              <draw:equation draw:name="f55" draw:formula="742253*logheight/2065291"/>
              <draw:equation draw:name="f56" draw:formula="1098058*logwidth/1830936"/>
              <draw:equation draw:name="f57" draw:formula="1421*logheight/2065291"/>
              <draw:equation draw:name="f58" draw:formula="logwidth"/>
              <draw:equation draw:name="f59" draw:formula="logheight"/>
            </draw:enhanced-geometry>
          </draw:custom-shape>
          <draw:custom-shape draw:name="フリーフォーム 30" draw:style-name="gr64" draw:text-style-name="P38" draw:layer="layout" svg:width="2.514cm" svg:height="0.654cm" svg:x="15.618cm" svg:y="9.653cm">
            <text:p/>
            <draw:enhanced-geometry draw:mirror-horizontal="false" draw:mirror-vertical="false" svg:viewBox="0 0 0 0" draw:glue-points="?f0 ?f1 ?f2 ?f3 ?f4 ?f5 ?f6 ?f7 ?f8 ?f9 ?f10 ?f11 ?f12 ?f13 ?f14 ?f15 ?f16 ?f17" drawooo:sub-view-size="5762625 1443037" draw:text-areas="0 0 ?f18 ?f19" draw:type="ooxml-non-primitive" draw:enhanced-path="M 0 4762 C 241697 721518 483394 1438275 723900 1438275 964406 1438275 1203325 3968 1443037 4762 1682749 5556 1921669 1443831 2162175 1443037 2402681 1442243 2646363 0 2886075 0 3125787 0 3359944 1443037 3600450 1443037 3840956 1443037 4087812 794 4329112 0 4570412 -794 4809331 1437481 5048250 1438275 5287169 1439069 5524897 721915 5762625 4762 N">
              <draw:equation draw:name="f0" draw:formula="0*logwidth/5762625"/>
              <draw:equation draw:name="f1" draw:formula="4762*logheight/1443037"/>
              <draw:equation draw:name="f2" draw:formula="723900*logwidth/5762625"/>
              <draw:equation draw:name="f3" draw:formula="1438275*logheight/1443037"/>
              <draw:equation draw:name="f4" draw:formula="1443037*logwidth/5762625"/>
              <draw:equation draw:name="f5" draw:formula="4762*logheight/1443037"/>
              <draw:equation draw:name="f6" draw:formula="2162175*logwidth/5762625"/>
              <draw:equation draw:name="f7" draw:formula="1443037*logheight/1443037"/>
              <draw:equation draw:name="f8" draw:formula="2886075*logwidth/5762625"/>
              <draw:equation draw:name="f9" draw:formula="0*logheight/1443037"/>
              <draw:equation draw:name="f10" draw:formula="3600450*logwidth/5762625"/>
              <draw:equation draw:name="f11" draw:formula="1443037*logheight/1443037"/>
              <draw:equation draw:name="f12" draw:formula="4329112*logwidth/5762625"/>
              <draw:equation draw:name="f13" draw:formula="0*logheight/1443037"/>
              <draw:equation draw:name="f14" draw:formula="5048250*logwidth/5762625"/>
              <draw:equation draw:name="f15" draw:formula="1438275*logheight/1443037"/>
              <draw:equation draw:name="f16" draw:formula="5762625*logwidth/5762625"/>
              <draw:equation draw:name="f17" draw:formula="4762*logheight/1443037"/>
              <draw:equation draw:name="f18" draw:formula="logwidth"/>
              <draw:equation draw:name="f19" draw:formula="logheight"/>
            </draw:enhanced-geometry>
          </draw:custom-shape>
          <draw:custom-shape draw:name="円/楕円 36" draw:style-name="gr67" draw:text-style-name="P41" draw:layer="layout" svg:width="0.593cm" svg:height="0.678cm" svg:x="16.201cm" svg:y="8.246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7" draw:style-name="gr67" draw:text-style-name="P41" draw:layer="layout" svg:width="0.593cm" svg:height="0.678cm" svg:x="16.964cm" svg:y="8.67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アーチ 39" draw:style-name="gr122" draw:text-style-name="P54" draw:layer="layout" svg:width="1.965cm" svg:height="1.999cm" draw:transform="rotate (-1.5707963267949) translate (8.231cm 7.89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テキスト ボックス 40" draw:style-name="gr138" draw:text-style-name="P55" draw:layer="layout" svg:width="4.341cm" svg:height="1.267cm" svg:x="0.099cm" svg:y="6.57cm">
          <text:p text:style-name="P30"><text:span text:style-name="T58">RANK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41" draw:style-name="gr139" draw:text-style-name="P29" draw:layer="layout" svg:width="4.808cm" svg:height="3.952cm" svg:x="8.231cm" svg:y="7.035cm">
          <text:p text:style-name="P28"><text:span text:style-name="T56">前駆</text:span></text:p>
          <text:p text:style-name="P28"><text:span text:style-name="T56">破骨細胞</text:span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角丸四角形 42" draw:style-name="gr140" draw:text-style-name="P31" draw:layer="layout" svg:width="2.799cm" svg:height="0.825cm" svg:x="6.431cm" svg:y="7.064cm">
          <text:p text:style-name="P30"><text:span text:style-name="T57">RAN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円/楕円 43" draw:style-name="gr134" draw:text-style-name="P56" xml:id="id36" draw:id="id36" draw:layer="layout" svg:width="1.249cm" svg:height="0.999cm" svg:x="1.49cm" svg:y="8.411cm">
          <text:p text:style-name="P25"><text:span text:style-name="T29"/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44" draw:style-name="gr134" draw:text-style-name="P56" xml:id="id37" draw:id="id37" draw:layer="layout" svg:width="1.249cm" svg:height="0.999cm" svg:x="6.371cm" svg:y="8.373cm">
          <text:p text:style-name="P25"><text:span text:style-name="T29"/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直線矢印コネクタ 45" draw:style-name="gr135" draw:text-style-name="P27" draw:layer="layout" draw:type="line" svg:x1="2.739cm" svg:y1="8.911cm" svg:x2="6.371cm" svg:y2="8.873cm" draw:start-shape="id36" draw:start-glue-point="10" draw:end-shape="id37" draw:end-glue-point="6" svg:d="M2739 8911l3632-38" svg:viewBox="0 0 3633 39">
          <text:p/>
        </draw:connector>
        <draw:custom-shape draw:name="下矢印 49" draw:style-name="gr141" draw:text-style-name="P57" draw:layer="layout" svg:width="1.088cm" svg:height="2.443cm" draw:transform="rotate (1.5707963267949) translate (13.079cm 9.57cm)">
          <text:p/>
          <draw:enhanced-geometry draw:mirror-horizontal="false" draw:mirror-vertical="false" svg:viewBox="0 0 0 0" draw:text-areas="?f8 0 ?f9 ?f12" draw:type="ooxml-downArrow" draw:modifiers="50000 932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円/楕円 2" draw:style-name="gr142" draw:text-style-name="P58" draw:layer="layout" svg:width="3.953cm" svg:height="4.099cm" svg:x="16.7cm" svg:y="10.82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グループ化 4" draw:style-name="gr63">
          <draw:custom-shape draw:name="円/楕円 38" draw:style-name="gr68" draw:text-style-name="P42" draw:layer="layout" svg:width="1.399cm" svg:height="1.304cm" svg:x="17.701cm" svg:y="10.2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テキスト ボックス 46" draw:style-name="gr143" draw:text-style-name="P31" draw:layer="layout" svg:width="1.399cm" svg:height="1.013cm" svg:x="17.701cm" svg:y="10.36cm">
            <text:p text:style-name="P30"><text:span text:style-name="T26">H</text:span><text:span text:style-name="T38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nosumabとは？ (7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54">Den</text:span><text:span text:style-name="T54">osu</text:span><text:span text:style-name="T54">mab</text:span><text:span text:style-name="T55">と</text:span><text:span text:style-name="T55">は？</text:span></text:p>
          </draw:text-box>
        </draw:frame>
        <draw:custom-shape draw:name="角丸四角形 3" draw:style-name="gr62" draw:text-style-name="P38" draw:layer="layout" svg:width="10.6cm" svg:height="6.2cm" svg:x="14.7cm" svg:y="10.3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テキスト ボックス 14" draw:style-name="gr144" draw:text-style-name="P44" draw:layer="layout" svg:width="3.482cm" svg:height="1.013cm" svg:x="15.218cm" svg:y="6.744cm">
          <text:p text:style-name="P43"><text:span text:style-name="T25">破骨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145" draw:text-style-name="P31" xml:id="id38" draw:id="id38" draw:layer="layout" svg:width="4.727cm" svg:height="1.098cm" svg:x="19.34cm" svg:y="5.325cm">
          <text:p text:style-name="P30"><text:span text:style-name="T42">TRACP-5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矢印コネクタ 17" draw:style-name="gr87" draw:text-style-name="P27" draw:layer="layout" draw:type="line" svg:x1="18.5cm" svg:y1="8.441cm" svg:x2="21.703cm" svg:y2="6.423cm" draw:end-shape="id38" draw:end-glue-point="2" svg:d="M18500 8441l3203-2018" svg:viewBox="0 0 3204 2019">
          <text:p/>
        </draw:connector>
        <draw:g draw:name="グループ化 26" draw:style-name="gr63">
          <draw:custom-shape draw:name="弦 3" draw:style-name="gr64" draw:text-style-name="P38" draw:layer="layout" svg:width="2.372cm" svg:height="2.675cm" draw:transform="rotate (-1.96611340237161) translate (18.667cm 8.377cm)">
            <text:p/>
            <draw:enhanced-geometry draw:mirror-horizontal="false" draw:mirror-vertical="false" svg:viewBox="0 0 0 0" draw:glue-points="?f50 ?f51 ?f52 ?f53 ?f54 ?f55 ?f56 ?f57" drawooo:sub-view-size="1830936 2065291" draw:text-areas="0 0 ?f58 ?f59" draw:type="ooxml-non-primitive" draw:enhanced-path="M 1830936 1771861 C 1488515 2091834 969709 2157249 553839 1932887 118819 1698193 -93718 1206332 39355 742253 169018 290066 503189 -23836 1098058 1421 N">
              <draw:equation draw:name="f0" draw:formula="1830827*logwidth/2160240"/>
              <draw:equation draw:name="f1" draw:formula="1794823*logheight/2088232"/>
              <draw:equation draw:name="f2" draw:formula="553730*logwidth/2160240"/>
              <draw:equation draw:name="f3" draw:formula="1955849*logheight/2088232"/>
              <draw:equation draw:name="f4" draw:formula="39246*logwidth/2160240"/>
              <draw:equation draw:name="f5" draw:formula="765215*logheight/2088232"/>
              <draw:equation draw:name="f6" draw:formula="1080119*logwidth/2160240"/>
              <draw:equation draw:name="f7" draw:formula="0*logheight/2088232"/>
              <draw:equation draw:name="f8" draw:formula="1830827*logwidth/2160240"/>
              <draw:equation draw:name="f9" draw:formula="1794823*logheight/2088232"/>
              <draw:equation draw:name="f10" draw:formula="1830936*logwidth/1830936"/>
              <draw:equation draw:name="f11" draw:formula="1719294*logheight/2012724"/>
              <draw:equation draw:name="f12" draw:formula="553839*logwidth/1830936"/>
              <draw:equation draw:name="f13" draw:formula="1880320*logheight/2012724"/>
              <draw:equation draw:name="f14" draw:formula="39355*logwidth/1830936"/>
              <draw:equation draw:name="f15" draw:formula="689686*logheight/2012724"/>
              <draw:equation draw:name="f16" draw:formula="1171668*logwidth/1830936"/>
              <draw:equation draw:name="f17" draw:formula="15911*logheight/2012724"/>
              <draw:equation draw:name="f18" draw:formula="1830936*logwidth/1830936"/>
              <draw:equation draw:name="f19" draw:formula="1701499*logheight/1994929"/>
              <draw:equation draw:name="f20" draw:formula="553839*logwidth/1830936"/>
              <draw:equation draw:name="f21" draw:formula="1862525*logheight/1994929"/>
              <draw:equation draw:name="f22" draw:formula="39355*logwidth/1830936"/>
              <draw:equation draw:name="f23" draw:formula="671891*logheight/1994929"/>
              <draw:equation draw:name="f24" draw:formula="1127254*logwidth/1830936"/>
              <draw:equation draw:name="f25" draw:formula="16650*logheight/1994929"/>
              <draw:equation draw:name="f26" draw:formula="1830936*logwidth/1830936"/>
              <draw:equation draw:name="f27" draw:formula="1773817*logheight/2067247"/>
              <draw:equation draw:name="f28" draw:formula="553839*logwidth/1830936"/>
              <draw:equation draw:name="f29" draw:formula="1934843*logheight/2067247"/>
              <draw:equation draw:name="f30" draw:formula="39355*logwidth/1830936"/>
              <draw:equation draw:name="f31" draw:formula="744209*logheight/2067247"/>
              <draw:equation draw:name="f32" draw:formula="1135082*logwidth/1830936"/>
              <draw:equation draw:name="f33" draw:formula="13999*logheight/2067247"/>
              <draw:equation draw:name="f34" draw:formula="1830936*logwidth/1830936"/>
              <draw:equation draw:name="f35" draw:formula="1761285*logheight/2054715"/>
              <draw:equation draw:name="f36" draw:formula="553839*logwidth/1830936"/>
              <draw:equation draw:name="f37" draw:formula="1922311*logheight/2054715"/>
              <draw:equation draw:name="f38" draw:formula="39355*logwidth/1830936"/>
              <draw:equation draw:name="f39" draw:formula="731677*logheight/2054715"/>
              <draw:equation draw:name="f40" draw:formula="1135082*logwidth/1830936"/>
              <draw:equation draw:name="f41" draw:formula="1467*logheight/2054715"/>
              <draw:equation draw:name="f42" draw:formula="1830936*logwidth/1830936"/>
              <draw:equation draw:name="f43" draw:formula="1759414*logheight/2052844"/>
              <draw:equation draw:name="f44" draw:formula="553839*logwidth/1830936"/>
              <draw:equation draw:name="f45" draw:formula="1920440*logheight/2052844"/>
              <draw:equation draw:name="f46" draw:formula="39355*logwidth/1830936"/>
              <draw:equation draw:name="f47" draw:formula="729806*logheight/2052844"/>
              <draw:equation draw:name="f48" draw:formula="1083718*logwidth/1830936"/>
              <draw:equation draw:name="f49" draw:formula="1475*logheight/2052844"/>
              <draw:equation draw:name="f50" draw:formula="1830936*logwidth/1830936"/>
              <draw:equation draw:name="f51" draw:formula="1771861*logheight/2065291"/>
              <draw:equation draw:name="f52" draw:formula="553839*logwidth/1830936"/>
              <draw:equation draw:name="f53" draw:formula="1932887*logheight/2065291"/>
              <draw:equation draw:name="f54" draw:formula="39355*logwidth/1830936"/>
              <draw:equation draw:name="f55" draw:formula="742253*logheight/2065291"/>
              <draw:equation draw:name="f56" draw:formula="1098058*logwidth/1830936"/>
              <draw:equation draw:name="f57" draw:formula="1421*logheight/2065291"/>
              <draw:equation draw:name="f58" draw:formula="logwidth"/>
              <draw:equation draw:name="f59" draw:formula="logheight"/>
            </draw:enhanced-geometry>
          </draw:custom-shape>
          <draw:custom-shape draw:name="フリーフォーム 30" draw:style-name="gr64" draw:text-style-name="P38" draw:layer="layout" svg:width="2.514cm" svg:height="0.654cm" svg:x="15.618cm" svg:y="9.653cm">
            <text:p/>
            <draw:enhanced-geometry draw:mirror-horizontal="false" draw:mirror-vertical="false" svg:viewBox="0 0 0 0" draw:glue-points="?f0 ?f1 ?f2 ?f3 ?f4 ?f5 ?f6 ?f7 ?f8 ?f9 ?f10 ?f11 ?f12 ?f13 ?f14 ?f15 ?f16 ?f17" drawooo:sub-view-size="5762625 1443037" draw:text-areas="0 0 ?f18 ?f19" draw:type="ooxml-non-primitive" draw:enhanced-path="M 0 4762 C 241697 721518 483394 1438275 723900 1438275 964406 1438275 1203325 3968 1443037 4762 1682749 5556 1921669 1443831 2162175 1443037 2402681 1442243 2646363 0 2886075 0 3125787 0 3359944 1443037 3600450 1443037 3840956 1443037 4087812 794 4329112 0 4570412 -794 4809331 1437481 5048250 1438275 5287169 1439069 5524897 721915 5762625 4762 N">
              <draw:equation draw:name="f0" draw:formula="0*logwidth/5762625"/>
              <draw:equation draw:name="f1" draw:formula="4762*logheight/1443037"/>
              <draw:equation draw:name="f2" draw:formula="723900*logwidth/5762625"/>
              <draw:equation draw:name="f3" draw:formula="1438275*logheight/1443037"/>
              <draw:equation draw:name="f4" draw:formula="1443037*logwidth/5762625"/>
              <draw:equation draw:name="f5" draw:formula="4762*logheight/1443037"/>
              <draw:equation draw:name="f6" draw:formula="2162175*logwidth/5762625"/>
              <draw:equation draw:name="f7" draw:formula="1443037*logheight/1443037"/>
              <draw:equation draw:name="f8" draw:formula="2886075*logwidth/5762625"/>
              <draw:equation draw:name="f9" draw:formula="0*logheight/1443037"/>
              <draw:equation draw:name="f10" draw:formula="3600450*logwidth/5762625"/>
              <draw:equation draw:name="f11" draw:formula="1443037*logheight/1443037"/>
              <draw:equation draw:name="f12" draw:formula="4329112*logwidth/5762625"/>
              <draw:equation draw:name="f13" draw:formula="0*logheight/1443037"/>
              <draw:equation draw:name="f14" draw:formula="5048250*logwidth/5762625"/>
              <draw:equation draw:name="f15" draw:formula="1438275*logheight/1443037"/>
              <draw:equation draw:name="f16" draw:formula="5762625*logwidth/5762625"/>
              <draw:equation draw:name="f17" draw:formula="4762*logheight/1443037"/>
              <draw:equation draw:name="f18" draw:formula="logwidth"/>
              <draw:equation draw:name="f19" draw:formula="logheight"/>
            </draw:enhanced-geometry>
          </draw:custom-shape>
          <draw:custom-shape draw:name="円/楕円 36" draw:style-name="gr67" draw:text-style-name="P41" draw:layer="layout" svg:width="0.593cm" svg:height="0.678cm" svg:x="16.201cm" svg:y="8.246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7" draw:style-name="gr67" draw:text-style-name="P41" draw:layer="layout" svg:width="0.593cm" svg:height="0.678cm" svg:x="16.964cm" svg:y="8.671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アーチ 39" draw:style-name="gr122" draw:text-style-name="P54" draw:layer="layout" svg:width="1.965cm" svg:height="1.999cm" draw:transform="rotate (-1.5707963267949) translate (8.231cm 7.89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テキスト ボックス 40" draw:style-name="gr146" draw:text-style-name="P55" draw:layer="layout" svg:width="4.341cm" svg:height="1.267cm" svg:x="0.099cm" svg:y="6.57cm">
          <text:p text:style-name="P30"><text:span text:style-name="T58">RANK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41" draw:style-name="gr147" draw:text-style-name="P29" draw:layer="layout" svg:width="4.808cm" svg:height="3.952cm" svg:x="8.231cm" svg:y="7.035cm">
          <text:p text:style-name="P28"><text:span text:style-name="T56">前駆</text:span></text:p>
          <text:p text:style-name="P28"><text:span text:style-name="T56">破骨細胞</text:span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角丸四角形 42" draw:style-name="gr148" draw:text-style-name="P31" draw:layer="layout" svg:width="2.799cm" svg:height="0.825cm" svg:x="6.431cm" svg:y="7.064cm">
          <text:p text:style-name="P30"><text:span text:style-name="T57">RAN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円/楕円 43" draw:style-name="gr134" draw:text-style-name="P56" xml:id="id39" draw:id="id39" draw:layer="layout" svg:width="1.249cm" svg:height="0.999cm" svg:x="1.49cm" svg:y="8.411cm">
          <text:p text:style-name="P25"><text:span text:style-name="T29"/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44" draw:style-name="gr134" draw:text-style-name="P56" xml:id="id40" draw:id="id40" draw:layer="layout" svg:width="1.249cm" svg:height="0.999cm" svg:x="6.371cm" svg:y="8.373cm">
          <text:p text:style-name="P25"><text:span text:style-name="T29"/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直線矢印コネクタ 45" draw:style-name="gr135" draw:text-style-name="P27" draw:layer="layout" draw:type="line" svg:x1="2.739cm" svg:y1="8.911cm" svg:x2="6.371cm" svg:y2="8.873cm" draw:start-shape="id39" draw:start-glue-point="10" draw:end-shape="id40" draw:end-glue-point="6" svg:d="M2739 8911l3632-38" svg:viewBox="0 0 3633 39">
          <text:p/>
        </draw:connector>
        <draw:custom-shape draw:name="下矢印 49" draw:style-name="gr141" draw:text-style-name="P57" draw:layer="layout" svg:width="1.088cm" svg:height="2.443cm" draw:transform="rotate (1.5707963267949) translate (13.079cm 9.57cm)">
          <text:p/>
          <draw:enhanced-geometry draw:mirror-horizontal="false" draw:mirror-vertical="false" svg:viewBox="0 0 0 0" draw:text-areas="?f8 0 ?f9 ?f12" draw:type="ooxml-downArrow" draw:modifiers="50000 932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テキスト ボックス 6" draw:style-name="gr149" draw:text-style-name="P31" xml:id="id41" draw:id="id41" draw:layer="layout" svg:width="7.363cm" svg:height="1.437cm" svg:x="0.615cm" svg:y="13.76cm">
          <text:p text:style-name="P30"><text:span text:style-name="T59">Denosum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8" draw:style-name="gr150" draw:text-style-name="P27" draw:layer="layout" draw:type="line" svg:x1="4.038cm" svg:y1="8.339cm" svg:x2="4.555cm" svg:y2="9.584cm" svg:d="M4038 8339l517 1245" svg:viewBox="0 0 518 1246">
          <text:p/>
        </draw:connector>
        <draw:connector draw:name="直線コネクタ 51" draw:style-name="gr150" draw:text-style-name="P27" draw:layer="layout" draw:type="line" svg:x1="4.244cm" svg:y1="8.339cm" svg:x2="4.761cm" svg:y2="9.584cm" svg:d="M4244 8339l517 1245" svg:viewBox="0 0 518 1246">
          <text:p/>
        </draw:connector>
        <draw:connector draw:name="直線矢印コネクタ 11" draw:style-name="gr151" draw:text-style-name="P27" draw:layer="layout" draw:type="line" svg:x1="4.296cm" svg:y1="13.76cm" svg:x2="4.43cm" svg:y2="9.653cm" draw:start-shape="id41" draw:start-glue-point="0" svg:d="M4296 13760l134-4107" svg:viewBox="0 0 135 4108">
          <text:p/>
        </draw:connector>
        <draw:custom-shape draw:name="円/楕円 47" draw:style-name="gr142" draw:text-style-name="P58" draw:layer="layout" svg:width="3.953cm" svg:height="4.099cm" svg:x="16.7cm" svg:y="10.82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グループ化 2" draw:style-name="gr63">
          <draw:custom-shape draw:name="円/楕円 38" draw:style-name="gr68" draw:text-style-name="P42" draw:layer="layout" svg:width="1.399cm" svg:height="1.304cm" svg:x="17.701cm" svg:y="10.2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テキスト ボックス 46" draw:style-name="gr152" draw:text-style-name="P31" draw:layer="layout" svg:width="1.399cm" svg:height="1.013cm" svg:x="17.701cm" svg:y="10.36cm">
            <text:p text:style-name="P30"><text:span text:style-name="T26">H</text:span><text:span text:style-name="T38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nosumabとは？ (8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54">Den</text:span><text:span text:style-name="T54">osu</text:span><text:span text:style-name="T54">mab</text:span><text:span text:style-name="T55">と</text:span><text:span text:style-name="T55">は？</text:span></text:p>
          </draw:text-box>
        </draw:frame>
        <draw:custom-shape draw:name="角丸四角形 3" draw:style-name="gr62" draw:text-style-name="P38" draw:layer="layout" svg:width="10.6cm" svg:height="6.2cm" svg:x="14.7cm" svg:y="12.7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テキスト ボックス 14" draw:style-name="gr153" draw:text-style-name="P44" draw:layer="layout" svg:width="3.482cm" svg:height="1.013cm" svg:x="15.218cm" svg:y="9.099cm">
          <text:p text:style-name="P43"><text:span text:style-name="T25">破骨細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154" draw:text-style-name="P31" xml:id="id42" draw:id="id42" draw:layer="layout" svg:width="4.727cm" svg:height="1.098cm" svg:x="19.34cm" svg:y="7.68cm">
          <text:p text:style-name="P30"><text:span text:style-name="T42">TRACP-5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矢印コネクタ 17" draw:style-name="gr87" draw:text-style-name="P27" draw:layer="layout" draw:type="line" svg:x1="18.5cm" svg:y1="10.796cm" svg:x2="21.703cm" svg:y2="8.778cm" draw:end-shape="id42" draw:end-glue-point="2" svg:d="M18500 10796l3203-2018" svg:viewBox="0 0 3204 2019">
          <text:p/>
        </draw:connector>
        <draw:g draw:name="グループ化 26" draw:style-name="gr63">
          <draw:custom-shape draw:name="弦 3" draw:style-name="gr64" draw:text-style-name="P38" draw:layer="layout" svg:width="2.372cm" svg:height="2.675cm" draw:transform="rotate (-1.96611340237161) translate (18.667cm 10.732cm)">
            <text:p/>
            <draw:enhanced-geometry draw:mirror-horizontal="false" draw:mirror-vertical="false" svg:viewBox="0 0 0 0" draw:glue-points="?f50 ?f51 ?f52 ?f53 ?f54 ?f55 ?f56 ?f57" drawooo:sub-view-size="1830936 2065291" draw:text-areas="0 0 ?f58 ?f59" draw:type="ooxml-non-primitive" draw:enhanced-path="M 1830936 1771861 C 1488515 2091834 969709 2157249 553839 1932887 118819 1698193 -93718 1206332 39355 742253 169018 290066 503189 -23836 1098058 1421 N">
              <draw:equation draw:name="f0" draw:formula="1830827*logwidth/2160240"/>
              <draw:equation draw:name="f1" draw:formula="1794823*logheight/2088232"/>
              <draw:equation draw:name="f2" draw:formula="553730*logwidth/2160240"/>
              <draw:equation draw:name="f3" draw:formula="1955849*logheight/2088232"/>
              <draw:equation draw:name="f4" draw:formula="39246*logwidth/2160240"/>
              <draw:equation draw:name="f5" draw:formula="765215*logheight/2088232"/>
              <draw:equation draw:name="f6" draw:formula="1080119*logwidth/2160240"/>
              <draw:equation draw:name="f7" draw:formula="0*logheight/2088232"/>
              <draw:equation draw:name="f8" draw:formula="1830827*logwidth/2160240"/>
              <draw:equation draw:name="f9" draw:formula="1794823*logheight/2088232"/>
              <draw:equation draw:name="f10" draw:formula="1830936*logwidth/1830936"/>
              <draw:equation draw:name="f11" draw:formula="1719294*logheight/2012724"/>
              <draw:equation draw:name="f12" draw:formula="553839*logwidth/1830936"/>
              <draw:equation draw:name="f13" draw:formula="1880320*logheight/2012724"/>
              <draw:equation draw:name="f14" draw:formula="39355*logwidth/1830936"/>
              <draw:equation draw:name="f15" draw:formula="689686*logheight/2012724"/>
              <draw:equation draw:name="f16" draw:formula="1171668*logwidth/1830936"/>
              <draw:equation draw:name="f17" draw:formula="15911*logheight/2012724"/>
              <draw:equation draw:name="f18" draw:formula="1830936*logwidth/1830936"/>
              <draw:equation draw:name="f19" draw:formula="1701499*logheight/1994929"/>
              <draw:equation draw:name="f20" draw:formula="553839*logwidth/1830936"/>
              <draw:equation draw:name="f21" draw:formula="1862525*logheight/1994929"/>
              <draw:equation draw:name="f22" draw:formula="39355*logwidth/1830936"/>
              <draw:equation draw:name="f23" draw:formula="671891*logheight/1994929"/>
              <draw:equation draw:name="f24" draw:formula="1127254*logwidth/1830936"/>
              <draw:equation draw:name="f25" draw:formula="16650*logheight/1994929"/>
              <draw:equation draw:name="f26" draw:formula="1830936*logwidth/1830936"/>
              <draw:equation draw:name="f27" draw:formula="1773817*logheight/2067247"/>
              <draw:equation draw:name="f28" draw:formula="553839*logwidth/1830936"/>
              <draw:equation draw:name="f29" draw:formula="1934843*logheight/2067247"/>
              <draw:equation draw:name="f30" draw:formula="39355*logwidth/1830936"/>
              <draw:equation draw:name="f31" draw:formula="744209*logheight/2067247"/>
              <draw:equation draw:name="f32" draw:formula="1135082*logwidth/1830936"/>
              <draw:equation draw:name="f33" draw:formula="13999*logheight/2067247"/>
              <draw:equation draw:name="f34" draw:formula="1830936*logwidth/1830936"/>
              <draw:equation draw:name="f35" draw:formula="1761285*logheight/2054715"/>
              <draw:equation draw:name="f36" draw:formula="553839*logwidth/1830936"/>
              <draw:equation draw:name="f37" draw:formula="1922311*logheight/2054715"/>
              <draw:equation draw:name="f38" draw:formula="39355*logwidth/1830936"/>
              <draw:equation draw:name="f39" draw:formula="731677*logheight/2054715"/>
              <draw:equation draw:name="f40" draw:formula="1135082*logwidth/1830936"/>
              <draw:equation draw:name="f41" draw:formula="1467*logheight/2054715"/>
              <draw:equation draw:name="f42" draw:formula="1830936*logwidth/1830936"/>
              <draw:equation draw:name="f43" draw:formula="1759414*logheight/2052844"/>
              <draw:equation draw:name="f44" draw:formula="553839*logwidth/1830936"/>
              <draw:equation draw:name="f45" draw:formula="1920440*logheight/2052844"/>
              <draw:equation draw:name="f46" draw:formula="39355*logwidth/1830936"/>
              <draw:equation draw:name="f47" draw:formula="729806*logheight/2052844"/>
              <draw:equation draw:name="f48" draw:formula="1083718*logwidth/1830936"/>
              <draw:equation draw:name="f49" draw:formula="1475*logheight/2052844"/>
              <draw:equation draw:name="f50" draw:formula="1830936*logwidth/1830936"/>
              <draw:equation draw:name="f51" draw:formula="1771861*logheight/2065291"/>
              <draw:equation draw:name="f52" draw:formula="553839*logwidth/1830936"/>
              <draw:equation draw:name="f53" draw:formula="1932887*logheight/2065291"/>
              <draw:equation draw:name="f54" draw:formula="39355*logwidth/1830936"/>
              <draw:equation draw:name="f55" draw:formula="742253*logheight/2065291"/>
              <draw:equation draw:name="f56" draw:formula="1098058*logwidth/1830936"/>
              <draw:equation draw:name="f57" draw:formula="1421*logheight/2065291"/>
              <draw:equation draw:name="f58" draw:formula="logwidth"/>
              <draw:equation draw:name="f59" draw:formula="logheight"/>
            </draw:enhanced-geometry>
          </draw:custom-shape>
          <draw:custom-shape draw:name="フリーフォーム 30" draw:style-name="gr64" draw:text-style-name="P38" draw:layer="layout" svg:width="2.514cm" svg:height="0.654cm" svg:x="15.618cm" svg:y="12.008cm">
            <text:p/>
            <draw:enhanced-geometry draw:mirror-horizontal="false" draw:mirror-vertical="false" svg:viewBox="0 0 0 0" draw:glue-points="?f0 ?f1 ?f2 ?f3 ?f4 ?f5 ?f6 ?f7 ?f8 ?f9 ?f10 ?f11 ?f12 ?f13 ?f14 ?f15 ?f16 ?f17" drawooo:sub-view-size="5762625 1443037" draw:text-areas="0 0 ?f18 ?f19" draw:type="ooxml-non-primitive" draw:enhanced-path="M 0 4762 C 241697 721518 483394 1438275 723900 1438275 964406 1438275 1203325 3968 1443037 4762 1682749 5556 1921669 1443831 2162175 1443037 2402681 1442243 2646363 0 2886075 0 3125787 0 3359944 1443037 3600450 1443037 3840956 1443037 4087812 794 4329112 0 4570412 -794 4809331 1437481 5048250 1438275 5287169 1439069 5524897 721915 5762625 4762 N">
              <draw:equation draw:name="f0" draw:formula="0*logwidth/5762625"/>
              <draw:equation draw:name="f1" draw:formula="4762*logheight/1443037"/>
              <draw:equation draw:name="f2" draw:formula="723900*logwidth/5762625"/>
              <draw:equation draw:name="f3" draw:formula="1438275*logheight/1443037"/>
              <draw:equation draw:name="f4" draw:formula="1443037*logwidth/5762625"/>
              <draw:equation draw:name="f5" draw:formula="4762*logheight/1443037"/>
              <draw:equation draw:name="f6" draw:formula="2162175*logwidth/5762625"/>
              <draw:equation draw:name="f7" draw:formula="1443037*logheight/1443037"/>
              <draw:equation draw:name="f8" draw:formula="2886075*logwidth/5762625"/>
              <draw:equation draw:name="f9" draw:formula="0*logheight/1443037"/>
              <draw:equation draw:name="f10" draw:formula="3600450*logwidth/5762625"/>
              <draw:equation draw:name="f11" draw:formula="1443037*logheight/1443037"/>
              <draw:equation draw:name="f12" draw:formula="4329112*logwidth/5762625"/>
              <draw:equation draw:name="f13" draw:formula="0*logheight/1443037"/>
              <draw:equation draw:name="f14" draw:formula="5048250*logwidth/5762625"/>
              <draw:equation draw:name="f15" draw:formula="1438275*logheight/1443037"/>
              <draw:equation draw:name="f16" draw:formula="5762625*logwidth/5762625"/>
              <draw:equation draw:name="f17" draw:formula="4762*logheight/1443037"/>
              <draw:equation draw:name="f18" draw:formula="logwidth"/>
              <draw:equation draw:name="f19" draw:formula="logheight"/>
            </draw:enhanced-geometry>
          </draw:custom-shape>
          <draw:custom-shape draw:name="円/楕円 36" draw:style-name="gr67" draw:text-style-name="P41" draw:layer="layout" svg:width="0.593cm" svg:height="0.678cm" svg:x="16.201cm" svg:y="10.60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7" draw:style-name="gr67" draw:text-style-name="P41" draw:layer="layout" svg:width="0.593cm" svg:height="0.678cm" svg:x="16.964cm" svg:y="11.026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アーチ 39" draw:style-name="gr122" draw:text-style-name="P54" draw:layer="layout" svg:width="1.965cm" svg:height="1.999cm" draw:transform="rotate (-1.5707963267949) translate (8.231cm 10.245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テキスト ボックス 40" draw:style-name="gr155" draw:text-style-name="P55" draw:layer="layout" svg:width="4.341cm" svg:height="1.267cm" svg:x="0.099cm" svg:y="8.925cm">
          <text:p text:style-name="P30"><text:span text:style-name="T58">RANK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41" draw:style-name="gr156" draw:text-style-name="P29" xml:id="id48" draw:id="id48" draw:layer="layout" svg:width="4.808cm" svg:height="3.952cm" svg:x="8.231cm" svg:y="9.39cm">
          <text:p text:style-name="P28"><text:span text:style-name="T56">前駆</text:span></text:p>
          <text:p text:style-name="P28"><text:span text:style-name="T56">破骨細胞</text:span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角丸四角形 42" draw:style-name="gr157" draw:text-style-name="P31" draw:layer="layout" svg:width="2.799cm" svg:height="0.825cm" svg:x="6.431cm" svg:y="9.419cm">
          <text:p text:style-name="P30"><text:span text:style-name="T57">RAN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円/楕円 43" draw:style-name="gr134" draw:text-style-name="P56" xml:id="id43" draw:id="id43" draw:layer="layout" svg:width="1.249cm" svg:height="0.999cm" svg:x="1.49cm" svg:y="10.766cm">
          <text:p text:style-name="P25"><text:span text:style-name="T29"/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44" draw:style-name="gr134" draw:text-style-name="P56" xml:id="id44" draw:id="id44" draw:layer="layout" svg:width="1.249cm" svg:height="0.999cm" svg:x="6.371cm" svg:y="10.728cm">
          <text:p text:style-name="P25"><text:span text:style-name="T29"/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直線矢印コネクタ 45" draw:style-name="gr135" draw:text-style-name="P27" draw:layer="layout" draw:type="line" svg:x1="2.739cm" svg:y1="11.266cm" svg:x2="6.371cm" svg:y2="11.228cm" draw:start-shape="id43" draw:start-glue-point="10" draw:end-shape="id44" draw:end-glue-point="6" svg:d="M2739 11266l3632-38" svg:viewBox="0 0 3633 39">
          <text:p/>
        </draw:connector>
        <draw:custom-shape draw:name="下矢印 49" draw:style-name="gr141" draw:text-style-name="P57" draw:layer="layout" svg:width="1.088cm" svg:height="2.443cm" draw:transform="rotate (1.5707963267949) translate (13.079cm 11.925cm)">
          <text:p/>
          <draw:enhanced-geometry draw:mirror-horizontal="false" draw:mirror-vertical="false" svg:viewBox="0 0 0 0" draw:text-areas="?f8 0 ?f9 ?f12" draw:type="ooxml-downArrow" draw:modifiers="50000 932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テキスト ボックス 6" draw:style-name="gr158" draw:text-style-name="P31" xml:id="id45" draw:id="id45" draw:layer="layout" svg:width="7.363cm" svg:height="1.437cm" svg:x="0.615cm" svg:y="16.116cm">
          <text:p text:style-name="P30"><text:span text:style-name="T59">Denosum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8" draw:style-name="gr150" draw:text-style-name="P27" draw:layer="layout" draw:type="line" svg:x1="4.038cm" svg:y1="10.694cm" svg:x2="4.555cm" svg:y2="11.939cm" svg:d="M4038 10694l517 1245" svg:viewBox="0 0 518 1246">
          <text:p/>
        </draw:connector>
        <draw:connector draw:name="直線コネクタ 51" draw:style-name="gr150" draw:text-style-name="P27" draw:layer="layout" draw:type="line" svg:x1="4.244cm" svg:y1="10.694cm" svg:x2="4.761cm" svg:y2="11.939cm" svg:d="M4244 10694l517 1245" svg:viewBox="0 0 518 1246">
          <text:p/>
        </draw:connector>
        <draw:connector draw:name="直線矢印コネクタ 11" draw:style-name="gr151" draw:text-style-name="P27" draw:layer="layout" draw:type="line" svg:x1="4.296cm" svg:y1="16.116cm" svg:x2="4.43cm" svg:y2="12.008cm" draw:start-shape="id45" draw:start-glue-point="0" svg:d="M4296 16116l134-4108" svg:viewBox="0 0 135 4109">
          <text:p/>
        </draw:connector>
        <draw:custom-shape draw:name="テキスト ボックス 2" draw:style-name="gr159" draw:text-style-name="P31" xml:id="id47" draw:id="id47" draw:layer="layout" svg:width="2.702cm" svg:height="1.013cm" svg:x="8.504cm" svg:y="5.699cm">
          <text:p text:style-name="P30"><text:span text:style-name="T28">M-CS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8" draw:style-name="gr160" draw:text-style-name="P31" xml:id="id46" draw:id="id46" draw:layer="layout" svg:width="2.702cm" svg:height="1.013cm" svg:x="5.499cm" svg:y="5.699cm">
          <text:p text:style-name="P30"><text:span text:style-name="T28">TG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6" draw:style-name="gr161" draw:text-style-name="P31" xml:id="id49" draw:id="id49" draw:layer="layout" svg:width="3.597cm" svg:height="1.013cm" svg:x="11.51cm" svg:y="5.751cm">
          <text:p text:style-name="P30"><text:span text:style-name="T28">Sema-6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7" draw:style-name="gr162" draw:text-style-name="P31" draw:layer="layout" svg:width="2.702cm" svg:height="1.013cm" svg:x="6.978cm" svg:y="13.082cm">
          <text:p text:style-name="P30"><text:span text:style-name="T28">TRPV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矢印コネクタ 5" draw:style-name="gr163" draw:text-style-name="P27" draw:layer="layout" draw:type="line" svg:x1="6.85cm" svg:y1="6.712cm" svg:x2="10.099cm" svg:y2="9.418cm" draw:start-shape="id46" draw:start-glue-point="2" svg:d="M6850 6712l3249 2706" svg:viewBox="0 0 3250 2707">
          <text:p/>
        </draw:connector>
        <draw:connector draw:name="直線矢印コネクタ 10" draw:style-name="gr163" draw:text-style-name="P27" draw:layer="layout" draw:type="line" svg:x1="9.855cm" svg:y1="6.712cm" svg:x2="10.635cm" svg:y2="9.39cm" draw:start-shape="id47" draw:start-glue-point="2" draw:end-shape="id48" draw:end-glue-point="4" svg:d="M9855 6712l780 2678" svg:viewBox="0 0 781 2679">
          <text:p/>
        </draw:connector>
        <draw:connector draw:name="直線矢印コネクタ 15" draw:style-name="gr163" draw:text-style-name="P27" draw:layer="layout" draw:type="line" svg:x1="13.308cm" svg:y1="6.764cm" svg:x2="11.207cm" svg:y2="9.389cm" draw:start-shape="id49" draw:start-glue-point="2" svg:d="M13308 6764l-2101 2625" svg:viewBox="0 0 2102 2626">
          <text:p/>
        </draw:connector>
        <draw:custom-shape draw:name="テキスト ボックス 19" draw:style-name="gr164" draw:text-style-name="P29" draw:layer="layout" svg:width="3.88cm" svg:height="1.775cm" svg:x="10.246cm" svg:y="13.28cm">
          <text:p text:style-name="P28"><text:span text:style-name="T29">インテグリ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52" draw:style-name="gr142" draw:text-style-name="P58" draw:layer="layout" svg:width="3.953cm" svg:height="4.099cm" svg:x="16.7cm" svg:y="12.70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グループ化 4" draw:style-name="gr63">
          <draw:custom-shape draw:name="円/楕円 48" draw:style-name="gr68" draw:text-style-name="P42" draw:layer="layout" svg:width="1.399cm" svg:height="1.304cm" svg:x="17.501cm" svg:y="12.125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テキスト ボックス 50" draw:style-name="gr165" draw:text-style-name="P31" draw:layer="layout" svg:width="1.399cm" svg:height="1.013cm" svg:x="17.501cm" svg:y="12.265cm">
            <text:p text:style-name="P30"><text:span text:style-name="T26">H</text:span><text:span text:style-name="T38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nosumab 投与のRA45例" draw:style-name="dp3" draw:master-page-name="タイトルとコンテンツ" presentation:presentation-page-layout-name="AL1T11">
        <draw:frame draw:name="タイトル 1" presentation:style-name="pr8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54">Den</text:span><text:span text:style-name="T54">osu</text:span><text:span text:style-name="T54">mab </text:span><text:span text:style-name="T55">投与</text:span><text:span text:style-name="T55">の</text:span><text:span text:style-name="T55">RA4</text:span><text:span text:style-name="T55">5</text:span><text:span text:style-name="T55">例</text:span></text:p>
          </draw:text-box>
        </draw:frame>
        <draw:custom-shape draw:name="テキスト ボックス 4" draw:style-name="gr166" draw:text-style-name="P52" draw:layer="layout" svg:width="25.096cm" svg:height="12.443cm" svg:x="0.156cm" svg:y="5.325cm">
          <text:p text:style-name="P51"><text:span text:style-name="T60">[</text:span><text:span text:style-name="T61">目的</text:span><text:span text:style-name="T61">]</text:span></text:p>
          <text:p text:style-name="P51"><text:span text:style-name="T61">　</text:span><text:span text:style-name="T61">RA</text:span><text:span text:style-name="T61">患者に対する</text:span><text:span text:style-name="T61">Denosumab </text:span><text:span text:style-name="T61">の治療効果の検討</text:span></text:p>
          <text:p text:style-name="P51"><text:span text:style-name="T61"/></text:p>
          <text:p text:style-name="P51"><text:span text:style-name="T61">[</text:span><text:span text:style-name="T61">対象</text:span><text:span text:style-name="T61">]</text:span></text:p>
          <text:p text:style-name="P51"><text:span text:style-name="T61">当院整形外科にて私が担当する</text:span><text:span text:style-name="T61">RA</text:span><text:span text:style-name="T61">患者であり</text:span><text:span text:style-name="T61">, </text:span><text:span text:style-name="T61">腰椎・大腿骨頸部・大腿骨近位部のいずれかの骨密度が</text:span><text:span text:style-name="T61">YAM</text:span><text:span text:style-name="T61">値で</text:span><text:span text:style-name="T61">70%</text:span><text:span text:style-name="T61">以下であり、</text:span><text:span text:style-name="T61">denosumab</text:span><text:span text:style-name="T61">投与して</text:span><text:span text:style-name="T61">2</text:span><text:span text:style-name="T61">年経過した</text:span><text:span text:style-name="T61">45</text:span><text:span text:style-name="T61">例</text:span><text:span text:style-name="T61">.</text:span></text:p>
          <text:p text:style-name="P51"><text:span text:style-name="T61"/></text:p>
          <text:p text:style-name="P51"><text:span text:style-name="T61">[</text:span><text:span text:style-name="T61">方法</text:span><text:span text:style-name="T61">]</text:span></text:p>
          <text:p text:style-name="P51"><text:span text:style-name="T61">　</text:span><text:span text:style-name="T61">BMD</text:span><text:span text:style-name="T61">　</text:span><text:span text:style-name="T61">PINP</text:span><text:span text:style-name="T61">　</text:span><text:span text:style-name="T61">TRACP-5b</text:span><text:span text:style-name="T61">　の経時的変化を検討する。</text:span></text:p>
          <text:p text:style-name="P51"><text:span text:style-name="T61">　</text:span><text:span text:style-name="T61">BMD</text:span><text:span text:style-name="T61">の変化量と</text:span><text:span text:style-name="T61">PINP</text:span><text:span text:style-name="T61">・</text:span><text:span text:style-name="T61">TRACP-5b </text:span><text:span text:style-name="T61">・</text:span><text:span text:style-name="T61">DAS28ESR</text:span><text:span text:style-name="T61">との相関を検討する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67" draw:text-style-name="P29" draw:layer="layout" svg:width="24.913cm" svg:height="2.537cm" svg:x="0.263cm" svg:y="16.926cm">
          <text:p text:style-name="P28"><text:span text:style-name="T62">注意</text:span></text:p>
          <text:p text:style-name="P28"><text:span text:style-name="T62">小生の担当する</text:span><text:span text:style-name="T63">RA</text:span><text:span text:style-name="T63">患者のみを対照としていますので、バイアスがあることはご了承ください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症例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症例</text:span></text:p>
          </draw:text-box>
        </draw:frame>
        <draw:custom-shape draw:name="テキスト ボックス 3" draw:style-name="gr168" draw:text-style-name="P31" draw:layer="layout" svg:width="19.401cm" svg:height="2.283cm" svg:x="3.001cm" svg:y="4.724cm">
          <text:p text:style-name="P30"><text:span text:style-name="T60">2013</text:span><text:span text:style-name="T61">年</text:span><text:span text:style-name="T61">9</text:span><text:span text:style-name="T61">月より　</text:span><text:span text:style-name="T61">Denosumab</text:span><text:span text:style-name="T61">を開始した</text:span><text:span text:style-name="T61">RA</text:span><text:span text:style-name="T61">患者　</text:span><text:span text:style-name="T61">69</text:span><text:span text:style-name="T61">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69" draw:text-style-name="P31" draw:layer="layout" svg:width="19.401cm" svg:height="1.267cm" svg:x="3.001cm" svg:y="15.843cm">
          <text:p text:style-name="P30"><text:span text:style-name="T60">2</text:span><text:span text:style-name="T61">年経過した</text:span><text:span text:style-name="T61">RA</text:span><text:span text:style-name="T61">患者　</text:span><text:span text:style-name="T61">45</text:span><text:span text:style-name="T61">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下矢印 6" draw:style-name="gr62" draw:text-style-name="P38" draw:layer="layout" svg:width="2.599cm" svg:height="8cm" svg:x="11.402cm" svg:y="6.99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テキスト ボックス 9" draw:style-name="gr170" draw:text-style-name="P44" draw:layer="layout" svg:width="6.6cm" svg:height="1.013cm" svg:x="15.663cm" svg:y="7.125cm">
          <text:p text:style-name="P43"><text:span text:style-name="T29">両側</text:span><text:span text:style-name="T64">THA</text:span><text:span text:style-name="T64">　</text:span><text:span text:style-name="T64">3</text:span><text:span text:style-name="T64">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71" draw:text-style-name="P44" draw:layer="layout" svg:width="8.837cm" svg:height="1.013cm" svg:x="15.663cm" svg:y="9.725cm">
          <text:p text:style-name="P43"><text:span text:style-name="T29">大腿骨頚部骨折　</text:span><text:span text:style-name="T64">1</text:span><text:span text:style-name="T64">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1" draw:style-name="gr172" draw:text-style-name="P44" draw:layer="layout" svg:width="5.037cm" svg:height="1.013cm" svg:x="15.663cm" svg:y="8.899cm">
          <text:p text:style-name="P43"><text:span text:style-name="T29">転居　</text:span><text:span text:style-name="T64">3</text:span><text:span text:style-name="T64">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73" draw:text-style-name="P52" draw:layer="layout" svg:width="6.6cm" svg:height="1.013cm" svg:x="15.663cm" svg:y="8.012cm">
          <text:p text:style-name="P51"><text:span text:style-name="T28">PLIF</text:span><text:span text:style-name="T64">後　</text:span><text:span text:style-name="T64">1</text:span><text:span text:style-name="T64">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74" draw:text-style-name="P44" draw:layer="layout" svg:width="8.8cm" svg:height="1.013cm" svg:x="1.299cm" svg:y="8.325cm">
          <text:p text:style-name="P43"><text:span text:style-name="T29">肝機能障害による中止　</text:span><text:span text:style-name="T64">1</text:span><text:span text:style-name="T64">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" draw:style-name="gr175" draw:text-style-name="P44" draw:layer="layout" svg:width="8.8cm" svg:height="1.013cm" svg:x="1.299cm" svg:y="9.325cm">
          <text:p text:style-name="P43"><text:span text:style-name="T29">抜歯による中止　</text:span><text:span text:style-name="T64">1</text:span><text:span text:style-name="T64">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176" draw:text-style-name="P44" draw:layer="layout" svg:width="8.8cm" svg:height="1.013cm" svg:x="1.299cm" svg:y="10.325cm">
          <text:p text:style-name="P43"><text:span text:style-name="T29">本人の希望による中止　</text:span><text:span text:style-name="T64">1</text:span><text:span text:style-name="T64">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77" draw:text-style-name="P52" draw:layer="layout" svg:width="5.037cm" svg:height="1.013cm" svg:x="16.006cm" svg:y="11.864cm">
          <text:p text:style-name="P51"><text:span text:style-name="T28">2</text:span><text:span text:style-name="T64">年未満　</text:span><text:span text:style-name="T64">13</text:span><text:span text:style-name="T64">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右矢印 19" draw:style-name="gr178" draw:text-style-name="P59" draw:layer="layout" svg:width="1.817cm" svg:height="0.914cm" svg:x="13.682cm" svg:y="8.05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右矢印 22" draw:style-name="gr178" draw:text-style-name="P59" draw:layer="layout" svg:width="2.199cm" svg:height="1.338cm" draw:transform="rotate (-3.14159265358979) translate (11.7cm 9.96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右矢印 23" draw:style-name="gr178" draw:text-style-name="P59" draw:layer="layout" svg:width="1.999cm" svg:height="1.338cm" svg:x="13.754cm" svg:y="11.7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対象症例　45例　女性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対象</text:span><text:span text:style-name="T22">症例</text:span><text:span text:style-name="T22">　</text:span><text:span text:style-name="T55">45</text:span><text:span text:style-name="T55">例　</text:span><text:span text:style-name="T55">女性</text:span></text:p>
          </draw:text-box>
        </draw:frame>
        <draw:frame draw:name="表 3" draw:style-name="gr3" draw:layer="layout" svg:width="22.399cm" svg:height="18.05cm" svg:x="1.499cm" svg:y="3.524cm">
          <table:table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1" table:default-cell-style-name="ce14">
              <table:table-cell table:style-name="ce13" table:number-columns-spanned="2"/>
              <table:covered-table-cell table:style-name="standard"/>
              <table:table-cell/>
              <table:table-cell/>
              <table:table-cell table:style-name="ce15">
                <text:p text:style-name="P25"><text:span text:style-name="T65">SD</text:span></text:p>
              </table:table-cell>
              <table:table-cell/>
            </table:table-row>
            <table:table-row table:style-name="ro11" table:default-cell-style-name="ce15">
              <table:table-cell table:number-columns-spanned="2">
                <text:p text:style-name="P25"><text:span text:style-name="T56">年齢</text:span></text:p>
              </table:table-cell>
              <table:covered-table-cell table:style-name="standard"/>
              <table:table-cell>
                <text:p text:style-name="P25"><text:span text:style-name="T65">74.4</text:span><text:span text:style-name="T66">（歳）</text:span></text:p>
              </table:table-cell>
              <table:table-cell>
                <text:p text:style-name="P25"><text:span text:style-name="T65">±</text:span></text:p>
              </table:table-cell>
              <table:table-cell>
                <text:p text:style-name="P25"><text:span text:style-name="T65">6.9</text:span></text:p>
              </table:table-cell>
              <table:table-cell table:style-name="ce14"/>
            </table:table-row>
            <table:table-row table:style-name="ro11" table:default-cell-style-name="ce15">
              <table:table-cell table:number-columns-spanned="2">
                <text:p text:style-name="P25"><text:span text:style-name="T65">RA</text:span><text:span text:style-name="T66">罹病期間</text:span></text:p>
              </table:table-cell>
              <table:covered-table-cell table:style-name="standard"/>
              <table:table-cell>
                <text:p text:style-name="P25"><text:span text:style-name="T65">14.2</text:span><text:span text:style-name="T66">（年）</text:span></text:p>
              </table:table-cell>
              <table:table-cell>
                <text:p text:style-name="P60"><text:span text:style-name="T65">±</text:span></text:p>
              </table:table-cell>
              <table:table-cell>
                <text:p text:style-name="P25"><text:span text:style-name="T65">12.7 </text:span></text:p>
              </table:table-cell>
              <table:table-cell table:style-name="ce14"/>
            </table:table-row>
            <table:table-row table:style-name="ro12" table:default-cell-style-name="ce16">
              <table:table-cell table:number-columns-spanned="2"/>
              <table:covered-table-cell table:style-name="standard"/>
              <table:table-cell/>
              <table:table-cell/>
              <table:table-cell/>
              <table:table-cell/>
            </table:table-row>
            <table:table-row table:style-name="ro11" table:default-cell-style-name="ce14">
              <table:table-cell table:style-name="ce15" table:number-rows-spanned="2">
                <text:p text:style-name="P61"><text:span text:style-name="T65">ST</text:span><text:span text:style-name="T66">分類</text:span></text:p>
              </table:table-cell>
              <table:table-cell table:style-name="ce15">
                <text:p text:style-name="P25"><text:span text:style-name="T65">Stage</text:span></text:p>
              </table:table-cell>
              <table:table-cell table:style-name="ce15">
                <text:p text:style-name="P25"><text:span text:style-name="T65">5/9/12/19</text:span></text:p>
              </table:table-cell>
              <table:table-cell/>
              <table:table-cell/>
              <table:table-cell/>
            </table:table-row>
            <table:table-row table:style-name="ro11" table:default-cell-style-name="ce14">
              <table:covered-table-cell table:style-name="standard"/>
              <table:table-cell table:style-name="ce15">
                <text:p text:style-name="P25"><text:span text:style-name="T65">Class</text:span></text:p>
              </table:table-cell>
              <table:table-cell table:style-name="ce15">
                <text:p text:style-name="P25"><text:span text:style-name="T65">15/25/5/0 <text:s/></text:span></text:p>
              </table:table-cell>
              <table:table-cell/>
              <table:table-cell/>
              <table:table-cell/>
            </table:table-row>
            <table:table-row table:style-name="ro13" table:default-cell-style-name="ce19">
              <table:table-cell table:style-name="ce17" table:number-columns-spanned="2"/>
              <table:covered-table-cell table:style-name="standard"/>
              <table:table-cell table:style-name="ce18"/>
              <table:table-cell/>
              <table:table-cell/>
              <table:table-cell/>
            </table:table-row>
            <table:table-row table:style-name="ro11" table:default-cell-style-name="ce21">
              <table:table-cell table:style-name="ce20" table:number-columns-spanned="2">
                <text:p text:style-name="P25"><text:span text:style-name="T56">腰椎</text:span><text:span text:style-name="T66">BMD</text:span></text:p>
              </table:table-cell>
              <table:covered-table-cell table:style-name="standard"/>
              <table:table-cell>
                <text:p text:style-name="P25"><text:span text:style-name="T65">0.707 </text:span><text:span text:style-name="T66">（</text:span><text:span text:style-name="T66">g/cm</text:span><text:span text:style-name="T67">2</text:span><text:span text:style-name="T66">）</text:span></text:p>
              </table:table-cell>
              <table:table-cell>
                <text:p text:style-name="P25"><text:span text:style-name="T65">±</text:span></text:p>
              </table:table-cell>
              <table:table-cell>
                <text:p text:style-name="P25"><text:span text:style-name="T65">0.139 </text:span></text:p>
              </table:table-cell>
              <table:table-cell table:style-name="ce22"/>
            </table:table-row>
            <table:table-row table:style-name="ro11" table:default-cell-style-name="ce21">
              <table:table-cell table:style-name="ce20" table:number-columns-spanned="2">
                <text:p text:style-name="P25"><text:span text:style-name="T56">右大腿骨頚部</text:span><text:span text:style-name="T66">BMD</text:span></text:p>
              </table:table-cell>
              <table:covered-table-cell table:style-name="standard"/>
              <table:table-cell>
                <text:p text:style-name="P25"><text:span text:style-name="T65">0.493 </text:span><text:span text:style-name="T66">（</text:span><text:span text:style-name="T66">g/cm</text:span><text:span text:style-name="T67">2</text:span><text:span text:style-name="T66">）</text:span></text:p>
              </table:table-cell>
              <table:table-cell>
                <text:p text:style-name="P25"><text:span text:style-name="T65">±</text:span></text:p>
              </table:table-cell>
              <table:table-cell>
                <text:p text:style-name="P25"><text:span text:style-name="T65">0.080 </text:span></text:p>
              </table:table-cell>
              <table:table-cell table:style-name="ce22"/>
            </table:table-row>
            <table:table-row table:style-name="ro11" table:default-cell-style-name="ce21">
              <table:table-cell table:style-name="ce20" table:number-columns-spanned="2">
                <text:p text:style-name="P25"><text:span text:style-name="T68">左大腿骨頸部</text:span><text:span text:style-name="T69">BMD</text:span></text:p>
              </table:table-cell>
              <table:covered-table-cell table:style-name="standard"/>
              <table:table-cell>
                <text:p text:style-name="P25"><text:span text:style-name="T65">0.485 </text:span><text:span text:style-name="T66">（</text:span><text:span text:style-name="T66">g/cm</text:span><text:span text:style-name="T67">2</text:span><text:span text:style-name="T66">）</text:span></text:p>
              </table:table-cell>
              <table:table-cell>
                <text:p text:style-name="P25"><text:span text:style-name="T65">±</text:span></text:p>
              </table:table-cell>
              <table:table-cell>
                <text:p text:style-name="P25"><text:span text:style-name="T65">0.071 </text:span></text:p>
              </table:table-cell>
              <table:table-cell table:style-name="ce22"/>
            </table:table-row>
            <table:table-row table:style-name="ro11" table:default-cell-style-name="ce21">
              <table:table-cell table:style-name="ce20" table:number-columns-spanned="2">
                <text:p text:style-name="P25"><text:span text:style-name="T56">右大腿骨</text:span><text:span text:style-name="T66">BMD</text:span></text:p>
              </table:table-cell>
              <table:covered-table-cell table:style-name="standard"/>
              <table:table-cell>
                <text:p text:style-name="P25"><text:span text:style-name="T65">0.593 </text:span><text:span text:style-name="T66">（</text:span><text:span text:style-name="T66">g/cm</text:span><text:span text:style-name="T67">2</text:span><text:span text:style-name="T66">）</text:span></text:p>
              </table:table-cell>
              <table:table-cell>
                <text:p text:style-name="P25"><text:span text:style-name="T65">±</text:span></text:p>
              </table:table-cell>
              <table:table-cell>
                <text:p text:style-name="P25"><text:span text:style-name="T65">0.070 </text:span></text:p>
              </table:table-cell>
              <table:table-cell table:style-name="ce22"/>
            </table:table-row>
            <table:table-row table:style-name="ro11" table:default-cell-style-name="ce21">
              <table:table-cell table:style-name="ce20" table:number-columns-spanned="2">
                <text:p text:style-name="P25"><text:span text:style-name="T56">左大腿骨</text:span><text:span text:style-name="T66">BMD</text:span></text:p>
              </table:table-cell>
              <table:covered-table-cell table:style-name="standard"/>
              <table:table-cell>
                <text:p text:style-name="P25"><text:span text:style-name="T65">0.589 </text:span><text:span text:style-name="T66">（</text:span><text:span text:style-name="T66">g/cm</text:span><text:span text:style-name="T67">2</text:span><text:span text:style-name="T66">）</text:span></text:p>
              </table:table-cell>
              <table:table-cell>
                <text:p text:style-name="P25"><text:span text:style-name="T65">±</text:span></text:p>
              </table:table-cell>
              <table:table-cell>
                <text:p text:style-name="P25"><text:span text:style-name="T65">0.086 </text:span></text:p>
              </table:table-cell>
              <table:table-cell table:style-name="ce22"/>
            </table:table-row>
            <table:table-row table:style-name="ro13" table:default-cell-style-name="ce25">
              <table:table-cell table:style-name="ce23" table:number-columns-spanned="2"/>
              <table:covered-table-cell table:style-name="standard"/>
              <table:table-cell table:style-name="ce24"/>
              <table:table-cell/>
              <table:table-cell/>
              <table:table-cell/>
            </table:table-row>
            <table:table-row table:style-name="ro11" table:default-cell-style-name="ce15">
              <table:table-cell table:style-name="ce21" table:number-columns-spanned="2">
                <text:p text:style-name="P25"><text:span text:style-name="T65">PINP</text:span></text:p>
              </table:table-cell>
              <table:covered-table-cell table:style-name="standard"/>
              <table:table-cell>
                <text:p text:style-name="P25"><text:span text:style-name="T65">70.86</text:span></text:p>
              </table:table-cell>
              <table:table-cell>
                <text:p text:style-name="P25"><text:span text:style-name="T65">±</text:span></text:p>
              </table:table-cell>
              <table:table-cell>
                <text:p text:style-name="P25"><text:span text:style-name="T65">35.2</text:span></text:p>
              </table:table-cell>
              <table:table-cell table:style-name="ce14"/>
            </table:table-row>
            <table:table-row table:style-name="ro11" table:default-cell-style-name="ce15">
              <table:table-cell table:style-name="ce21" table:number-columns-spanned="2">
                <text:p text:style-name="P25"><text:span text:style-name="T65">TRACP-5b</text:span></text:p>
              </table:table-cell>
              <table:covered-table-cell table:style-name="standard"/>
              <table:table-cell>
                <text:p text:style-name="P25"><text:span text:style-name="T65">368.51</text:span></text:p>
              </table:table-cell>
              <table:table-cell>
                <text:p text:style-name="P25"><text:span text:style-name="T65">±</text:span></text:p>
              </table:table-cell>
              <table:table-cell>
                <text:p text:style-name="P25"><text:span text:style-name="T65">147.8</text:span></text:p>
              </table:table-cell>
              <table:table-cell table:style-name="ce14"/>
            </table:table-row>
            <table:table-row table:style-name="ro11" table:default-cell-style-name="ce15">
              <table:table-cell table:number-columns-spanned="2">
                <text:p text:style-name="P25"><text:span text:style-name="T65">DAS28ESR</text:span></text:p>
              </table:table-cell>
              <table:covered-table-cell table:style-name="standard"/>
              <table:table-cell>
                <text:p text:style-name="P25"><text:span text:style-name="T65">2.99</text:span></text:p>
              </table:table-cell>
              <table:table-cell>
                <text:p text:style-name="P25"><text:span text:style-name="T65">±</text:span></text:p>
              </table:table-cell>
              <table:table-cell>
                <text:p text:style-name="P25"><text:span text:style-name="T65">1.07</text:span></text:p>
              </table:table-cell>
              <table:table-cell table:style-name="ce14"/>
            </table:table-row>
            <table:table-row table:style-name="ro11" table:default-cell-style-name="ce14">
              <table:table-cell table:number-columns-spanned="2"/>
              <table:covered-table-cell table:style-name="standard"/>
              <table:table-cell/>
              <table:table-cell/>
              <table:table-cell/>
              <table:table-cell/>
            </table:table-row>
            <table:table-row table:style-name="ro11" table:default-cell-style-name="ce15">
              <table:table-cell table:number-columns-spanned="2">
                <text:p text:style-name="P25"><text:span text:style-name="T65">MTX</text:span><text:span text:style-name="T66">使用例　</text:span><text:span text:style-name="T66">25</text:span><text:span text:style-name="T66">例</text:span></text:p>
              </table:table-cell>
              <table:covered-table-cell table:style-name="standard"/>
              <table:table-cell>
                <text:p text:style-name="P25"><text:span text:style-name="T65">7.9</text:span><text:span text:style-name="T66">㎎</text:span><text:span text:style-name="T66">/w</text:span></text:p>
              </table:table-cell>
              <table:table-cell>
                <text:p text:style-name="P25"><text:span text:style-name="T65">±</text:span></text:p>
              </table:table-cell>
              <table:table-cell>
                <text:p text:style-name="P25"><text:span text:style-name="T65">2.43</text:span></text:p>
              </table:table-cell>
              <table:table-cell table:style-name="ce14"/>
            </table:table-row>
            <table:table-row table:style-name="ro11" table:default-cell-style-name="ce15">
              <table:table-cell table:number-columns-spanned="2">
                <text:p text:style-name="P25"><text:span text:style-name="T65">PSL</text:span><text:span text:style-name="T66">使用例　</text:span><text:span text:style-name="T66">17</text:span><text:span text:style-name="T66">例</text:span></text:p>
              </table:table-cell>
              <table:covered-table-cell table:style-name="standard"/>
              <table:table-cell>
                <text:p text:style-name="P25"><text:span text:style-name="T28">2.79</text:span><text:span text:style-name="T64">㎎</text:span><text:span text:style-name="T64">/d</text:span></text:p>
              </table:table-cell>
              <table:table-cell>
                <text:p text:style-name="P25"><text:span text:style-name="T28">±</text:span></text:p>
              </table:table-cell>
              <table:table-cell>
                <text:p text:style-name="P25"><text:span text:style-name="T28">1.99</text:span></text:p>
              </table:table-cell>
              <table:table-cell table:style-name="ce14"/>
            </table:table-row>
            <table:table-row table:style-name="ro11" table:default-cell-style-name="ce14">
              <table:table-cell table:style-name="ce15" table:number-columns-spanned="2">
                <text:p text:style-name="P25"><text:span text:style-name="T56">生物学的製剤使用例</text:span></text:p>
              </table:table-cell>
              <table:covered-table-cell table:style-name="standard"/>
              <table:table-cell table:style-name="ce15">
                <text:p text:style-name="P25"><text:span text:style-name="T65">23</text:span><text:span text:style-name="T66">例</text:span></text:p>
              </table:table-cell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結果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99cm" svg:y="7.938cm" presentation:class="title" presentation:user-transformed="true">
          <draw:text-box>
            <text:p text:style-name="P25"><text:span text:style-name="T22">結果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腰椎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腰椎</text:span></text:p>
          </draw:text-box>
        </draw:frame>
        <draw:frame draw:name="グラフ 3" draw:style-name="gr179" draw:text-style-name="P27" draw:layer="layout" svg:width="12.634cm" svg:height="9.867cm" svg:x="0.115cm" svg:y="5.9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グラフ 4" draw:style-name="gr179" draw:text-style-name="P27" draw:layer="layout" svg:width="11.992cm" svg:height="10cm" svg:x="13.292cm" svg:y="6.03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テキスト ボックス 6" draw:style-name="gr180" draw:text-style-name="P31" draw:layer="layout" svg:width="4.8cm" svg:height="1.013cm" svg:x="5.216cm" svg:y="5.385cm">
          <text:p text:style-name="P30"><text:span text:style-name="T29">腰椎</text:span><text:span text:style-name="T64">BM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7" draw:style-name="gr181" draw:text-style-name="P31" draw:layer="layout" svg:width="4.8cm" svg:height="1.013cm" svg:x="17.017cm" svg:y="5.385cm">
          <text:p text:style-name="P30"><text:span text:style-name="T29">腰椎</text:span><text:span text:style-name="T64">YAM%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82" draw:text-style-name="P31" draw:layer="layout" svg:width="1.599cm" svg:height="0.844cm" svg:x="1.416cm" svg:y="14.726cm">
          <text:p text:style-name="P30"><text:span text:style-name="T70">0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183" draw:text-style-name="P31" draw:layer="layout" svg:width="1.599cm" svg:height="0.844cm" svg:x="3.949cm" svg:y="14.726cm">
          <text:p text:style-name="P30"><text:span text:style-name="T70">6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84" draw:text-style-name="P31" draw:layer="layout" svg:width="1.599cm" svg:height="0.844cm" svg:x="6.406cm" svg:y="14.726cm">
          <text:p text:style-name="P30"><text:span text:style-name="T70">12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1" draw:style-name="gr185" draw:text-style-name="P31" draw:layer="layout" svg:width="1.599cm" svg:height="0.844cm" svg:x="8.915cm" svg:y="14.726cm">
          <text:p text:style-name="P30"><text:span text:style-name="T70">18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86" draw:text-style-name="P31" draw:layer="layout" svg:width="1.599cm" svg:height="0.844cm" svg:x="11.434cm" svg:y="14.726cm">
          <text:p text:style-name="P30"><text:span text:style-name="T70">24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87" draw:text-style-name="P31" draw:layer="layout" svg:width="1.599cm" svg:height="0.844cm" svg:x="13.4cm" svg:y="14.728cm">
          <text:p text:style-name="P30"><text:span text:style-name="T70">0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88" draw:text-style-name="P31" draw:layer="layout" svg:width="1.599cm" svg:height="0.844cm" svg:x="15.933cm" svg:y="14.728cm">
          <text:p text:style-name="P30"><text:span text:style-name="T70">6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" draw:style-name="gr189" draw:text-style-name="P31" draw:layer="layout" svg:width="1.599cm" svg:height="0.844cm" svg:x="18.39cm" svg:y="14.728cm">
          <text:p text:style-name="P30"><text:span text:style-name="T70">12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190" draw:text-style-name="P31" draw:layer="layout" svg:width="1.599cm" svg:height="0.844cm" svg:x="20.899cm" svg:y="14.728cm">
          <text:p text:style-name="P30"><text:span text:style-name="T70">18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91" draw:text-style-name="P31" draw:layer="layout" svg:width="1.599cm" svg:height="0.844cm" svg:x="23.418cm" svg:y="14.728cm">
          <text:p text:style-name="P30"><text:span text:style-name="T70">24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92" draw:text-style-name="P52" draw:layer="layout" svg:width="2.316cm" svg:height="0.844cm" svg:x="1.099cm" svg:y="5.125cm">
          <text:p text:style-name="P51"><text:span text:style-name="T46">g/cm</text:span><text:span text:style-name="T7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93" draw:text-style-name="P52" draw:layer="layout" svg:width="1.865cm" svg:height="0.844cm" svg:x="13.283cm" svg:y="5.325cm">
          <text:p text:style-name="P51"><text:span text:style-name="T46">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194" draw:text-style-name="P31" draw:layer="layout" svg:width="4.965cm" svg:height="1.013cm" svg:x="16.849cm" svg:y="11.125cm">
          <text:p text:style-name="P30"><text:span text:style-name="T72">+9.3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0" draw:style-name="gr195" draw:text-style-name="P63" draw:layer="layout" svg:width="7.4cm" svg:height="0.695cm" svg:x="17.984cm" svg:y="18.49cm">
          <text:p text:style-name="P62"><text:span text:style-name="T73">R version3.3.1(64b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大腿骨 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24cm" presentation:class="title" presentation:user-transformed="true">
          <draw:text-box>
            <text:p text:style-name="P25"><text:span text:style-name="T22">大腿</text:span><text:span text:style-name="T22">骨 </text:span></text:p>
          </draw:text-box>
        </draw:frame>
        <draw:frame draw:name="グラフ 3" draw:style-name="gr179" draw:text-style-name="P27" draw:layer="layout" svg:width="12.111cm" svg:height="6.999cm" svg:x="0.671cm" svg:y="4.10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グラフ 4" draw:style-name="gr179" draw:text-style-name="P27" draw:layer="layout" svg:width="11.978cm" svg:height="6.999cm" svg:x="2.015cm" svg:y="11.7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name="グラフ 5" draw:style-name="gr179" draw:text-style-name="P27" draw:layer="layout" svg:width="11.978cm" svg:height="6.999cm" svg:x="12.678cm" svg:y="4.1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name="グラフ 6" draw:style-name="gr179" draw:text-style-name="P27" draw:layer="layout" svg:width="11.978cm" svg:height="6.999cm" svg:x="14.017cm" svg:y="11.77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name="直線コネクタ 8" draw:style-name="gr196" draw:text-style-name="P27" draw:layer="layout" draw:type="line" svg:x1="8.752cm" svg:y1="9.524cm" svg:x2="9.952cm" svg:y2="9.524cm" svg:d="M8752 9524h1200" svg:viewBox="0 0 1201 1">
          <text:p/>
        </draw:connector>
        <draw:custom-shape draw:name="テキスト ボックス 9" draw:style-name="gr197" draw:text-style-name="P44" draw:layer="layout" svg:width="3.399cm" svg:height="0.759cm" svg:x="10.153cm" svg:y="9.139cm">
          <text:p text:style-name="P43"><text:span text:style-name="T74">大腿骨頸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12" draw:style-name="gr196" draw:text-style-name="P27" draw:layer="layout" draw:type="line" svg:x1="8.719cm" svg:y1="17.192cm" svg:x2="9.919cm" svg:y2="17.192cm" svg:d="M8719 17192h1200" svg:viewBox="0 0 1201 1">
          <text:p/>
        </draw:connector>
        <draw:custom-shape draw:name="テキスト ボックス 13" draw:style-name="gr198" draw:text-style-name="P44" draw:layer="layout" svg:width="3.399cm" svg:height="0.759cm" svg:x="10.12cm" svg:y="16.808cm">
          <text:p text:style-name="P43"><text:span text:style-name="T74">大腿骨頸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16" draw:style-name="gr199" draw:text-style-name="P27" draw:layer="layout" draw:type="line" svg:x1="20.3cm" svg:y1="9.509cm" svg:x2="21.5cm" svg:y2="9.509cm" svg:d="M20300 9509h1200" svg:viewBox="0 0 1201 1">
          <text:p/>
        </draw:connector>
        <draw:custom-shape draw:name="テキスト ボックス 17" draw:style-name="gr200" draw:text-style-name="P44" draw:layer="layout" svg:width="3.399cm" svg:height="0.759cm" svg:x="21.701cm" svg:y="9.125cm">
          <text:p text:style-name="P43"><text:span text:style-name="T74">大腿骨頸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4" draw:style-name="gr201" draw:text-style-name="P52" draw:layer="layout" svg:width="2.316cm" svg:height="0.844cm" svg:x="1.548cm" svg:y="3.124cm">
          <text:p text:style-name="P51"><text:span text:style-name="T46">g/cm</text:span><text:span text:style-name="T7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5" draw:style-name="gr202" draw:text-style-name="P52" draw:layer="layout" svg:width="2.316cm" svg:height="0.844cm" svg:x="13.55cm" svg:y="3.124cm">
          <text:p text:style-name="P51"><text:span text:style-name="T46">g/cm</text:span><text:span text:style-name="T7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27" draw:style-name="gr199" draw:text-style-name="P27" draw:layer="layout" draw:type="line" svg:x1="20.3cm" svg:y1="17.241cm" svg:x2="21.5cm" svg:y2="17.241cm" svg:d="M20300 17241h1200" svg:viewBox="0 0 1201 1">
          <text:p/>
        </draw:connector>
        <draw:custom-shape draw:name="テキスト ボックス 28" draw:style-name="gr203" draw:text-style-name="P44" draw:layer="layout" svg:width="3.399cm" svg:height="0.759cm" svg:x="21.701cm" svg:y="16.857cm">
          <text:p text:style-name="P43"><text:span text:style-name="T74">大腿骨頸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2" draw:style-name="gr204" draw:text-style-name="P52" draw:layer="layout" svg:width="1.865cm" svg:height="0.844cm" svg:x="1.766cm" svg:y="11.142cm">
          <text:p text:style-name="P51"><text:span text:style-name="T46">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3" draw:style-name="gr205" draw:text-style-name="P52" draw:layer="layout" svg:width="1.865cm" svg:height="0.844cm" svg:x="13.751cm" svg:y="11.125cm">
          <text:p text:style-name="P51"><text:span text:style-name="T46">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206" draw:text-style-name="P31" draw:layer="layout" svg:width="4.453cm" svg:height="1.013cm" svg:x="5.263cm" svg:y="12.016cm">
          <text:p text:style-name="P30"><text:span text:style-name="T72">+4.6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207" draw:text-style-name="P31" draw:layer="layout" svg:width="4.453cm" svg:height="1.013cm" svg:x="17.197cm" svg:y="12cm">
          <text:p text:style-name="P30"><text:span text:style-name="T72">+2.5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0" draw:style-name="gr208" draw:text-style-name="P63" draw:layer="layout" svg:width="7.4cm" svg:height="0.695cm" svg:x="17.984cm" svg:y="18.49cm">
          <text:p text:style-name="P62"><text:span text:style-name="T73">R version3.3.1(64b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7" draw:style-name="gr209" draw:text-style-name="P31" draw:layer="layout" svg:width="1.999cm" svg:height="1.098cm" svg:x="6.489cm" svg:y="4.324cm">
          <text:p text:style-name="P30"><text:span text:style-name="T75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2" draw:style-name="gr210" draw:text-style-name="P31" draw:layer="layout" svg:width="1.999cm" svg:height="1.098cm" svg:x="18.501cm" svg:y="4.324cm">
          <text:p text:style-name="P30"><text:span text:style-name="T75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大腿骨  (2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大腿</text:span><text:span text:style-name="T22">骨 </text:span></text:p>
          </draw:text-box>
        </draw:frame>
        <draw:frame draw:name="グラフ 3" draw:style-name="gr179" draw:text-style-name="P27" draw:layer="layout" svg:width="12.111cm" svg:height="6.999cm" svg:x="0.671cm" svg:y="4.1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name="グラフ 4" draw:style-name="gr179" draw:text-style-name="P27" draw:layer="layout" svg:width="11.978cm" svg:height="6.999cm" svg:x="2.015cm" svg:y="11.77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name="グラフ 5" draw:style-name="gr179" draw:text-style-name="P27" draw:layer="layout" svg:width="11.978cm" svg:height="6.999cm" svg:x="12.694cm" svg:y="4.10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name="グラフ 6" draw:style-name="gr179" draw:text-style-name="P27" draw:layer="layout" svg:width="11.978cm" svg:height="6.999cm" svg:x="14.017cm" svg:y="11.77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onnector draw:name="直線コネクタ 8" draw:style-name="gr196" draw:text-style-name="P27" draw:layer="layout" draw:type="line" svg:x1="8.752cm" svg:y1="9.524cm" svg:x2="9.952cm" svg:y2="9.524cm" svg:d="M8752 9524h1200" svg:viewBox="0 0 1201 1">
          <text:p/>
        </draw:connector>
        <draw:custom-shape draw:name="テキスト ボックス 9" draw:style-name="gr211" draw:text-style-name="P44" draw:layer="layout" svg:width="3.399cm" svg:height="0.759cm" svg:x="10.153cm" svg:y="9.139cm">
          <text:p text:style-name="P43"><text:span text:style-name="T74">大腿骨頸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10" draw:style-name="gr212" draw:text-style-name="P27" draw:layer="layout" draw:type="line" svg:x1="8.752cm" svg:y1="10.124cm" svg:x2="9.952cm" svg:y2="10.124cm" svg:d="M8752 10124h1200" svg:viewBox="0 0 1201 1">
          <text:p/>
        </draw:connector>
        <draw:custom-shape draw:name="テキスト ボックス 11" draw:style-name="gr213" draw:text-style-name="P52" draw:layer="layout" svg:width="3.399cm" svg:height="0.759cm" svg:x="10.153cm" svg:y="9.739cm">
          <text:p text:style-name="P51"><text:span text:style-name="T76">Total 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12" draw:style-name="gr196" draw:text-style-name="P27" draw:layer="layout" draw:type="line" svg:x1="8.719cm" svg:y1="17.192cm" svg:x2="9.919cm" svg:y2="17.192cm" svg:d="M8719 17192h1200" svg:viewBox="0 0 1201 1">
          <text:p/>
        </draw:connector>
        <draw:custom-shape draw:name="テキスト ボックス 13" draw:style-name="gr214" draw:text-style-name="P44" draw:layer="layout" svg:width="3.399cm" svg:height="0.759cm" svg:x="10.12cm" svg:y="16.808cm">
          <text:p text:style-name="P43"><text:span text:style-name="T74">大腿骨頸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14" draw:style-name="gr212" draw:text-style-name="P27" draw:layer="layout" draw:type="line" svg:x1="8.719cm" svg:y1="17.792cm" svg:x2="9.919cm" svg:y2="17.792cm" svg:d="M8719 17792h1200" svg:viewBox="0 0 1201 1">
          <text:p/>
        </draw:connector>
        <draw:custom-shape draw:name="テキスト ボックス 15" draw:style-name="gr215" draw:text-style-name="P52" draw:layer="layout" svg:width="3.399cm" svg:height="0.759cm" svg:x="10.12cm" svg:y="17.408cm">
          <text:p text:style-name="P51"><text:span text:style-name="T76">Total 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16" draw:style-name="gr199" draw:text-style-name="P27" draw:layer="layout" draw:type="line" svg:x1="20.3cm" svg:y1="9.509cm" svg:x2="21.5cm" svg:y2="9.509cm" svg:d="M20300 9509h1200" svg:viewBox="0 0 1201 1">
          <text:p/>
        </draw:connector>
        <draw:custom-shape draw:name="テキスト ボックス 17" draw:style-name="gr216" draw:text-style-name="P44" draw:layer="layout" svg:width="3.399cm" svg:height="0.759cm" svg:x="21.701cm" svg:y="9.125cm">
          <text:p text:style-name="P43"><text:span text:style-name="T74">大腿骨頸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18" draw:style-name="gr217" draw:text-style-name="P27" draw:layer="layout" draw:type="line" svg:x1="20.3cm" svg:y1="10.109cm" svg:x2="21.5cm" svg:y2="10.109cm" svg:d="M20300 10109h1200" svg:viewBox="0 0 1201 1">
          <text:p/>
        </draw:connector>
        <draw:custom-shape draw:name="テキスト ボックス 19" draw:style-name="gr218" draw:text-style-name="P52" draw:layer="layout" svg:width="3.399cm" svg:height="0.759cm" svg:x="21.701cm" svg:y="9.725cm">
          <text:p text:style-name="P51"><text:span text:style-name="T76">Total 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4" draw:style-name="gr219" draw:text-style-name="P52" draw:layer="layout" svg:width="2.316cm" svg:height="0.844cm" svg:x="1.548cm" svg:y="3.124cm">
          <text:p text:style-name="P51"><text:span text:style-name="T46">g/cm</text:span><text:span text:style-name="T7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5" draw:style-name="gr220" draw:text-style-name="P52" draw:layer="layout" svg:width="2.316cm" svg:height="0.844cm" svg:x="13.55cm" svg:y="3.124cm">
          <text:p text:style-name="P51"><text:span text:style-name="T46">g/cm</text:span><text:span text:style-name="T7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27" draw:style-name="gr199" draw:text-style-name="P27" draw:layer="layout" draw:type="line" svg:x1="20.3cm" svg:y1="17.241cm" svg:x2="21.5cm" svg:y2="17.241cm" svg:d="M20300 17241h1200" svg:viewBox="0 0 1201 1">
          <text:p/>
        </draw:connector>
        <draw:custom-shape draw:name="テキスト ボックス 28" draw:style-name="gr221" draw:text-style-name="P44" draw:layer="layout" svg:width="3.399cm" svg:height="0.759cm" svg:x="21.701cm" svg:y="16.857cm">
          <text:p text:style-name="P43"><text:span text:style-name="T74">大腿骨頸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29" draw:style-name="gr217" draw:text-style-name="P27" draw:layer="layout" draw:type="line" svg:x1="20.3cm" svg:y1="17.842cm" svg:x2="21.5cm" svg:y2="17.842cm" svg:d="M20300 17842h1200" svg:viewBox="0 0 1201 1">
          <text:p/>
        </draw:connector>
        <draw:custom-shape draw:name="テキスト ボックス 30" draw:style-name="gr222" draw:text-style-name="P52" draw:layer="layout" svg:width="3.399cm" svg:height="0.759cm" svg:x="21.701cm" svg:y="17.457cm">
          <text:p text:style-name="P51"><text:span text:style-name="T76">Total 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2" draw:style-name="gr223" draw:text-style-name="P52" draw:layer="layout" svg:width="1.865cm" svg:height="0.844cm" svg:x="1.766cm" svg:y="11.142cm">
          <text:p text:style-name="P51"><text:span text:style-name="T46">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3" draw:style-name="gr224" draw:text-style-name="P52" draw:layer="layout" svg:width="1.865cm" svg:height="0.844cm" svg:x="13.751cm" svg:y="11.125cm">
          <text:p text:style-name="P51"><text:span text:style-name="T46">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6" draw:style-name="gr225" draw:text-style-name="P31" draw:layer="layout" svg:width="4.453cm" svg:height="1.013cm" svg:x="5.263cm" svg:y="12.95cm">
          <text:p text:style-name="P30"><text:span text:style-name="T72">+2.2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1" draw:style-name="gr226" draw:text-style-name="P31" draw:layer="layout" svg:width="4.453cm" svg:height="1.013cm" svg:x="17.197cm" svg:y="12.933cm">
          <text:p text:style-name="P30"><text:span text:style-name="T72">+4.5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4" draw:style-name="gr227" draw:text-style-name="P63" draw:layer="layout" svg:width="7.4cm" svg:height="0.695cm" svg:x="17.984cm" svg:y="18.49cm">
          <text:p text:style-name="P62"><text:span text:style-name="T73">R version3.3.1(64b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大腿骨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大腿</text:span><text:span text:style-name="T22">骨</text:span></text:p>
          </draw:text-box>
        </draw:frame>
        <draw:frame draw:name="グラフ 4" draw:style-name="gr179" draw:text-style-name="P27" draw:layer="layout" svg:width="11.445cm" svg:height="9.316cm" svg:x="1.299cm" svg:y="6.20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name="グラフ 6" draw:style-name="gr179" draw:text-style-name="P27" draw:layer="layout" svg:width="11.445cm" svg:height="9.316cm" svg:x="13.3cm" svg:y="6.19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onnector draw:name="直線コネクタ 8" draw:style-name="gr196" draw:text-style-name="P27" draw:layer="layout" draw:type="line" svg:x1="8.75cm" svg:y1="6.825cm" svg:x2="9.951cm" svg:y2="6.825cm" svg:d="M8750 6825h1201" svg:viewBox="0 0 1202 1">
          <text:p/>
        </draw:connector>
        <draw:custom-shape draw:name="テキスト ボックス 9" draw:style-name="gr228" draw:text-style-name="P44" draw:layer="layout" svg:width="3.399cm" svg:height="0.759cm" svg:x="10.151cm" svg:y="6.441cm">
          <text:p text:style-name="P43"><text:span text:style-name="T74">大腿骨頸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10" draw:style-name="gr212" draw:text-style-name="P27" draw:layer="layout" draw:type="line" svg:x1="8.75cm" svg:y1="7.425cm" svg:x2="9.951cm" svg:y2="7.425cm" svg:d="M8750 7425h1201" svg:viewBox="0 0 1202 1">
          <text:p/>
        </draw:connector>
        <draw:custom-shape draw:name="テキスト ボックス 11" draw:style-name="gr229" draw:text-style-name="P52" draw:layer="layout" svg:width="3.399cm" svg:height="0.759cm" svg:x="10.151cm" svg:y="7.041cm">
          <text:p text:style-name="P51"><text:span text:style-name="T76">Total 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12" draw:style-name="gr199" draw:text-style-name="P27" draw:layer="layout" draw:type="line" svg:x1="20.3cm" svg:y1="6.825cm" svg:x2="21.5cm" svg:y2="6.825cm" svg:d="M20300 6825h1200" svg:viewBox="0 0 1201 1">
          <text:p/>
        </draw:connector>
        <draw:custom-shape draw:name="テキスト ボックス 13" draw:style-name="gr230" draw:text-style-name="P44" draw:layer="layout" svg:width="3.399cm" svg:height="0.759cm" svg:x="21.701cm" svg:y="6.441cm">
          <text:p text:style-name="P43"><text:span text:style-name="T74">大腿骨頸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14" draw:style-name="gr217" draw:text-style-name="P27" draw:layer="layout" draw:type="line" svg:x1="20.3cm" svg:y1="7.425cm" svg:x2="21.5cm" svg:y2="7.425cm" svg:d="M20300 7425h1200" svg:viewBox="0 0 1201 1">
          <text:p/>
        </draw:connector>
        <draw:custom-shape draw:name="テキスト ボックス 15" draw:style-name="gr231" draw:text-style-name="P52" draw:layer="layout" svg:width="3.399cm" svg:height="0.759cm" svg:x="21.701cm" svg:y="7.041cm">
          <text:p text:style-name="P51"><text:span text:style-name="T76">Total 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16" draw:style-name="gr232" draw:text-style-name="P27" draw:layer="layout" draw:type="line" svg:x1="8.75cm" svg:y1="7.975cm" svg:x2="9.951cm" svg:y2="7.975cm" svg:d="M8750 7975h1201" svg:viewBox="0 0 1202 1">
          <text:p/>
        </draw:connector>
        <draw:custom-shape draw:name="テキスト ボックス 17" draw:style-name="gr233" draw:text-style-name="P44" draw:layer="layout" svg:width="3.399cm" svg:height="0.759cm" svg:x="10.151cm" svg:y="7.591cm">
          <text:p text:style-name="P43"><text:span text:style-name="T74">転子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18" draw:style-name="gr232" draw:text-style-name="P27" draw:layer="layout" draw:type="line" svg:x1="20.3cm" svg:y1="7.975cm" svg:x2="21.5cm" svg:y2="7.975cm" svg:d="M20300 7975h1200" svg:viewBox="0 0 1201 1">
          <text:p/>
        </draw:connector>
        <draw:custom-shape draw:name="テキスト ボックス 19" draw:style-name="gr234" draw:text-style-name="P44" draw:layer="layout" svg:width="3.399cm" svg:height="0.759cm" svg:x="21.701cm" svg:y="7.591cm">
          <text:p text:style-name="P43"><text:span text:style-name="T74">転子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0" draw:style-name="gr235" draw:text-style-name="P52" draw:layer="layout" svg:width="1.865cm" svg:height="0.844cm" svg:x="1.499cm" svg:y="5.409cm">
          <text:p text:style-name="P51"><text:span text:style-name="T46">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1" draw:style-name="gr236" draw:text-style-name="P52" draw:layer="layout" svg:width="1.865cm" svg:height="0.844cm" svg:x="13.484cm" svg:y="5.392cm">
          <text:p text:style-name="P51"><text:span text:style-name="T46">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矢印コネクタ 22" draw:style-name="gr237" draw:text-style-name="P27" draw:layer="layout" draw:type="line" svg:x1="10.8cm" svg:y1="9.842cm" svg:x2="10.8cm" svg:y2="10.642cm" svg:d="M10800 9842v800" svg:viewBox="0 0 1 801">
          <text:p/>
        </draw:connector>
        <draw:connector draw:name="直線矢印コネクタ 23" draw:style-name="gr237" draw:text-style-name="P27" draw:layer="layout" draw:type="line" svg:x1="22.718cm" svg:y1="8.458cm" svg:x2="22.718cm" svg:y2="9.258cm" svg:d="M22718 8458v800" svg:viewBox="0 0 1 801">
          <text:p/>
        </draw:connector>
        <draw:custom-shape draw:name="テキスト ボックス 24" draw:style-name="gr238" draw:text-style-name="P63" draw:layer="layout" svg:width="7.4cm" svg:height="0.695cm" svg:x="17.984cm" svg:y="18.49cm">
          <text:p text:style-name="P62"><text:span text:style-name="T73">R version3.3.1(64b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代謝マーカー" draw:style-name="dp3" draw:master-page-name="タイトルとコンテンツ" presentation:presentation-page-layout-name="AL1T11">
        <draw:frame draw:name="タイトル 1" presentation:style-name="pr8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骨代</text:span><text:span text:style-name="T22">謝</text:span><text:span text:style-name="T22">マー</text:span><text:span text:style-name="T22">カー</text:span></text:p>
          </draw:text-box>
        </draw:frame>
        <draw:frame draw:name="グラフ 5" draw:style-name="gr179" draw:text-style-name="P27" draw:layer="layout" svg:width="12.699cm" svg:height="11.155cm" svg:x="0.134cm" svg:y="5.96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name="グラフ 6" draw:style-name="gr179" draw:text-style-name="P27" draw:layer="layout" svg:width="12.699cm" svg:height="11.155cm" svg:x="12.566cm" svg:y="5.96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name="テキスト ボックス 4" draw:style-name="gr239" draw:text-style-name="P63" draw:layer="layout" svg:width="7.4cm" svg:height="0.695cm" svg:x="17.984cm" svg:y="18.49cm">
          <text:p text:style-name="P62"><text:span text:style-name="T73">R version3.3.1(64b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S28&#10;MMP-3" draw:style-name="dp3" draw:master-page-name="タイトルとコンテンツ" presentation:presentation-page-layout-name="AL1T11">
        <draw:frame draw:name="タイトル 1" presentation:style-name="pr8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54">DAS</text:span><text:span text:style-name="T54">28</text:span><text:span text:style-name="T54"><text:line-break/></text:span><text:span text:style-name="T54">MM</text:span><text:span text:style-name="T54">P-3</text:span></text:p>
          </draw:text-box>
        </draw:frame>
        <draw:frame draw:name="グラフ 4" draw:style-name="gr179" draw:text-style-name="P27" draw:layer="layout" svg:width="12.699cm" svg:height="11.155cm" svg:x="0.486cm" svg:y="6.5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name="グラフ 7" draw:style-name="gr179" draw:text-style-name="P27" draw:layer="layout" svg:width="12.699cm" svg:height="11.155cm" svg:x="12.427cm" svg:y="6.5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name="テキスト ボックス 8" draw:style-name="gr240" draw:text-style-name="P31" draw:layer="layout" svg:width="1.399cm" svg:height="0.675cm" svg:x="10.7cm" svg:y="8.925cm">
          <text:p text:style-name="P30"><text:span text:style-name="T77">N.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241" draw:text-style-name="P31" draw:layer="layout" svg:width="1.399cm" svg:height="0.675cm" svg:x="22.901cm" svg:y="10.138cm">
          <text:p text:style-name="P30"><text:span text:style-name="T77">N.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242" draw:text-style-name="P63" draw:layer="layout" svg:width="7.4cm" svg:height="0.695cm" svg:x="17.984cm" svg:y="18.49cm">
          <text:p text:style-name="P62"><text:span text:style-name="T73">R version3.3.1(64b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有害事象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有害</text:span><text:span text:style-name="T22">事象</text:span></text:p>
          </draw:text-box>
        </draw:frame>
        <draw:frame draw:name="コンテンツ プレースホルダー 4" draw:style-name="gr3" draw:layer="layout" svg:width="18.4cm" svg:height="5.63cm" svg:x="3.499cm" svg:y="7.112cm">
          <table:table>
            <table:table-column table:style-name="co16"/>
            <table:table-column table:style-name="co17"/>
            <table:table-row table:style-name="ro14" table:default-cell-style-name="ce26">
              <table:table-cell/>
              <table:table-cell/>
            </table:table-row>
            <table:table-row table:style-name="ro14" table:default-cell-style-name="ce27">
              <table:table-cell>
                <text:p text:style-name="P25"><text:span text:style-name="T78">大腿骨頸部骨折</text:span></text:p>
              </table:table-cell>
              <table:table-cell>
                <text:p text:style-name="P25"><text:span text:style-name="T79">1</text:span><text:span text:style-name="T80">例</text:span></text:p>
              </table:table-cell>
            </table:table-row>
            <table:table-row table:style-name="ro14" table:default-cell-style-name="ce28">
              <table:table-cell>
                <text:p text:style-name="P25"><text:span text:style-name="T78">肝機能障害</text:span></text:p>
              </table:table-cell>
              <table:table-cell>
                <text:p text:style-name="P25"><text:span text:style-name="T79">1</text:span><text:span text:style-name="T80">例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S MMP3&#10;PINP TRACP-5b" draw:style-name="dp5" draw:master-page-name="タイトルとコンテンツ" presentation:presentation-page-layout-name="AL1T11">
        <draw:frame draw:name="タイトル 1" presentation:style-name="pr8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54">DAS </text:span><text:span text:style-name="T54">MM</text:span><text:span text:style-name="T54">P3</text:span><text:span text:style-name="T54"><text:line-break/></text:span><text:span text:style-name="T54">PIN</text:span><text:span text:style-name="T54">P </text:span><text:span text:style-name="T54">TRA</text:span><text:span text:style-name="T54">CP-</text:span><text:span text:style-name="T54">5b</text:span></text:p>
          </draw:text-box>
        </draw:frame>
        <draw:frame draw:name="グラフ 3" draw:style-name="gr179" draw:text-style-name="P27" draw:layer="layout" svg:width="11.544cm" svg:height="4.3cm" svg:x="0.676cm" svg:y="14.1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name="グラフ 4" draw:style-name="gr179" draw:text-style-name="P27" draw:layer="layout" svg:width="11.544cm" svg:height="4.3cm" svg:x="13.477cm" svg:y="14.1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name="グラフ 5" draw:style-name="gr179" draw:text-style-name="P27" draw:layer="layout" svg:width="12.589cm" svg:height="3.95cm" svg:x="0.726cm" svg:y="5.17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name="グラフ 6" draw:style-name="gr179" draw:text-style-name="P27" draw:layer="layout" svg:width="12.589cm" svg:height="3.95cm" svg:x="12.727cm" svg:y="5.15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onnector draw:name="直線コネクタ 7" draw:style-name="gr196" draw:text-style-name="P27" draw:layer="layout" draw:type="line" svg:x1="9.417cm" svg:y1="4.668cm" svg:x2="10.617cm" svg:y2="4.668cm" svg:d="M9417 4668h1200" svg:viewBox="0 0 1201 1">
          <text:p/>
        </draw:connector>
        <draw:custom-shape draw:name="テキスト ボックス 8" draw:style-name="gr243" draw:text-style-name="P44" draw:layer="layout" svg:width="3.399cm" svg:height="0.547cm" svg:x="10.466cm" svg:y="4.391cm">
          <text:p text:style-name="P43"><text:span text:style-name="T81">大腿骨頸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9" draw:style-name="gr212" draw:text-style-name="P27" draw:layer="layout" draw:type="line" svg:x1="9.417cm" svg:y1="5.018cm" svg:x2="10.617cm" svg:y2="5.018cm" svg:d="M9417 5018h1200" svg:viewBox="0 0 1201 1">
          <text:p/>
        </draw:connector>
        <draw:custom-shape draw:name="テキスト ボックス 10" draw:style-name="gr244" draw:text-style-name="P52" draw:layer="layout" svg:width="3.399cm" svg:height="0.547cm" svg:x="10.466cm" svg:y="4.741cm">
          <text:p text:style-name="P51"><text:span text:style-name="T82">Total 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11" draw:style-name="gr199" draw:text-style-name="P27" draw:layer="layout" draw:type="line" svg:x1="22.251cm" svg:y1="4.668cm" svg:x2="23.452cm" svg:y2="4.668cm" svg:d="M22251 4668h1201" svg:viewBox="0 0 1202 1">
          <text:p/>
        </draw:connector>
        <draw:custom-shape draw:name="テキスト ボックス 12" draw:style-name="gr245" draw:text-style-name="P44" draw:layer="layout" svg:width="3.399cm" svg:height="0.547cm" svg:x="23.301cm" svg:y="4.391cm">
          <text:p text:style-name="P43"><text:span text:style-name="T81">大腿骨頸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13" draw:style-name="gr217" draw:text-style-name="P27" draw:layer="layout" draw:type="line" svg:x1="22.251cm" svg:y1="5.018cm" svg:x2="23.452cm" svg:y2="5.018cm" svg:d="M22251 5018h1201" svg:viewBox="0 0 1202 1">
          <text:p/>
        </draw:connector>
        <draw:custom-shape draw:name="テキスト ボックス 14" draw:style-name="gr246" draw:text-style-name="P52" draw:layer="layout" svg:width="3.399cm" svg:height="0.547cm" svg:x="23.301cm" svg:y="4.741cm">
          <text:p text:style-name="P51"><text:span text:style-name="T82">Total 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15" draw:style-name="gr232" draw:text-style-name="P27" draw:layer="layout" draw:type="line" svg:x1="9.417cm" svg:y1="5.352cm" svg:x2="10.617cm" svg:y2="5.352cm" svg:d="M9417 5352h1200" svg:viewBox="0 0 1201 1">
          <text:p/>
        </draw:connector>
        <draw:custom-shape draw:name="テキスト ボックス 16" draw:style-name="gr247" draw:text-style-name="P44" draw:layer="layout" svg:width="3.399cm" svg:height="0.547cm" svg:x="10.466cm" svg:y="5.075cm">
          <text:p text:style-name="P43"><text:span text:style-name="T81">転子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17" draw:style-name="gr232" draw:text-style-name="P27" draw:layer="layout" draw:type="line" svg:x1="22.251cm" svg:y1="5.352cm" svg:x2="23.452cm" svg:y2="5.352cm" svg:d="M22251 5352h1201" svg:viewBox="0 0 1202 1">
          <text:p/>
        </draw:connector>
        <draw:custom-shape draw:name="テキスト ボックス 18" draw:style-name="gr248" draw:text-style-name="P44" draw:layer="layout" svg:width="3.399cm" svg:height="0.547cm" svg:x="23.301cm" svg:y="5.075cm">
          <text:p text:style-name="P43"><text:span text:style-name="T81">転子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249" draw:text-style-name="P52" draw:layer="layout" svg:width="1.865cm" svg:height="0.844cm" svg:x="1.542cm" svg:y="4.359cm">
          <text:p text:style-name="P51"><text:span text:style-name="T46">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1" draw:style-name="gr250" draw:text-style-name="P52" draw:layer="layout" svg:width="1.865cm" svg:height="0.844cm" svg:x="14.517cm" svg:y="4.34cm">
          <text:p text:style-name="P51"><text:span text:style-name="T46">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グラフ 20" draw:style-name="gr179" draw:text-style-name="P27" draw:layer="layout" svg:width="12.699cm" svg:height="3.909cm" svg:x="0.486cm" svg:y="9.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name="グラフ 22" draw:style-name="gr179" draw:text-style-name="P27" draw:layer="layout" svg:width="12.699cm" svg:height="3.909cm" svg:x="12.427cm" svg:y="9.91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name="テキスト ボックス 23" draw:style-name="gr251" draw:text-style-name="P63" draw:layer="layout" svg:width="7.4cm" svg:height="0.695cm" svg:x="17.984cm" svg:y="18.49cm">
          <text:p text:style-name="P62"><text:span text:style-name="T73">R version3.3.1(64b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考察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7.938cm" presentation:class="title" presentation:user-transformed="true">
          <draw:text-box>
            <text:p text:style-name="P25"><text:span text:style-name="T22">考察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CP-5b vs PINP" draw:style-name="dp3" draw:master-page-name="タイトルとコンテンツ" presentation:presentation-page-layout-name="AL1T11">
        <draw:frame draw:name="図 3" draw:style-name="gr252" draw:text-style-name="P27" draw:layer="layout" svg:width="11.039cm" svg:height="11.039cm" svg:x="1.11cm" svg:y="4.924cm">
          <draw:image xlink:href="Pictures/10000000000002A0000002A005635CB2.jpg" xlink:type="simple" xlink:show="embed" xlink:actuate="onLoad" draw:mime-type="image/jpeg">
            <text:p/>
          </draw:image>
        </draw:frame>
        <draw:frame draw:name="図 4" draw:style-name="gr252" draw:text-style-name="P27" draw:layer="layout" svg:width="11.039cm" svg:height="11.039cm" svg:x="13.5cm" svg:y="4.927cm">
          <draw:image xlink:href="Pictures/10000000000002A0000002A06ACED938.jpg" xlink:type="simple" xlink:show="embed" xlink:actuate="onLoad" draw:mime-type="image/jpeg">
            <text:p/>
          </draw:image>
        </draw:frame>
        <draw:custom-shape draw:name="テキスト ボックス 5" draw:style-name="gr253" draw:text-style-name="P31" draw:layer="layout" svg:width="7cm" svg:height="1.013cm" svg:x="3.08cm" svg:y="4.124cm">
          <text:p text:style-name="P30"><text:span text:style-name="T28">TRACP vs PIN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254" draw:text-style-name="P31" draw:layer="layout" svg:width="10.249cm" svg:height="1.013cm" svg:x="13.895cm" svg:y="4.124cm">
          <text:p text:style-name="P30"><text:span text:style-name="T28">TRACP(</text:span><text:span text:style-name="T64">６</text:span><text:span text:style-name="T64">M) vs PINP(</text:span><text:span text:style-name="T64">６</text:span><text:span text:style-name="T64">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7" draw:style-name="gr255" draw:text-style-name="P52" draw:layer="layout" svg:width="8.594cm" svg:height="2.283cm" svg:x="2.333cm" svg:y="16.117cm">
          <text:p text:style-name="P51"><text:span text:style-name="T83">Residuals:</text:span></text:p>
          <text:p text:style-name="P51"><text:span text:style-name="T83"><text:s text:c="4"/></text:span><text:span text:style-name="T83">Min <text:s text:c="5"/>1Q <text:s/>Median <text:s text:c="5"/>3Q <text:s text:c="4"/>Max </text:span></text:p>
          <text:p text:style-name="P51"><text:span text:style-name="T83">-41.096 -17.323 <text:s/>-3.305 <text:s/>13.343 <text:s/>72.062 </text:span></text:p>
          <text:p text:style-name="P51"><text:span text:style-name="T83"/></text:p>
          <text:p text:style-name="P51"><text:span text:style-name="T83">Coefficients:</text:span></text:p>
          <text:p text:style-name="P51"><text:span text:style-name="T83">TRACP <text:s text:c="8"/>0.1716 <text:s text:c="4"/>0.0253 <text:s text:c="2"/></text:span><text:span text:style-name="T84">6.782 2.67e-08 ***</text:span></text:p>
          <text:p text:style-name="P51"><text:span text:style-name="T83">Multiple R-squared: <text:s/>0.5168, <text:s text:c="3"/>Adjusted R-squared: <text:s/>0.5056 </text:span></text:p>
          <text:p text:style-name="P51"><text:span text:style-name="T83">F-statistic: 45.99 on 1 and 43 DF, <text:s/>p-value: 2.666e-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256" draw:text-style-name="P52" draw:layer="layout" svg:width="8.594cm" svg:height="2.537cm" svg:x="14.723cm" svg:y="16.117cm">
          <text:p text:style-name="P51"><text:span text:style-name="T83">Residuals:</text:span></text:p>
          <text:p text:style-name="P51"><text:span text:style-name="T83"><text:s text:c="4"/></text:span><text:span text:style-name="T83">Min <text:s text:c="5"/>1Q <text:s/>Median <text:s text:c="5"/>3Q <text:s text:c="4"/>Max </text:span></text:p>
          <text:p text:style-name="P51"><text:span text:style-name="T83">-32.421 <text:s/>-6.523 <text:s/>-1.102 <text:s text:c="2"/>4.320 <text:s/>37.079 </text:span></text:p>
          <text:p text:style-name="P51"><text:span text:style-name="T83"/></text:p>
          <text:p text:style-name="P51"><text:span text:style-name="T83">Coefficients:</text:span></text:p>
          <text:p text:style-name="P51"><text:span text:style-name="T83">TRACP6M <text:s text:c="5"/>0.10596 <text:s text:c="3"/>0.01388 <text:s text:c="2"/></text:span><text:span text:style-name="T84">7.635 1.57e-09 ***</text:span></text:p>
          <text:p text:style-name="P51"><text:span text:style-name="T83">Multiple R-squared: <text:s/>0.5755, <text:s text:c="3"/>Adjusted R-squared: <text:s/>0.5656 </text:span></text:p>
          <text:p text:style-name="P51"><text:span text:style-name="T83">F-statistic: <text:s/>58.3 on 1 and 43 DF, <text:s/>p-value: 1.567e-09</text:span></text:p>
          <text:p text:style-name="P51"><text:span text:style-name="T8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257" draw:text-style-name="P52" draw:layer="layout" svg:width="4.346cm" svg:height="1.267cm" svg:x="7.753cm" svg:y="4.924cm">
          <text:p text:style-name="P51"><text:span text:style-name="T86">R=0.5056</text:span></text:p>
          <text:p text:style-name="P51"><text:span text:style-name="T86">p-value=2.666e</text:span><text:span text:style-name="T87">-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258" draw:text-style-name="P52" draw:layer="layout" svg:width="4.346cm" svg:height="1.267cm" svg:x="20.204cm" svg:y="4.924cm">
          <text:p text:style-name="P51"><text:span text:style-name="T86">R=0.5656</text:span></text:p>
          <text:p text:style-name="P51"><text:span text:style-name="T86">p-value=1.567e</text:span><text:span text:style-name="T87">-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259" draw:text-style-name="P63" draw:layer="layout" svg:width="7.4cm" svg:height="0.695cm" svg:x="17.984cm" svg:y="18.49cm">
          <text:p text:style-name="P62"><text:span text:style-name="T73">R version3.3.1(64b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54">TRA</text:span><text:span text:style-name="T54">CP-</text:span><text:span text:style-name="T54">5b </text:span><text:span text:style-name="T54">vs </text:span><text:span text:style-name="T54">PIN</text:span><text:span text:style-name="T54">P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CP-5b vs PINP (2)" draw:style-name="dp3" draw:master-page-name="タイトルとコンテンツ" presentation:presentation-page-layout-name="AL1T11">
        <draw:frame draw:name="図 3" draw:style-name="gr252" draw:text-style-name="P27" draw:layer="layout" svg:width="11.039cm" svg:height="11.039cm" svg:x="1.11cm" svg:y="4.924cm">
          <draw:image xlink:href="Pictures/10000000000002A0000002A005635CB2.jpg" xlink:type="simple" xlink:show="embed" xlink:actuate="onLoad" draw:mime-type="image/jpeg">
            <text:p/>
          </draw:image>
        </draw:frame>
        <draw:frame draw:name="図 4" draw:style-name="gr252" draw:text-style-name="P27" draw:layer="layout" svg:width="11.039cm" svg:height="11.039cm" svg:x="13.5cm" svg:y="4.927cm">
          <draw:image xlink:href="Pictures/10000000000002A0000002A06ACED938.jpg" xlink:type="simple" xlink:show="embed" xlink:actuate="onLoad" draw:mime-type="image/jpeg">
            <text:p/>
          </draw:image>
        </draw:frame>
        <draw:custom-shape draw:name="テキスト ボックス 5" draw:style-name="gr260" draw:text-style-name="P31" draw:layer="layout" svg:width="7cm" svg:height="1.013cm" svg:x="3.08cm" svg:y="4.124cm">
          <text:p text:style-name="P30"><text:span text:style-name="T28">TRACP vs PIN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261" draw:text-style-name="P31" draw:layer="layout" svg:width="10.249cm" svg:height="1.013cm" svg:x="13.895cm" svg:y="4.124cm">
          <text:p text:style-name="P30"><text:span text:style-name="T28">TRACP(</text:span><text:span text:style-name="T64">６</text:span><text:span text:style-name="T64">M) vs PINP(</text:span><text:span text:style-name="T64">６</text:span><text:span text:style-name="T64">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7" draw:style-name="gr262" draw:text-style-name="P52" draw:layer="layout" svg:width="8.594cm" svg:height="2.283cm" svg:x="2.333cm" svg:y="16.117cm">
          <text:p text:style-name="P51"><text:span text:style-name="T83">Residuals:</text:span></text:p>
          <text:p text:style-name="P51"><text:span text:style-name="T83"><text:s text:c="4"/></text:span><text:span text:style-name="T83">Min <text:s text:c="5"/>1Q <text:s/>Median <text:s text:c="5"/>3Q <text:s text:c="4"/>Max </text:span></text:p>
          <text:p text:style-name="P51"><text:span text:style-name="T83">-41.096 -17.323 <text:s/>-3.305 <text:s/>13.343 <text:s/>72.062 </text:span></text:p>
          <text:p text:style-name="P51"><text:span text:style-name="T83"/></text:p>
          <text:p text:style-name="P51"><text:span text:style-name="T83">Coefficients:</text:span></text:p>
          <text:p text:style-name="P51"><text:span text:style-name="T83">TRACP <text:s text:c="8"/>0.1716 <text:s text:c="4"/>0.0253 <text:s text:c="2"/></text:span><text:span text:style-name="T84">6.782 2.67e-08 ***</text:span></text:p>
          <text:p text:style-name="P51"><text:span text:style-name="T83">Multiple R-squared: <text:s/>0.5168, <text:s text:c="3"/>Adjusted R-squared: <text:s/>0.5056 </text:span></text:p>
          <text:p text:style-name="P51"><text:span text:style-name="T83">F-statistic: 45.99 on 1 and 43 DF, <text:s/>p-value: 2.666e-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263" draw:text-style-name="P52" draw:layer="layout" svg:width="8.594cm" svg:height="2.537cm" svg:x="14.723cm" svg:y="16.117cm">
          <text:p text:style-name="P51"><text:span text:style-name="T83">Residuals:</text:span></text:p>
          <text:p text:style-name="P51"><text:span text:style-name="T83"><text:s text:c="4"/></text:span><text:span text:style-name="T83">Min <text:s text:c="5"/>1Q <text:s/>Median <text:s text:c="5"/>3Q <text:s text:c="4"/>Max </text:span></text:p>
          <text:p text:style-name="P51"><text:span text:style-name="T83">-32.421 <text:s/>-6.523 <text:s/>-1.102 <text:s text:c="2"/>4.320 <text:s/>37.079 </text:span></text:p>
          <text:p text:style-name="P51"><text:span text:style-name="T83"/></text:p>
          <text:p text:style-name="P51"><text:span text:style-name="T83">Coefficients:</text:span></text:p>
          <text:p text:style-name="P51"><text:span text:style-name="T83">TRACP6M <text:s text:c="5"/>0.10596 <text:s text:c="3"/>0.01388 <text:s text:c="2"/></text:span><text:span text:style-name="T84">7.635 1.57e-09 ***</text:span></text:p>
          <text:p text:style-name="P51"><text:span text:style-name="T83">Multiple R-squared: <text:s/>0.5755, <text:s text:c="3"/>Adjusted R-squared: <text:s/>0.5656 </text:span></text:p>
          <text:p text:style-name="P51"><text:span text:style-name="T83">F-statistic: <text:s/>58.3 on 1 and 43 DF, <text:s/>p-value: 1.567e-09</text:span></text:p>
          <text:p text:style-name="P51"><text:span text:style-name="T8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264" draw:text-style-name="P52" draw:layer="layout" svg:width="4.346cm" svg:height="1.267cm" svg:x="7.753cm" svg:y="4.924cm">
          <text:p text:style-name="P51"><text:span text:style-name="T86">R=0.5056</text:span></text:p>
          <text:p text:style-name="P51"><text:span text:style-name="T86">p-value=2.666e</text:span><text:span text:style-name="T87">-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265" draw:text-style-name="P52" draw:layer="layout" svg:width="4.346cm" svg:height="1.267cm" svg:x="20.204cm" svg:y="4.924cm">
          <text:p text:style-name="P51"><text:span text:style-name="T86">R=0.5656</text:span></text:p>
          <text:p text:style-name="P51"><text:span text:style-name="T86">p-value=1.567e</text:span><text:span text:style-name="T87">-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266" draw:text-style-name="P63" draw:layer="layout" svg:width="7.4cm" svg:height="0.695cm" svg:x="17.984cm" svg:y="18.49cm">
          <text:p text:style-name="P62"><text:span text:style-name="T73">R version3.3.1(64b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54">TRA</text:span><text:span text:style-name="T54">CP-</text:span><text:span text:style-name="T54">5b </text:span><text:span text:style-name="T54">vs </text:span><text:span text:style-name="T54">PIN</text:span><text:span text:style-name="T54">P</text:span></text:p>
          </draw:text-box>
        </draw:frame>
        <draw:custom-shape draw:name="テキスト ボックス 1" draw:style-name="gr267" draw:text-style-name="P64" draw:layer="layout" svg:width="17.884cm" svg:height="1.775cm" svg:x="5.158cm" svg:y="8.625cm">
          <text:p text:style-name="P30"><text:span text:style-name="T88">PINP = a(TRACP-5b) +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タイトルとコンテンツ" presentation:presentation-page-layout-name="AL1T11">
        <draw:frame draw:name="図 3" draw:style-name="gr252" draw:text-style-name="P27" draw:layer="layout" svg:width="11.023cm" svg:height="11.023cm" svg:x="13.5cm" svg:y="4.924cm">
          <draw:image xlink:href="Pictures/10000000000002A0000002A05858E52C.jpg" xlink:type="simple" xlink:show="embed" xlink:actuate="onLoad" draw:mime-type="image/jpeg">
            <text:p/>
          </draw:image>
        </draw:frame>
        <draw:frame draw:name="図 4" draw:style-name="gr252" draw:text-style-name="P27" draw:layer="layout" svg:width="11.023cm" svg:height="11.023cm" svg:x="1.099cm" svg:y="4.924cm">
          <draw:image xlink:href="Pictures/10000000000002A0000002A063C630EF.jpg" xlink:type="simple" xlink:show="embed" xlink:actuate="onLoad" draw:mime-type="image/jpeg">
            <text:p/>
          </draw:image>
        </draw:frame>
        <draw:custom-shape draw:name="テキスト ボックス 5" draw:style-name="gr268" draw:text-style-name="P52" draw:layer="layout" svg:width="8.594cm" svg:height="1.775cm" svg:x="2.299cm" svg:y="15.844cm">
          <text:p text:style-name="P51"><text:span text:style-name="T83">Residuals:</text:span></text:p>
          <text:p text:style-name="P51"><text:span text:style-name="T83">Coefficients:</text:span></text:p>
          <text:p text:style-name="P51"><text:span text:style-name="T83">(Intercept) 0.0586686 <text:s/>0.0162825 <text:s text:c="2"/>3.603 <text:s/>0.00081 ***</text:span></text:p>
          <text:p text:style-name="P51"><text:span text:style-name="T83">PINP <text:s text:c="7"/>0.0004525 <text:s/>0.0002057 <text:s text:c="2"/>2.200 <text:s/></text:span><text:span text:style-name="T84">0.03324 *</text:span><text:span text:style-name="T83"> <text:s/></text:span></text:p>
          <text:p text:style-name="P51"><text:span text:style-name="T83">Multiple R-squared: <text:s/>0.1012, <text:s text:c="3"/>Adjusted R-squared: <text:s/>0.08026 </text:span></text:p>
          <text:p text:style-name="P51"><text:span text:style-name="T83">F-statistic: <text:s/>4.84 on 1 and 43 DF, <text:s/>p-value: 0.033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269" draw:text-style-name="P52" draw:layer="layout" svg:width="8.594cm" svg:height="2.029cm" svg:x="14.723cm" svg:y="15.844cm">
          <text:p text:style-name="P51"><text:span text:style-name="T83">Residuals:</text:span></text:p>
          <text:p text:style-name="P51"><text:span text:style-name="T83">Coefficients:</text:span></text:p>
          <text:p text:style-name="P51"><text:span text:style-name="T83">(Intercept) 7.016e-02 <text:s/>2.028e-02 <text:s text:c="2"/>3.460 <text:s/>0.00123 **</text:span></text:p>
          <text:p text:style-name="P51"><text:span text:style-name="T83">TRACP <text:s text:c="6"/>5.583e-05 <text:s/>5.107e-05 <text:s text:c="2"/>1.093 <text:s/>0.28038 <text:s text:c="2"/></text:span></text:p>
          <text:p text:style-name="P51"><text:span text:style-name="T83">Multiple R-squared: <text:s/>0.02704, <text:s text:c="2"/>Adjusted R-squared: <text:s/>0.004415 </text:span></text:p>
          <text:p text:style-name="P51"><text:span text:style-name="T83">F-statistic: 1.195 on 1 and 43 DF, <text:s/>p-value: 0.2804</text:span></text:p>
          <text:p text:style-name="P51"><text:span text:style-name="T8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7" draw:style-name="gr270" draw:text-style-name="P52" draw:layer="layout" svg:width="4.346cm" svg:height="1.267cm" svg:x="7.753cm" svg:y="4.924cm">
          <text:p text:style-name="P51"><text:span text:style-name="T86">R=0.08002</text:span></text:p>
          <text:p text:style-name="P51"><text:span text:style-name="T86">p-value=0.03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271" draw:text-style-name="P52" draw:layer="layout" svg:width="4.346cm" svg:height="1.267cm" svg:x="20.204cm" svg:y="4.924cm">
          <text:p text:style-name="P51"><text:span text:style-name="T86">R=0.00441</text:span></text:p>
          <text:p text:style-name="P51"><text:span text:style-name="T86">p-value=0.28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272" draw:text-style-name="P31" draw:layer="layout" svg:width="11.274cm" svg:height="1.013cm" svg:x="0.943cm" svg:y="3.924cm">
          <text:p text:style-name="P30"><text:span text:style-name="T28">Δspine(24M-baseline) vs PIN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273" draw:text-style-name="P31" draw:layer="layout" svg:width="10.249cm" svg:height="1.013cm" svg:x="13.895cm" svg:y="3.924cm">
          <text:p text:style-name="P30"><text:span text:style-name="T28">Δspine(24M-baseline) vs TRA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274" draw:text-style-name="P63" draw:layer="layout" svg:width="7.4cm" svg:height="0.695cm" svg:x="17.984cm" svg:y="18.49cm">
          <text:p text:style-name="P62"><text:span text:style-name="T73">R version3.3.1(64b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 2" draw:style-name="gr3" draw:layer="layout" svg:width="13.302cm" svg:height="5.168cm" svg:x="6.048cm" svg:y="-0.076cm">
          <table:table>
            <table:table-column table:style-name="co18"/>
            <table:table-column table:style-name="co19"/>
            <table:table-column table:style-name="co20"/>
            <table:table-row table:style-name="ro15" table:default-cell-style-name="ce29">
              <table:table-cell/>
              <table:table-cell/>
              <table:table-cell/>
            </table:table-row>
            <table:table-row table:style-name="ro16" table:default-cell-style-name="ce27">
              <table:table-cell>
                <text:p text:style-name="P25"><text:span text:style-name="T89">ΔBMD <text:s/></text:span></text:p>
              </table:table-cell>
              <table:table-cell>
                <text:p text:style-name="P25"><text:span text:style-name="T89">vs</text:span></text:p>
              </table:table-cell>
              <table:table-cell>
                <text:p text:style-name="P25"><text:span text:style-name="T89">PINP</text:span></text:p>
              </table:table-cell>
            </table:table-row>
            <table:table-row table:style-name="ro17" table:default-cell-style-name="ce28">
              <table:table-cell>
                <text:p text:style-name="P25"><text:span text:style-name="T89">ΔBMD</text:span><text:span text:style-name="T90"> <text:s/></text:span></text:p>
              </table:table-cell>
              <table:table-cell>
                <text:p text:style-name="P25"><text:span text:style-name="T89">vs</text:span></text:p>
              </table:table-cell>
              <table:table-cell>
                <text:p text:style-name="P25"><text:span text:style-name="T89">TRACP-5b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タイトルとコンテンツ" presentation:presentation-page-layout-name="AL1T11">
        <draw:frame draw:name="図 3" draw:style-name="gr252" draw:text-style-name="P27" draw:layer="layout" svg:width="11.023cm" svg:height="11.023cm" svg:x="13.5cm" svg:y="4.924cm">
          <draw:image xlink:href="Pictures/10000000000002A0000002A05858E52C.jpg" xlink:type="simple" xlink:show="embed" xlink:actuate="onLoad" draw:mime-type="image/jpeg">
            <text:p/>
          </draw:image>
        </draw:frame>
        <draw:frame draw:name="図 4" draw:style-name="gr252" draw:text-style-name="P27" draw:layer="layout" svg:width="11.023cm" svg:height="11.023cm" svg:x="1.099cm" svg:y="4.924cm">
          <draw:image xlink:href="Pictures/10000000000002A0000002A063C630EF.jpg" xlink:type="simple" xlink:show="embed" xlink:actuate="onLoad" draw:mime-type="image/jpeg">
            <text:p/>
          </draw:image>
        </draw:frame>
        <draw:custom-shape draw:name="テキスト ボックス 7" draw:style-name="gr275" draw:text-style-name="P52" draw:layer="layout" svg:width="4.346cm" svg:height="1.267cm" svg:x="7.753cm" svg:y="4.924cm">
          <text:p text:style-name="P51"><text:span text:style-name="T86">R=0.08002</text:span></text:p>
          <text:p text:style-name="P51"><text:span text:style-name="T86">p-value=0.03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276" draw:text-style-name="P52" draw:layer="layout" svg:width="4.346cm" svg:height="1.267cm" svg:x="20.204cm" svg:y="4.924cm">
          <text:p text:style-name="P51"><text:span text:style-name="T86">R=0.00441</text:span></text:p>
          <text:p text:style-name="P51"><text:span text:style-name="T86">p-value=0.28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277" draw:text-style-name="P31" draw:layer="layout" svg:width="11.274cm" svg:height="1.013cm" svg:x="0.943cm" svg:y="3.924cm">
          <text:p text:style-name="P30"><text:span text:style-name="T28">Δspine(24M-baseline) vs PIN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278" draw:text-style-name="P31" draw:layer="layout" svg:width="10.249cm" svg:height="1.013cm" svg:x="13.895cm" svg:y="3.924cm">
          <text:p text:style-name="P30"><text:span text:style-name="T28">Δspine(24M-baseline) vs TRA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1" draw:style-name="gr279" draw:text-style-name="P31" draw:layer="layout" svg:width="10.4cm" svg:height="1.267cm" svg:x="1.41cm" svg:y="16.726cm">
          <text:p text:style-name="P30"><text:span text:style-name="T91">Pearson‘s product-moment correlation </text:span><text:span text:style-name="T92">では、</text:span></text:p>
          <text:p text:style-name="P30"><text:span text:style-name="T93">相関係数：</text:span><text:span text:style-name="T93">0.3180603</text:span><text:span text:style-name="T93">　</text:span><text:span text:style-name="T93">p-value = 0.033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280" draw:text-style-name="P31" draw:layer="layout" svg:width="10.4cm" svg:height="1.267cm" svg:x="13.811cm" svg:y="16.726cm">
          <text:p text:style-name="P30"><text:span text:style-name="T91">Pearson‘s product-moment correlation </text:span><text:span text:style-name="T92">では、</text:span></text:p>
          <text:p text:style-name="P30"><text:span text:style-name="T94">相関係数：</text:span><text:span text:style-name="T94">0.1644446 </text:span><text:span text:style-name="T94">　</text:span><text:span text:style-name="T94">p-value = 0.28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281" draw:text-style-name="P63" draw:layer="layout" svg:width="7.4cm" svg:height="0.695cm" svg:x="17.984cm" svg:y="18.49cm">
          <text:p text:style-name="P62"><text:span text:style-name="T73">R version3.3.1(64b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2" draw:style-name="gr282" draw:text-style-name="P50" draw:layer="layout" svg:width="0.599cm" svg:height="0.599cm" svg:x="3.749cm" svg:y="6.2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5" draw:style-name="gr283" draw:text-style-name="P50" draw:layer="layout" svg:width="0.599cm" svg:height="0.599cm" svg:x="4.682cm" svg:y="13.70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6" draw:style-name="gr284" draw:text-style-name="P50" draw:layer="layout" svg:width="0.599cm" svg:height="0.599cm" svg:x="4.632cm" svg:y="8.25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8" draw:style-name="gr282" draw:text-style-name="P50" draw:layer="layout" svg:width="0.599cm" svg:height="0.599cm" svg:x="14.968cm" svg:y="6.20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9" draw:style-name="gr283" draw:text-style-name="P50" draw:layer="layout" svg:width="0.599cm" svg:height="0.599cm" svg:x="16.269cm" svg:y="13.70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20" draw:style-name="gr284" draw:text-style-name="P50" draw:layer="layout" svg:width="0.599cm" svg:height="0.599cm" svg:x="17.004cm" svg:y="8.25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表 22" draw:style-name="gr3" draw:layer="layout" svg:width="13.302cm" svg:height="5.168cm" svg:x="6.048cm" svg:y="-0.076cm">
          <table:table>
            <table:table-column table:style-name="co18"/>
            <table:table-column table:style-name="co19"/>
            <table:table-column table:style-name="co20"/>
            <table:table-row table:style-name="ro15" table:default-cell-style-name="ce29">
              <table:table-cell/>
              <table:table-cell/>
              <table:table-cell/>
            </table:table-row>
            <table:table-row table:style-name="ro16" table:default-cell-style-name="ce27">
              <table:table-cell>
                <text:p text:style-name="P25"><text:span text:style-name="T89">ΔBMD <text:s/></text:span></text:p>
              </table:table-cell>
              <table:table-cell>
                <text:p text:style-name="P25"><text:span text:style-name="T89">vs</text:span></text:p>
              </table:table-cell>
              <table:table-cell>
                <text:p text:style-name="P25"><text:span text:style-name="T89">PINP</text:span></text:p>
              </table:table-cell>
            </table:table-row>
            <table:table-row table:style-name="ro17" table:default-cell-style-name="ce28">
              <table:table-cell>
                <text:p text:style-name="P25"><text:span text:style-name="T89">ΔBMD</text:span><text:span text:style-name="T90"> <text:s/></text:span></text:p>
              </table:table-cell>
              <table:table-cell>
                <text:p text:style-name="P25"><text:span text:style-name="T89">vs</text:span></text:p>
              </table:table-cell>
              <table:table-cell>
                <text:p text:style-name="P25"><text:span text:style-name="T89">TRACP-5b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タイトルとコンテンツ" presentation:presentation-page-layout-name="AL1T11">
        <draw:frame draw:name="図 3" draw:style-name="gr252" draw:text-style-name="P27" draw:layer="layout" svg:width="11.023cm" svg:height="11.023cm" svg:x="1.099cm" svg:y="4.924cm">
          <draw:image xlink:href="Pictures/10000000000002A0000002A04A01643C.jpg" xlink:type="simple" xlink:show="embed" xlink:actuate="onLoad" draw:mime-type="image/jpeg">
            <text:p/>
          </draw:image>
        </draw:frame>
        <draw:frame draw:name="図 4" draw:style-name="gr252" draw:text-style-name="P27" draw:layer="layout" svg:width="11.023cm" svg:height="11.023cm" svg:x="13.5cm" svg:y="4.924cm">
          <draw:image xlink:href="Pictures/10000000000002A0000002A003CF213D.jpg" xlink:type="simple" xlink:show="embed" xlink:actuate="onLoad" draw:mime-type="image/jpeg">
            <text:p/>
          </draw:image>
        </draw:frame>
        <draw:custom-shape draw:name="テキスト ボックス 5" draw:style-name="gr285" draw:text-style-name="P31" draw:layer="layout" svg:width="13.642cm" svg:height="1.013cm" svg:x="-0.241cm" svg:y="3.924cm">
          <text:p text:style-name="P30"><text:span text:style-name="T28">Δspine(24M-base) vs ΔPINP(base-6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286" draw:text-style-name="P31" draw:layer="layout" svg:width="15.006cm" svg:height="1.013cm" svg:x="11.517cm" svg:y="3.924cm">
          <text:p text:style-name="P30"><text:span text:style-name="T28">Δspine(24M-base) vs ΔTRACP(base-6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7" draw:style-name="gr287" draw:text-style-name="P52" draw:layer="layout" svg:width="8.594cm" svg:height="2.283cm" svg:x="2.299cm" svg:y="15.844cm">
          <text:p text:style-name="P51"><text:span text:style-name="T83">Residuals:</text:span></text:p>
          <text:p text:style-name="P51"><text:span text:style-name="T83">Coefficients:</text:span></text:p>
          <text:p text:style-name="P51"><text:span text:style-name="T83"><text:s text:c="13"/></text:span><text:span text:style-name="T83">Estimate Std. Error t value Pr(&gt;|t|) <text:s text:c="3"/></text:span></text:p>
          <text:p text:style-name="P51"><text:span text:style-name="T83">(Intercept) 0.0748239 <text:s/>0.0140327 <text:s text:c="2"/>5.332 <text:s/>3.6e-06 ***</text:span></text:p>
          <text:p text:style-name="P51"><text:span text:style-name="T83">D_PINP <text:s text:c="5"/>0.0003351 <text:s/>0.0002463 <text:s text:c="2"/>1.361 <text:s text:c="3"/>0.181 <text:s text:c="3"/></text:span></text:p>
          <text:p text:style-name="P51"><text:span text:style-name="T83">Multiple R-squared: <text:s/>0.04223, <text:s text:c="2"/>Adjusted R-squared: <text:s/>0.01942 </text:span></text:p>
          <text:p text:style-name="P51"><text:span text:style-name="T83">F-statistic: 1.852 on 1 and 42 DF, <text:s/>p-value: 0.1808</text:span></text:p>
          <text:p text:style-name="P51"><text:span text:style-name="T8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288" draw:text-style-name="P52" draw:layer="layout" svg:width="8.594cm" svg:height="2.029cm" svg:x="14.723cm" svg:y="15.844cm">
          <text:p text:style-name="P51"><text:span text:style-name="T83">Residuals:</text:span></text:p>
          <text:p text:style-name="P51"><text:span text:style-name="T83">Coefficients:</text:span></text:p>
          <text:p text:style-name="P51"><text:span text:style-name="T83"><text:s text:c="13"/></text:span><text:span text:style-name="T83">Estimate Std. Error t value Pr(&gt;|t|) <text:s text:c="3"/></text:span></text:p>
          <text:p text:style-name="P51"><text:span text:style-name="T83">(Intercept) 8.812e-02 <text:s/>1.189e-02 <text:s text:c="2"/>7.412 3.76e-09 ***</text:span></text:p>
          <text:p text:style-name="P51"><text:span text:style-name="T83">D_TRACP <text:s text:c="4"/>1.544e-05 <text:s/>5.130e-05 <text:s text:c="2"/>0.301 <text:s text:c="3"/>0.765 <text:s text:c="3"/></text:span></text:p>
          <text:p text:style-name="P51"><text:span text:style-name="T83">Multiple R-squared: <text:s/>0.002152, <text:s/>Adjusted R-squared: <text:s/>-0.02161 </text:span></text:p>
          <text:p text:style-name="P51"><text:span text:style-name="T83">F-statistic: 0.0906 on 1 and 42 DF, <text:s/>p-value: 0.764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1" draw:style-name="gr289" draw:text-style-name="P52" draw:layer="layout" svg:width="4.346cm" svg:height="1.267cm" svg:x="7.753cm" svg:y="4.924cm">
          <text:p text:style-name="P51"><text:span text:style-name="T86">R=0.0194</text:span></text:p>
          <text:p text:style-name="P51"><text:span text:style-name="T86">p-value=0.18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290" draw:text-style-name="P52" draw:layer="layout" svg:width="4.346cm" svg:height="1.267cm" svg:x="20.204cm" svg:y="4.924cm">
          <text:p text:style-name="P51"><text:span text:style-name="T86">R=-0.02161</text:span></text:p>
          <text:p text:style-name="P51"><text:span text:style-name="T86">p-value=0.764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291" draw:text-style-name="P63" draw:layer="layout" svg:width="7.4cm" svg:height="0.695cm" svg:x="17.984cm" svg:y="18.49cm">
          <text:p text:style-name="P62"><text:span text:style-name="T73">R version3.3.1(64b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15" draw:style-name="gr282" draw:text-style-name="P50" draw:layer="layout" svg:width="0.599cm" svg:height="0.599cm" svg:x="3.749cm" svg:y="6.2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6" draw:style-name="gr283" draw:text-style-name="P50" draw:layer="layout" svg:width="0.599cm" svg:height="0.599cm" svg:x="4.448cm" svg:y="13.70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7" draw:style-name="gr284" draw:text-style-name="P50" draw:layer="layout" svg:width="0.599cm" svg:height="0.599cm" svg:x="3.149cm" svg:y="8.25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8" draw:style-name="gr282" draw:text-style-name="P50" draw:layer="layout" svg:width="0.599cm" svg:height="0.599cm" svg:x="17.801cm" svg:y="6.20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9" draw:style-name="gr283" draw:text-style-name="P50" draw:layer="layout" svg:width="0.599cm" svg:height="0.599cm" svg:x="18.851cm" svg:y="13.70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20" draw:style-name="gr284" draw:text-style-name="P50" draw:layer="layout" svg:width="0.599cm" svg:height="0.599cm" svg:x="18.834cm" svg:y="8.25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表 21" draw:style-name="gr3" draw:layer="layout" svg:width="14.511cm" svg:height="5.168cm" svg:x="5.443cm" svg:y="-0.076cm">
          <table:table>
            <table:table-column table:style-name="co21"/>
            <table:table-column table:style-name="co22"/>
            <table:table-column table:style-name="co23"/>
            <table:table-row table:style-name="ro15" table:default-cell-style-name="ce29">
              <table:table-cell/>
              <table:table-cell/>
              <table:table-cell/>
            </table:table-row>
            <table:table-row table:style-name="ro16" table:default-cell-style-name="ce27">
              <table:table-cell>
                <text:p text:style-name="P25"><text:span text:style-name="T89">ΔBMD <text:s/></text:span></text:p>
              </table:table-cell>
              <table:table-cell>
                <text:p text:style-name="P25"><text:span text:style-name="T89">vs</text:span></text:p>
              </table:table-cell>
              <table:table-cell>
                <text:p text:style-name="P25"><text:span text:style-name="T89">ΔPINP</text:span></text:p>
              </table:table-cell>
            </table:table-row>
            <table:table-row table:style-name="ro17" table:default-cell-style-name="ce28">
              <table:table-cell>
                <text:p text:style-name="P25"><text:span text:style-name="T89">ΔBMD</text:span><text:span text:style-name="T90"> <text:s/></text:span></text:p>
              </table:table-cell>
              <table:table-cell>
                <text:p text:style-name="P25"><text:span text:style-name="T89">vs</text:span></text:p>
              </table:table-cell>
              <table:table-cell>
                <text:p text:style-name="P25"><text:span text:style-name="T89">ΔTRACP-5b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結果 (2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結果</text:span></text:p>
          </draw:text-box>
        </draw:frame>
        <draw:frame draw:name="コンテンツ プレースホルダー 2" presentation:style-name="pr7" draw:text-style-name="P66" draw:layer="layout" svg:width="22.859cm" svg:height="8.479cm" svg:x="1.27cm" svg:y="4.445cm" presentation:class="outline" presentation:user-transformed="true">
          <draw:text-box>
            <text:list text:style-name="L11">
              <text:list-item>
                <text:p text:style-name="P65"><text:span text:style-name="T78">腰椎・大腿骨頸部の骨密度は有意に増加し</text:span><text:span text:style-name="T78">継続的に増加傾向にある。</text:span></text:p>
              </text:list-item>
              <text:list-item>
                <text:p text:style-name="P65"><text:span text:style-name="T78">大腿骨転子部の骨密度は一時的に有意に上</text:span><text:span text:style-name="T78">昇するが減少可能性を示唆する。</text:span></text:p>
              </text:list-item>
              <text:list-item>
                <text:p text:style-name="P65"><text:span text:style-name="T78">投与前の</text:span><text:span text:style-name="T80">PINP/TRACP-5b</text:span><text:span text:style-name="T80">は投与開始</text:span><text:span text:style-name="T80">2</text:span><text:span text:style-name="T80">年後</text:span><text:span text:style-name="T80">の骨密度を予測する因子とはならない。</text:span></text:p>
              </text:list-item>
            </text:list>
          </draw:text-box>
        </draw:frame>
        <draw:custom-shape draw:name="テキスト ボックス 3" draw:style-name="gr292" draw:text-style-name="P31" draw:layer="layout" svg:width="19.581cm" svg:height="7.026cm" svg:x="2.909cm" svg:y="13.293cm">
          <text:p text:style-name="P30"><text:span text:style-name="T95">RA</text:span><text:span text:style-name="T96">患者に限定する場合</text:span></text:p>
          <text:p text:style-name="P30"><text:span text:style-name="T96">Denosumab </text:span><text:span text:style-name="T96">の効果とは</text:span></text:p>
          <text:p text:style-name="P30"><text:span text:style-name="T96">皮質骨よりも海綿骨の増加である事を</text:span></text:p>
          <text:p text:style-name="P30"><text:span text:style-name="T96">示唆する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nosumabの特徴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54">Den</text:span><text:span text:style-name="T54">osu</text:span><text:span text:style-name="T54">mab</text:span><text:span text:style-name="T55">の特</text:span><text:span text:style-name="T55">徴</text:span></text:p>
          </draw:text-box>
        </draw:frame>
        <draw:frame draw:name="コンテンツ プレースホルダー 2" presentation:style-name="pr7" draw:text-style-name="P66" draw:layer="layout" svg:width="18.892cm" svg:height="11.428cm" svg:x="3.254cm" svg:y="6.097cm" presentation:class="outline" presentation:user-transformed="true">
          <draw:text-box>
            <text:list text:style-name="L11">
              <text:list-item>
                <text:p text:style-name="P65"><text:span text:style-name="T79">RANKL</text:span><text:span text:style-name="T80">に対する人型抗体製剤</text:span></text:p>
              </text:list-item>
              <text:list-item>
                <text:p text:style-name="P65"><text:span text:style-name="T80">骨吸収抑制に働く</text:span></text:p>
              </text:list-item>
              <text:list-item>
                <text:p text:style-name="P65"><text:span text:style-name="T80">半減期：約</text:span><text:span text:style-name="T80">4</text:span><text:span text:style-name="T80">週間</text:span></text:p>
              </text:list-item>
              <text:list-item>
                <text:p text:style-name="P65"><text:span text:style-name="T80">投与期間：</text:span><text:span text:style-name="T80">6</text:span><text:span text:style-name="T80">ヶ月に一回投与</text:span></text:p>
              </text:list-item>
              <text:list-item>
                <text:p text:style-name="P65"><text:span text:style-name="T80">血中</text:span><text:span text:style-name="T80">Ca</text:span><text:span text:style-name="T80">濃度には注意する必要があ</text:span></text:p>
              </text:list-item>
            </text:list>
            <text:p text:style-name="P67"><text:span text:style-name="T80">　るらしい？</text:span></text:p>
            <text:p text:style-name="P67"><text:span text:style-name="T80">　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特異的な症例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7.938cm" presentation:class="title" presentation:user-transformed="true">
          <draw:text-box>
            <text:p text:style-name="P25"><text:span text:style-name="T22">特異</text:span><text:span text:style-name="T22">的な</text:span><text:span text:style-name="T22">症例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型肝炎治療中に生じた&#10;骨軟化症の1例" draw:style-name="dp3" draw:master-page-name="タイトル_20_スライド" presentation:presentation-page-layout-name="AL2T0">
        <draw:frame draw:name="タイトル 3" presentation:style-name="pr9" draw:text-style-name="P26" draw:layer="layout" svg:width="21.589cm" svg:height="6.276cm" svg:x="1.905cm" svg:y="6.387cm" presentation:class="title" presentation:user-transformed="true">
          <draw:text-box>
            <text:p text:style-name="P25"><text:span text:style-name="T97">B</text:span><text:span text:style-name="T98">型</text:span><text:span text:style-name="T98">肝</text:span><text:span text:style-name="T98">炎</text:span><text:span text:style-name="T98">治</text:span><text:span text:style-name="T98">療</text:span><text:span text:style-name="T98">中</text:span><text:span text:style-name="T98">に</text:span><text:span text:style-name="T98">生</text:span><text:span text:style-name="T98">じ</text:span><text:span text:style-name="T98">た</text:span><text:span text:style-name="T98"><text:line-break/></text:span><text:span text:style-name="T98">骨</text:span><text:span text:style-name="T98">軟</text:span><text:span text:style-name="T98">化</text:span><text:span text:style-name="T98">症</text:span><text:span text:style-name="T98">の</text:span><text:span text:style-name="T98">1</text:span><text:span text:style-name="T98">例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症例&#10;56歳　女性" draw:style-name="dp3" draw:master-page-name="タイトルとコンテンツ" presentation:presentation-page-layout-name="AL1T11">
        <draw:frame draw:name="タイトル 1" presentation:style-name="pr8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症例</text:span><text:span text:style-name="T55"><text:line-break/></text:span><text:span text:style-name="T55">56</text:span><text:span text:style-name="T55">歳</text:span><text:span text:style-name="T55">　女</text:span><text:span text:style-name="T55">性</text:span></text:p>
          </draw:text-box>
        </draw:frame>
        <draw:frame draw:name="コンテンツ プレースホルダー 2" presentation:style-name="pr11" draw:text-style-name="P66" draw:layer="layout" svg:width="25.1cm" svg:height="14.604cm" svg:x="0.184cm" svg:y="4.445cm" presentation:class="outline" presentation:user-transformed="true">
          <draw:text-box>
            <text:p text:style-name="P67"><text:span text:style-name="T79">[</text:span><text:span text:style-name="T80">主訴</text:span><text:span text:style-name="T80">]</text:span><text:span text:style-name="T80">　高</text:span><text:span text:style-name="T80">ALP</text:span><text:span text:style-name="T80">血症　</text:span><text:span text:style-name="T80">(</text:span><text:span text:style-name="T80">肝臓専門医からの依頼</text:span><text:span text:style-name="T80">)</text:span></text:p>
            <text:p text:style-name="P67"><text:span text:style-name="T80">[</text:span><text:span text:style-name="T80">家族歴</text:span><text:span text:style-name="T80">]</text:span><text:span text:style-name="T80">　特記すべき事項なし</text:span></text:p>
            <text:p text:style-name="P67"><text:span text:style-name="T80">［現病歴］　</text:span></text:p>
            <text:p text:style-name="P67"><text:span text:style-name="T80">　</text:span><text:span text:style-name="T99">B</text:span><text:span text:style-name="T99">型肝炎の治療のため、</text:span><text:span text:style-name="T99">Lamivudine(LMV)</text:span><text:span text:style-name="T99">投与に</text:span><text:span text:style-name="T99">より治療していたが、</text:span><text:span text:style-name="T99">LMV</text:span><text:span text:style-name="T99">の耐性出現のため、</text:span><text:span text:style-name="T99">Entecavir</text:span><text:span text:style-name="T99">に変更するも効果が乏しいため、</text:span><text:span text:style-name="T99">2010</text:span><text:span text:style-name="T99">年よ</text:span><text:span text:style-name="T99">り</text:span><text:span text:style-name="T99">Adefovir dipivoxil</text:span><text:span text:style-name="T99">（</text:span><text:span text:style-name="T99">ADV</text:span><text:span text:style-name="T99">）の投与開始</text:span><text:span text:style-name="T99">.</text:span><text:span text:style-name="T99">　</text:span><text:span text:style-name="T99">2011</text:span><text:span text:style-name="T99">年よ</text:span><text:span text:style-name="T99">り</text:span><text:span text:style-name="T99">ALP</text:span><text:span text:style-name="T99">上昇を認めた</text:span><text:span text:style-name="T99">.</text:span></text:p>
            <text:p text:style-name="P68"><text:span text:style-name="T99">　</text:span><text:span text:style-name="T99">ADV</text:span><text:span text:style-name="T99">による骨軟化症の可能性も考慮しつつ、消化</text:span><text:span text:style-name="T99">器内科にて経過観察していた</text:span><text:span text:style-name="T99">.</text:span><text:span text:style-name="T99">　しかし、</text:span><text:span text:style-name="T99">ALP</text:span><text:span text:style-name="T99">の上昇</text:span><text:span text:style-name="T99">傾向を認めたため、</text:span><text:span text:style-name="T99">2013</text:span><text:span text:style-name="T99">年に当院整形外科へ紹介受</text:span><text:span text:style-name="T99">診となる</text:span><text:span text:style-name="T99">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初診時　検査所見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059cm" presentation:class="title" presentation:user-transformed="true">
          <draw:text-box>
            <text:p text:style-name="P25"><text:span text:style-name="T22">初診</text:span><text:span text:style-name="T22">時　</text:span><text:span text:style-name="T22">検査</text:span><text:span text:style-name="T22">所見</text:span></text:p>
          </draw:text-box>
        </draw:frame>
        <draw:frame draw:name="コンテンツ プレースホルダー 3" draw:style-name="gr3" draw:layer="layout" svg:width="25.097cm" svg:height="16.625cm" svg:x="0cm" svg:y="2.439cm">
          <table:table>
            <table:table-column table:style-name="co24"/>
            <table:table-column table:style-name="co25"/>
            <table:table-column table:style-name="co15"/>
            <table:table-column table:style-name="co25"/>
            <table:table-column table:style-name="co26"/>
            <table:table-column table:style-name="co25"/>
            <table:table-column table:style-name="co27"/>
            <table:table-column table:style-name="co15"/>
            <table:table-column table:style-name="co11"/>
            <table:table-column table:style-name="co28"/>
            <table:table-row table:style-name="ro18" table:default-cell-style-name="ce30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8" table:default-cell-style-name="ce31">
              <table:table-cell>
                <text:p text:style-name="P25"><text:span text:style-name="T100">WBC</text:span></text:p>
              </table:table-cell>
              <table:table-cell>
                <text:p text:style-name="P25"><text:span text:style-name="T100">4200</text:span></text:p>
              </table:table-cell>
              <table:table-cell>
                <text:p text:style-name="P61"><text:span text:style-name="T100">BUN</text:span></text:p>
              </table:table-cell>
              <table:table-cell>
                <text:p text:style-name="P25"><text:span text:style-name="T100">9.9</text:span></text:p>
              </table:table-cell>
              <table:table-cell>
                <text:p text:style-name="P61"><text:span text:style-name="T101">γ-GT</text:span></text:p>
              </table:table-cell>
              <table:table-cell>
                <text:p text:style-name="P25"><text:span text:style-name="T101">51</text:span></text:p>
              </table:table-cell>
              <table:table-cell>
                <text:p text:style-name="P61"><text:span text:style-name="T100">INTACT-PTH</text:span></text:p>
              </table:table-cell>
              <table:table-cell>
                <text:p text:style-name="P25"><text:span text:style-name="T100">24</text:span></text:p>
              </table:table-cell>
              <table:table-cell>
                <text:p text:style-name="P61"><text:span text:style-name="T101">B2MG</text:span></text:p>
              </table:table-cell>
              <table:table-cell>
                <text:p text:style-name="P25"><text:span text:style-name="T101">18291</text:span></text:p>
              </table:table-cell>
            </table:table-row>
            <table:table-row table:style-name="ro18" table:default-cell-style-name="ce32">
              <table:table-cell>
                <text:p text:style-name="P25"><text:span text:style-name="T100">RBC</text:span></text:p>
              </table:table-cell>
              <table:table-cell>
                <text:p text:style-name="P25"><text:span text:style-name="T100">460</text:span></text:p>
              </table:table-cell>
              <table:table-cell>
                <text:p text:style-name="P61"><text:span text:style-name="T100">Cre</text:span></text:p>
              </table:table-cell>
              <table:table-cell>
                <text:p text:style-name="P25"><text:span text:style-name="T100">0.79</text:span></text:p>
              </table:table-cell>
              <table:table-cell>
                <text:p text:style-name="P61"><text:span text:style-name="T102">ALP2%</text:span></text:p>
              </table:table-cell>
              <table:table-cell>
                <text:p text:style-name="P25"><text:span text:style-name="T102">19.8</text:span></text:p>
              </table:table-cell>
              <table:table-cell>
                <text:p text:style-name="P61"><text:span text:style-name="T100">PTHrP</text:span></text:p>
              </table:table-cell>
              <table:table-cell>
                <text:p text:style-name="P25"><text:span text:style-name="T100">&lt;1.0</text:span></text:p>
              </table:table-cell>
              <table:table-cell>
                <text:p text:style-name="P61"><text:span text:style-name="T103">尿</text:span><text:span text:style-name="T104">Alb</text:span></text:p>
              </table:table-cell>
              <table:table-cell>
                <text:p text:style-name="P25"><text:span text:style-name="T100">1.7</text:span></text:p>
              </table:table-cell>
            </table:table-row>
            <table:table-row table:style-name="ro18" table:default-cell-style-name="ce32">
              <table:table-cell>
                <text:p text:style-name="P25"><text:span text:style-name="T100">Hb</text:span></text:p>
              </table:table-cell>
              <table:table-cell>
                <text:p text:style-name="P25"><text:span text:style-name="T100">13.3</text:span></text:p>
              </table:table-cell>
              <table:table-cell>
                <text:p text:style-name="P61"><text:span text:style-name="T100">eGFR</text:span></text:p>
              </table:table-cell>
              <table:table-cell>
                <text:p text:style-name="P25"><text:span text:style-name="T100">58</text:span></text:p>
              </table:table-cell>
              <table:table-cell>
                <text:p text:style-name="P61"><text:span text:style-name="T101">ALP2%</text:span><text:span text:style-name="T105">活性</text:span></text:p>
              </table:table-cell>
              <table:table-cell>
                <text:p text:style-name="P25"><text:span text:style-name="T101">200</text:span></text:p>
              </table:table-cell>
              <table:table-cell>
                <text:p text:style-name="P61"><text:span text:style-name="T101">P1NP</text:span></text:p>
              </table:table-cell>
              <table:table-cell>
                <text:p text:style-name="P25"><text:span text:style-name="T101">120</text:span></text:p>
              </table:table-cell>
              <table:table-cell>
                <text:p text:style-name="P61"><text:span text:style-name="T106">補正尿</text:span><text:span text:style-name="T105">Alb</text:span></text:p>
              </table:table-cell>
              <table:table-cell>
                <text:p text:style-name="P25"><text:span text:style-name="T101">58</text:span></text:p>
              </table:table-cell>
            </table:table-row>
            <table:table-row table:style-name="ro18" table:default-cell-style-name="ce32">
              <table:table-cell>
                <text:p text:style-name="P25"><text:span text:style-name="T100">Ht</text:span></text:p>
              </table:table-cell>
              <table:table-cell>
                <text:p text:style-name="P25"><text:span text:style-name="T100">41.3</text:span></text:p>
              </table:table-cell>
              <table:table-cell>
                <text:p text:style-name="P61"><text:span text:style-name="T100">Na</text:span></text:p>
              </table:table-cell>
              <table:table-cell>
                <text:p text:style-name="P25"><text:span text:style-name="T100">143</text:span></text:p>
              </table:table-cell>
              <table:table-cell>
                <text:p text:style-name="P61"><text:span text:style-name="T101">ALP3%</text:span></text:p>
              </table:table-cell>
              <table:table-cell>
                <text:p text:style-name="P25"><text:span text:style-name="T101">72.3</text:span></text:p>
              </table:table-cell>
              <table:table-cell>
                <text:p text:style-name="P61"><text:span text:style-name="T101">TRACP-5b</text:span></text:p>
              </table:table-cell>
              <table:table-cell>
                <text:p text:style-name="P25"><text:span text:style-name="T101">749</text:span></text:p>
              </table:table-cell>
              <table:table-cell>
                <text:p text:style-name="P61"><text:span text:style-name="T103">尿</text:span><text:span text:style-name="T104">UN</text:span></text:p>
              </table:table-cell>
              <table:table-cell>
                <text:p text:style-name="P25"><text:span text:style-name="T100">263.8</text:span></text:p>
              </table:table-cell>
            </table:table-row>
            <table:table-row table:style-name="ro18" table:default-cell-style-name="ce32">
              <table:table-cell>
                <text:p text:style-name="P25"><text:span text:style-name="T100">RDW</text:span></text:p>
              </table:table-cell>
              <table:table-cell>
                <text:p text:style-name="P25"><text:span text:style-name="T100">12.9</text:span></text:p>
              </table:table-cell>
              <table:table-cell>
                <text:p text:style-name="P61"><text:span text:style-name="T100">K</text:span></text:p>
              </table:table-cell>
              <table:table-cell>
                <text:p text:style-name="P25"><text:span text:style-name="T100">3.6</text:span></text:p>
              </table:table-cell>
              <table:table-cell>
                <text:p text:style-name="P61"><text:span text:style-name="T101">ALP3%</text:span><text:span text:style-name="T105">活性</text:span></text:p>
              </table:table-cell>
              <table:table-cell>
                <text:p text:style-name="P25"><text:span text:style-name="T101">731</text:span></text:p>
              </table:table-cell>
              <table:table-cell>
                <text:p text:style-name="P61"><text:span text:style-name="T101">ucOC</text:span></text:p>
              </table:table-cell>
              <table:table-cell>
                <text:p text:style-name="P25"><text:span text:style-name="T101">4.51</text:span></text:p>
              </table:table-cell>
              <table:table-cell>
                <text:p text:style-name="P61"><text:span text:style-name="T103">尿</text:span><text:span text:style-name="T104">Cre</text:span></text:p>
              </table:table-cell>
              <table:table-cell>
                <text:p text:style-name="P25"><text:span text:style-name="T100">29.3</text:span></text:p>
              </table:table-cell>
            </table:table-row>
            <table:table-row table:style-name="ro19" table:default-cell-style-name="ce32">
              <table:table-cell>
                <text:p text:style-name="P25"><text:span text:style-name="T100">PLT</text:span></text:p>
              </table:table-cell>
              <table:table-cell>
                <text:p text:style-name="P25"><text:span text:style-name="T100">164</text:span></text:p>
              </table:table-cell>
              <table:table-cell>
                <text:p text:style-name="P61"><text:span text:style-name="T100">Cl</text:span></text:p>
              </table:table-cell>
              <table:table-cell>
                <text:p text:style-name="P25"><text:span text:style-name="T100">109</text:span></text:p>
              </table:table-cell>
              <table:table-cell>
                <text:p text:style-name="P61"><text:span text:style-name="T100">ALP5%</text:span></text:p>
              </table:table-cell>
              <table:table-cell>
                <text:p text:style-name="P25"><text:span text:style-name="T100">7.9</text:span></text:p>
              </table:table-cell>
              <table:table-cell>
                <text:p text:style-name="P61"><text:span text:style-name="T103">抗核抗体定量</text:span></text:p>
              </table:table-cell>
              <table:table-cell table:style-name="ce28">
                <text:p text:style-name="P25"><text:span text:style-name="T100">&lt;40</text:span></text:p>
              </table:table-cell>
              <table:table-cell>
                <text:p text:style-name="P61"><text:span text:style-name="T103">尿</text:span><text:span text:style-name="T104">Na</text:span></text:p>
              </table:table-cell>
              <table:table-cell>
                <text:p text:style-name="P25"><text:span text:style-name="T100">75</text:span></text:p>
              </table:table-cell>
            </table:table-row>
            <table:table-row table:style-name="ro18" table:default-cell-style-name="ce32">
              <table:table-cell>
                <text:p text:style-name="P25"><text:span text:style-name="T100">NE</text:span></text:p>
              </table:table-cell>
              <table:table-cell>
                <text:p text:style-name="P25"><text:span text:style-name="T100">57.8</text:span></text:p>
              </table:table-cell>
              <table:table-cell>
                <text:p text:style-name="P61"><text:span text:style-name="T100">Ca</text:span></text:p>
              </table:table-cell>
              <table:table-cell>
                <text:p text:style-name="P25"><text:span text:style-name="T100">9.4</text:span></text:p>
              </table:table-cell>
              <table:table-cell>
                <text:p text:style-name="P61"><text:span text:style-name="T101">ALP5%</text:span><text:span text:style-name="T105">活性</text:span></text:p>
              </table:table-cell>
              <table:table-cell>
                <text:p text:style-name="P25"><text:span text:style-name="T101">80</text:span></text:p>
              </table:table-cell>
              <table:table-cell>
                <text:p text:style-name="P61"><text:span text:style-name="T107">1.25(OH)2Vit.</text:span><text:span text:style-name="T100">D</text:span></text:p>
              </table:table-cell>
              <table:table-cell>
                <text:p text:style-name="P25"><text:span text:style-name="T100">50.9</text:span></text:p>
              </table:table-cell>
              <table:table-cell>
                <text:p text:style-name="P61"><text:span text:style-name="T103">尿</text:span><text:span text:style-name="T104">K</text:span></text:p>
              </table:table-cell>
              <table:table-cell>
                <text:p text:style-name="P25"><text:span text:style-name="T100">13.9</text:span></text:p>
              </table:table-cell>
            </table:table-row>
            <table:table-row table:style-name="ro18" table:default-cell-style-name="ce32">
              <table:table-cell>
                <text:p text:style-name="P25"><text:span text:style-name="T100">Ly</text:span></text:p>
              </table:table-cell>
              <table:table-cell>
                <text:p text:style-name="P25"><text:span text:style-name="T100">30.3</text:span></text:p>
              </table:table-cell>
              <table:table-cell>
                <text:p text:style-name="P61"><text:span text:style-name="T103">補</text:span><text:span text:style-name="T104">Ca</text:span></text:p>
              </table:table-cell>
              <table:table-cell>
                <text:p text:style-name="P25"><text:span text:style-name="T100">9.4</text:span></text:p>
              </table:table-cell>
              <table:table-cell>
                <text:p text:style-name="P61"><text:span text:style-name="T100">LD</text:span></text:p>
              </table:table-cell>
              <table:table-cell>
                <text:p text:style-name="P25"><text:span text:style-name="T100">174</text:span></text:p>
              </table:table-cell>
              <table:table-cell>
                <text:p text:style-name="P61"><text:span text:style-name="T103">尿所見</text:span></text:p>
              </table:table-cell>
              <table:table-cell table:style-name="ce33"/>
              <table:table-cell>
                <text:p text:style-name="P61"><text:span text:style-name="T103">尿</text:span><text:span text:style-name="T104">Cl</text:span></text:p>
              </table:table-cell>
              <table:table-cell>
                <text:p text:style-name="P25"><text:span text:style-name="T100">60</text:span></text:p>
              </table:table-cell>
            </table:table-row>
            <table:table-row table:style-name="ro18" table:default-cell-style-name="ce32">
              <table:table-cell>
                <text:p text:style-name="P25"><text:span text:style-name="T100">Mono</text:span></text:p>
              </table:table-cell>
              <table:table-cell>
                <text:p text:style-name="P25"><text:span text:style-name="T100">6.9</text:span></text:p>
              </table:table-cell>
              <table:table-cell>
                <text:p text:style-name="P61"><text:span text:style-name="T100">P</text:span></text:p>
              </table:table-cell>
              <table:table-cell>
                <text:p text:style-name="P25"><text:span text:style-name="T100">2.5</text:span></text:p>
              </table:table-cell>
              <table:table-cell>
                <text:p text:style-name="P61"><text:span text:style-name="T100">CRP</text:span></text:p>
              </table:table-cell>
              <table:table-cell>
                <text:p text:style-name="P25"><text:span text:style-name="T100">0.1</text:span></text:p>
              </table:table-cell>
              <table:table-cell>
                <text:p text:style-name="P61"><text:span text:style-name="T103">混濁</text:span></text:p>
              </table:table-cell>
              <table:table-cell>
                <text:p text:style-name="P25"><text:span text:style-name="T100">(-)</text:span></text:p>
              </table:table-cell>
              <table:table-cell>
                <text:p text:style-name="P61"><text:span text:style-name="T103">尿</text:span><text:span text:style-name="T104">Ca</text:span></text:p>
              </table:table-cell>
              <table:table-cell>
                <text:p text:style-name="P25"><text:span text:style-name="T100">17.8</text:span></text:p>
              </table:table-cell>
            </table:table-row>
            <table:table-row table:style-name="ro18" table:default-cell-style-name="ce32">
              <table:table-cell>
                <text:p text:style-name="P25"><text:span text:style-name="T100">Eosi</text:span></text:p>
              </table:table-cell>
              <table:table-cell>
                <text:p text:style-name="P25"><text:span text:style-name="T100">4.5</text:span></text:p>
              </table:table-cell>
              <table:table-cell>
                <text:p text:style-name="P61"><text:span text:style-name="T102">UA</text:span></text:p>
              </table:table-cell>
              <table:table-cell>
                <text:p text:style-name="P25"><text:span text:style-name="T102">2.0</text:span></text:p>
              </table:table-cell>
              <table:table-cell>
                <text:p text:style-name="P61"><text:span text:style-name="T100">IgG</text:span></text:p>
              </table:table-cell>
              <table:table-cell>
                <text:p text:style-name="P25"><text:span text:style-name="T100">1202.5</text:span></text:p>
              </table:table-cell>
              <table:table-cell>
                <text:p text:style-name="P61"><text:span text:style-name="T100">pH</text:span></text:p>
              </table:table-cell>
              <table:table-cell>
                <text:p text:style-name="P25"><text:span text:style-name="T100">7.5</text:span></text:p>
              </table:table-cell>
              <table:table-cell>
                <text:p text:style-name="P61"><text:span text:style-name="T103">尿</text:span><text:span text:style-name="T104">P</text:span></text:p>
              </table:table-cell>
              <table:table-cell>
                <text:p text:style-name="P25"><text:span text:style-name="T100">30.1</text:span></text:p>
              </table:table-cell>
            </table:table-row>
            <table:table-row table:style-name="ro18" table:default-cell-style-name="ce32">
              <table:table-cell>
                <text:p text:style-name="P25"><text:span text:style-name="T100">Baso</text:span></text:p>
              </table:table-cell>
              <table:table-cell>
                <text:p text:style-name="P25"><text:span text:style-name="T100">0.5</text:span></text:p>
              </table:table-cell>
              <table:table-cell>
                <text:p text:style-name="P61"><text:span text:style-name="T100">Mg</text:span></text:p>
              </table:table-cell>
              <table:table-cell>
                <text:p text:style-name="P25"><text:span text:style-name="T100">2.3</text:span></text:p>
              </table:table-cell>
              <table:table-cell>
                <text:p text:style-name="P61"><text:span text:style-name="T100">IgA</text:span></text:p>
              </table:table-cell>
              <table:table-cell>
                <text:p text:style-name="P25"><text:span text:style-name="T100">253.9</text:span></text:p>
              </table:table-cell>
              <table:table-cell>
                <text:p text:style-name="P61"><text:span text:style-name="T103">尿蛋白</text:span></text:p>
              </table:table-cell>
              <table:table-cell>
                <text:p text:style-name="P25"><text:span text:style-name="T100">(+-</text:span><text:span text:style-name="T104">）</text:span></text:p>
              </table:table-cell>
              <table:table-cell>
                <text:p text:style-name="P61"><text:span text:style-name="T103">尿</text:span><text:span text:style-name="T104">Mg</text:span></text:p>
              </table:table-cell>
              <table:table-cell>
                <text:p text:style-name="P25"><text:span text:style-name="T100">2.8</text:span></text:p>
              </table:table-cell>
            </table:table-row>
            <table:table-row table:style-name="ro18" table:default-cell-style-name="ce32">
              <table:table-cell>
                <text:p text:style-name="P25"><text:span text:style-name="T100">TP</text:span></text:p>
              </table:table-cell>
              <table:table-cell>
                <text:p text:style-name="P25"><text:span text:style-name="T100">7.2</text:span></text:p>
              </table:table-cell>
              <table:table-cell>
                <text:p text:style-name="P61"><text:span text:style-name="T100">T-Cho</text:span></text:p>
              </table:table-cell>
              <table:table-cell>
                <text:p text:style-name="P25"><text:span text:style-name="T100">161</text:span></text:p>
              </table:table-cell>
              <table:table-cell>
                <text:p text:style-name="P61"><text:span text:style-name="T100">IgM</text:span></text:p>
              </table:table-cell>
              <table:table-cell>
                <text:p text:style-name="P25"><text:span text:style-name="T100">128.7</text:span></text:p>
              </table:table-cell>
              <table:table-cell>
                <text:p text:style-name="P61"><text:span text:style-name="T103">尿糖</text:span></text:p>
              </table:table-cell>
              <table:table-cell>
                <text:p text:style-name="P25"><text:span text:style-name="T100">(-)</text:span></text:p>
              </table:table-cell>
              <table:table-cell>
                <text:p text:style-name="P61"><text:span text:style-name="T102">NAG</text:span></text:p>
              </table:table-cell>
              <table:table-cell>
                <text:p text:style-name="P25"><text:span text:style-name="T102">1.7</text:span></text:p>
              </table:table-cell>
            </table:table-row>
            <table:table-row table:style-name="ro18" table:default-cell-style-name="ce32">
              <table:table-cell>
                <text:p text:style-name="P25"><text:span text:style-name="T100">Alb</text:span></text:p>
              </table:table-cell>
              <table:table-cell>
                <text:p text:style-name="P25"><text:span text:style-name="T100">4.0</text:span></text:p>
              </table:table-cell>
              <table:table-cell>
                <text:p text:style-name="P61"><text:span text:style-name="T101">AST</text:span></text:p>
              </table:table-cell>
              <table:table-cell>
                <text:p text:style-name="P25"><text:span text:style-name="T101">73</text:span></text:p>
              </table:table-cell>
              <table:table-cell>
                <text:p text:style-name="P61"><text:span text:style-name="T100">C3</text:span></text:p>
              </table:table-cell>
              <table:table-cell>
                <text:p text:style-name="P25"><text:span text:style-name="T100">121.3</text:span></text:p>
              </table:table-cell>
              <table:table-cell>
                <text:p text:style-name="P61"><text:span text:style-name="T103">尿潜血</text:span></text:p>
              </table:table-cell>
              <table:table-cell>
                <text:p text:style-name="P25"><text:span text:style-name="T100">(-)</text:span></text:p>
              </table:table-cell>
              <table:table-cell>
                <text:p text:style-name="P61"><text:span text:style-name="T108">シスタチン</text:span><text:span text:style-name="T109">C</text:span></text:p>
              </table:table-cell>
              <table:table-cell>
                <text:p text:style-name="P25"><text:span text:style-name="T102">1.08</text:span></text:p>
              </table:table-cell>
            </table:table-row>
            <table:table-row table:style-name="ro18" table:default-cell-style-name="ce32">
              <table:table-cell>
                <text:p text:style-name="P25"><text:span text:style-name="T101">TTT</text:span></text:p>
              </table:table-cell>
              <table:table-cell>
                <text:p text:style-name="P25"><text:span text:style-name="T101">3.4</text:span></text:p>
              </table:table-cell>
              <table:table-cell>
                <text:p text:style-name="P61"><text:span text:style-name="T101">ALT</text:span></text:p>
              </table:table-cell>
              <table:table-cell>
                <text:p text:style-name="P25"><text:span text:style-name="T101">50</text:span></text:p>
              </table:table-cell>
              <table:table-cell>
                <text:p text:style-name="P61"><text:span text:style-name="T100">C4</text:span></text:p>
              </table:table-cell>
              <table:table-cell>
                <text:p text:style-name="P25"><text:span text:style-name="T100">29.9</text:span></text:p>
              </table:table-cell>
              <table:table-cell>
                <text:p text:style-name="P61"><text:span text:style-name="T103">ケトン対</text:span></text:p>
              </table:table-cell>
              <table:table-cell>
                <text:p text:style-name="P25"><text:span text:style-name="T100">(-)</text:span></text:p>
              </table:table-cell>
              <table:table-cell table:style-name="ce34"/>
              <table:table-cell table:style-name="ce34"/>
            </table:table-row>
            <table:table-row table:style-name="ro20" table:default-cell-style-name="ce32">
              <table:table-cell>
                <text:p text:style-name="P25"><text:span text:style-name="T100">T-Bill</text:span></text:p>
              </table:table-cell>
              <table:table-cell>
                <text:p text:style-name="P25"><text:span text:style-name="T100">0.57</text:span></text:p>
              </table:table-cell>
              <table:table-cell>
                <text:p text:style-name="P61"><text:span text:style-name="T101">ALP</text:span></text:p>
              </table:table-cell>
              <table:table-cell>
                <text:p text:style-name="P25"><text:span text:style-name="T101">1011</text:span></text:p>
              </table:table-cell>
              <table:table-cell table:style-name="ce28">
                <text:p text:style-name="P61"><text:span text:style-name="T100">HbA1c</text:span></text:p>
              </table:table-cell>
              <table:table-cell table:style-name="ce28">
                <text:p text:style-name="P25"><text:span text:style-name="T100">5.1</text:span></text:p>
              </table:table-cell>
              <table:table-cell>
                <text:p text:style-name="P61"><text:span text:style-name="T103">尿浸透圧</text:span></text:p>
              </table:table-cell>
              <table:table-cell>
                <text:p text:style-name="P25"><text:span text:style-name="T100">306</text:span></text:p>
              </table:table-cell>
              <table:table-cell table:style-name="ce34"/>
              <table:table-cell table:style-name="ce34"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初診時　検査所見 (2)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059cm" presentation:class="title" presentation:user-transformed="true">
          <draw:text-box>
            <text:p text:style-name="P25"><text:span text:style-name="T22">初診</text:span><text:span text:style-name="T22">時　</text:span><text:span text:style-name="T22">検査</text:span><text:span text:style-name="T22">所見</text:span></text:p>
          </draw:text-box>
        </draw:frame>
        <draw:frame draw:name="コンテンツ プレースホルダー 6" draw:style-name="gr3" draw:layer="layout" svg:width="6.999cm" svg:height="14.027cm" svg:x="0.05cm" svg:y="4.524cm">
          <table:table>
            <table:table-column table:style-name="co29"/>
            <table:table-column table:style-name="co30"/>
            <table:table-row table:style-name="ro2">
              <table:table-cell table:style-name="ce35" table:number-columns-spanned="2">
                <text:p text:style-name="P25"><text:span text:style-name="T110">ウイルス性肝炎所見</text:span></text:p>
              </table:table-cell>
              <table:covered-table-cell table:style-name="standard"/>
            </table:table-row>
            <table:table-row table:style-name="ro2" table:default-cell-style-name="ce27">
              <table:table-cell>
                <text:p text:style-name="P61"><text:span text:style-name="T111">HBe</text:span><text:span text:style-name="T112">抗原</text:span></text:p>
              </table:table-cell>
              <table:table-cell>
                <text:p text:style-name="P25"><text:span text:style-name="T111">0.3</text:span></text:p>
              </table:table-cell>
            </table:table-row>
            <table:table-row table:style-name="ro2" table:default-cell-style-name="ce28">
              <table:table-cell>
                <text:p text:style-name="P61"><text:span text:style-name="T113">HBe</text:span><text:span text:style-name="T114">抗体</text:span></text:p>
              </table:table-cell>
              <table:table-cell>
                <text:p text:style-name="P25"><text:span text:style-name="T113">69.8</text:span></text:p>
              </table:table-cell>
            </table:table-row>
            <table:table-row table:style-name="ro2" table:default-cell-style-name="ce28">
              <table:table-cell>
                <text:p text:style-name="P61"><text:span text:style-name="T111">HCV</text:span><text:span text:style-name="T112">抗体</text:span></text:p>
              </table:table-cell>
              <table:table-cell>
                <text:p text:style-name="P25"><text:span text:style-name="T111">&lt;0.10</text:span></text:p>
              </table:table-cell>
            </table:table-row>
            <table:table-row table:style-name="ro2" table:default-cell-style-name="ce28">
              <table:table-cell>
                <text:p text:style-name="P61"><text:span text:style-name="T111">AFP</text:span></text:p>
              </table:table-cell>
              <table:table-cell>
                <text:p text:style-name="P25"><text:span text:style-name="T111">3.1</text:span></text:p>
              </table:table-cell>
            </table:table-row>
            <table:table-row table:style-name="ro4" table:default-cell-style-name="ce28">
              <table:table-cell>
                <text:p text:style-name="P61"><text:span text:style-name="T111">PIVKA</text:span><text:span text:style-name="T112">　</text:span><text:span text:style-name="T112">II</text:span></text:p>
              </table:table-cell>
              <table:table-cell>
                <text:p text:style-name="P25"><text:span text:style-name="T111">37</text:span></text:p>
              </table:table-cell>
            </table:table-row>
            <table:table-row table:style-name="ro4" table:default-cell-style-name="ce28">
              <table:table-cell>
                <text:p text:style-name="P61"><text:span text:style-name="T111">HBV(</text:span><text:span text:style-name="T112">定量</text:span><text:span text:style-name="T112">) </text:span></text:p>
              </table:table-cell>
              <table:table-cell>
                <text:p text:style-name="P25"><text:span text:style-name="T115">陰性</text:span></text:p>
              </table:table-cell>
            </table:table-row>
            <table:table-row table:style-name="ro21">
              <table:table-cell table:style-name="ce28">
                <text:p text:style-name="P61"><text:span text:style-name="T100">(TaqManHBV)</text:span></text:p>
              </table:table-cell>
              <table:table-cell table:style-name="ce36"/>
            </table:table-row>
            <table:table-row table:style-name="ro2" table:default-cell-style-name="ce36">
              <table:table-cell/>
              <table:table-cell/>
            </table:table-row>
            <table:table-row table:style-name="ro2" table:default-cell-style-name="ce36"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name="コンテンツ プレースホルダー 6" draw:style-name="gr3" draw:layer="layout" svg:width="6.237cm" svg:height="12.858cm" svg:x="7.097cm" svg:y="4.524cm">
          <table:table>
            <table:table-column table:style-name="co31"/>
            <table:table-column table:style-name="co30"/>
            <table:table-row table:style-name="ro2">
              <table:table-cell table:style-name="ce35" table:number-columns-spanned="2">
                <text:p text:style-name="P25"><text:span text:style-name="T110">静脈血</text:span><text:span text:style-name="T116">Gas</text:span><text:span text:style-name="T116">所見</text:span></text:p>
              </table:table-cell>
              <table:covered-table-cell table:style-name="standard"/>
            </table:table-row>
            <table:table-row table:style-name="ro2" table:default-cell-style-name="ce27">
              <table:table-cell>
                <text:p text:style-name="P61"><text:span text:style-name="T111">pH</text:span></text:p>
              </table:table-cell>
              <table:table-cell>
                <text:p text:style-name="P25"><text:span text:style-name="T111">7.409</text:span></text:p>
              </table:table-cell>
            </table:table-row>
            <table:table-row table:style-name="ro2" table:default-cell-style-name="ce28">
              <table:table-cell>
                <text:p text:style-name="P61"><text:span text:style-name="T111">PCO2</text:span></text:p>
              </table:table-cell>
              <table:table-cell>
                <text:p text:style-name="P25"><text:span text:style-name="T111">35.0</text:span></text:p>
              </table:table-cell>
            </table:table-row>
            <table:table-row table:style-name="ro2" table:default-cell-style-name="ce28">
              <table:table-cell>
                <text:p text:style-name="P61"><text:span text:style-name="T111">PO2</text:span></text:p>
              </table:table-cell>
              <table:table-cell>
                <text:p text:style-name="P25"><text:span text:style-name="T111">68.8</text:span></text:p>
              </table:table-cell>
            </table:table-row>
            <table:table-row table:style-name="ro2" table:default-cell-style-name="ce28">
              <table:table-cell>
                <text:p text:style-name="P61"><text:span text:style-name="T111">cHCO3</text:span></text:p>
              </table:table-cell>
              <table:table-cell>
                <text:p text:style-name="P25"><text:span text:style-name="T111">21.6</text:span></text:p>
              </table:table-cell>
            </table:table-row>
            <table:table-row table:style-name="ro2" table:default-cell-style-name="ce28">
              <table:table-cell>
                <text:p text:style-name="P61"><text:span text:style-name="T111">ctCO2</text:span></text:p>
              </table:table-cell>
              <table:table-cell>
                <text:p text:style-name="P25"><text:span text:style-name="T111">22.7</text:span></text:p>
              </table:table-cell>
            </table:table-row>
            <table:table-row table:style-name="ro2" table:default-cell-style-name="ce28">
              <table:table-cell>
                <text:p text:style-name="P61"><text:span text:style-name="T111">ABE</text:span></text:p>
              </table:table-cell>
              <table:table-cell>
                <text:p text:style-name="P25"><text:span text:style-name="T111">-2.3</text:span></text:p>
              </table:table-cell>
            </table:table-row>
            <table:table-row table:style-name="ro2" table:default-cell-style-name="ce28">
              <table:table-cell>
                <text:p text:style-name="P61"><text:span text:style-name="T111">SAT</text:span></text:p>
              </table:table-cell>
              <table:table-cell>
                <text:p text:style-name="P25"><text:span text:style-name="T111">94.3</text:span></text:p>
              </table:table-cell>
            </table:table-row>
            <table:table-row table:style-name="ro2" table:default-cell-style-name="ce28">
              <table:table-cell>
                <text:p text:style-name="P61"><text:span text:style-name="T111">ionCa</text:span></text:p>
              </table:table-cell>
              <table:table-cell>
                <text:p text:style-name="P25"><text:span text:style-name="T111">4.90</text:span></text:p>
              </table:table-cell>
            </table:table-row>
            <table:table-row table:style-name="ro2" table:default-cell-style-name="ce28">
              <table:table-cell>
                <text:p text:style-name="P61"><text:span text:style-name="T111">AnGap</text:span></text:p>
              </table:table-cell>
              <table:table-cell>
                <text:p text:style-name="P25"><text:span text:style-name="T111">16.9</text:span></text:p>
              </table:table-cell>
            </table:table-row>
            <table:table-row table:style-name="ro2" table:default-cell-style-name="ce28">
              <table:table-cell>
                <text:p text:style-name="P61"><text:span text:style-name="T113">Glu</text:span></text:p>
              </table:table-cell>
              <table:table-cell>
                <text:p text:style-name="P25"><text:span text:style-name="T113">112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コンテンツ プレースホルダー 6" draw:style-name="gr3" draw:layer="layout" svg:width="10.999cm" svg:height="16.11cm" svg:x="14.084cm" svg:y="4.524cm">
          <table:table>
            <table:table-column table:style-name="co32"/>
            <table:table-column table:style-name="co32"/>
            <table:table-column table:style-name="co32"/>
            <table:table-column table:style-name="co32"/>
            <table:table-row table:style-name="ro2" table:default-cell-style-name="standard">
              <table:table-cell table:style-name="ce35" table:number-columns-spanned="4">
                <text:p text:style-name="P25"><text:span text:style-name="T110">蓄尿　</text:span><text:span text:style-name="T116">1600ml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8">
              <table:table-cell>
                <text:p text:style-name="P25"><text:span text:style-name="T115">尿蛋白</text:span></text:p>
              </table:table-cell>
              <table:table-cell>
                <text:p text:style-name="P25"><text:span text:style-name="T111">9</text:span></text:p>
              </table:table-cell>
              <table:table-cell>
                <text:p text:style-name="P25"><text:span text:style-name="T115">尿</text:span><text:span text:style-name="T112">K</text:span></text:p>
              </table:table-cell>
              <table:table-cell>
                <text:p text:style-name="P25"><text:span text:style-name="T111">17.0</text:span></text:p>
              </table:table-cell>
            </table:table-row>
            <table:table-row table:style-name="ro2" table:default-cell-style-name="ce28">
              <table:table-cell>
                <text:p text:style-name="P25"><text:span text:style-name="T113">1</text:span><text:span text:style-name="T114">日量</text:span></text:p>
              </table:table-cell>
              <table:table-cell>
                <text:p text:style-name="P25"><text:span text:style-name="T113">0.17</text:span></text:p>
              </table:table-cell>
              <table:table-cell>
                <text:p text:style-name="P25"><text:span text:style-name="T117">1</text:span><text:span text:style-name="T116">日量</text:span></text:p>
              </table:table-cell>
              <table:table-cell>
                <text:p text:style-name="P25"><text:span text:style-name="T117">1.26</text:span></text:p>
              </table:table-cell>
            </table:table-row>
            <table:table-row table:style-name="ro2" table:default-cell-style-name="ce28">
              <table:table-cell>
                <text:p text:style-name="P25"><text:span text:style-name="T115">尿</text:span><text:span text:style-name="T112">Alb</text:span></text:p>
              </table:table-cell>
              <table:table-cell>
                <text:p text:style-name="P25"><text:span text:style-name="T111">1.5</text:span></text:p>
              </table:table-cell>
              <table:table-cell>
                <text:p text:style-name="P25"><text:span text:style-name="T115">尿</text:span><text:span text:style-name="T112">Cl</text:span></text:p>
              </table:table-cell>
              <table:table-cell>
                <text:p text:style-name="P25"><text:span text:style-name="T111">68</text:span></text:p>
              </table:table-cell>
            </table:table-row>
            <table:table-row table:style-name="ro2" table:default-cell-style-name="ce28">
              <table:table-cell>
                <text:p text:style-name="P25"><text:span text:style-name="T115">１日量</text:span></text:p>
              </table:table-cell>
              <table:table-cell>
                <text:p text:style-name="P25"><text:span text:style-name="T111">28.5</text:span></text:p>
              </table:table-cell>
              <table:table-cell>
                <text:p text:style-name="P25"><text:span text:style-name="T110">１日量</text:span></text:p>
              </table:table-cell>
              <table:table-cell>
                <text:p text:style-name="P25"><text:span text:style-name="T117">4.65</text:span></text:p>
              </table:table-cell>
            </table:table-row>
            <table:table-row table:style-name="ro4" table:default-cell-style-name="ce28">
              <table:table-cell>
                <text:p text:style-name="P25"><text:span text:style-name="T118">補正</text:span><text:span text:style-name="T114">Alb</text:span></text:p>
              </table:table-cell>
              <table:table-cell>
                <text:p text:style-name="P25"><text:span text:style-name="T113">46.2</text:span></text:p>
              </table:table-cell>
              <table:table-cell>
                <text:p text:style-name="P25"><text:span text:style-name="T115">尿</text:span><text:span text:style-name="T112">Ca</text:span></text:p>
              </table:table-cell>
              <table:table-cell>
                <text:p text:style-name="P25"><text:span text:style-name="T111">14.7</text:span></text:p>
              </table:table-cell>
            </table:table-row>
            <table:table-row table:style-name="ro2" table:default-cell-style-name="ce28">
              <table:table-cell>
                <text:p text:style-name="P25"><text:span text:style-name="T115">尿糖</text:span></text:p>
              </table:table-cell>
              <table:table-cell>
                <text:p text:style-name="P25"><text:span text:style-name="T111">5</text:span></text:p>
              </table:table-cell>
              <table:table-cell>
                <text:p text:style-name="P25"><text:span text:style-name="T115">１日量</text:span></text:p>
              </table:table-cell>
              <table:table-cell>
                <text:p text:style-name="P25"><text:span text:style-name="T111">0.3</text:span></text:p>
              </table:table-cell>
            </table:table-row>
            <table:table-row table:style-name="ro2" table:default-cell-style-name="ce28">
              <table:table-cell>
                <text:p text:style-name="P25"><text:span text:style-name="T115">尿</text:span><text:span text:style-name="T112">UN</text:span></text:p>
              </table:table-cell>
              <table:table-cell>
                <text:p text:style-name="P25"><text:span text:style-name="T111">251.1</text:span></text:p>
              </table:table-cell>
              <table:table-cell>
                <text:p text:style-name="P25"><text:span text:style-name="T115">尿</text:span><text:span text:style-name="T112">P</text:span></text:p>
              </table:table-cell>
              <table:table-cell>
                <text:p text:style-name="P25"><text:span text:style-name="T111">30.2</text:span></text:p>
              </table:table-cell>
            </table:table-row>
            <table:table-row table:style-name="ro2" table:default-cell-style-name="ce28">
              <table:table-cell>
                <text:p text:style-name="P25"><text:span text:style-name="T118">１日量</text:span></text:p>
              </table:table-cell>
              <table:table-cell>
                <text:p text:style-name="P25"><text:span text:style-name="T113">4.8</text:span></text:p>
              </table:table-cell>
              <table:table-cell>
                <text:p text:style-name="P25"><text:span text:style-name="T111">1</text:span><text:span text:style-name="T112">日量</text:span></text:p>
              </table:table-cell>
              <table:table-cell>
                <text:p text:style-name="P25"><text:span text:style-name="T111">0.6</text:span></text:p>
              </table:table-cell>
            </table:table-row>
            <table:table-row table:style-name="ro2" table:default-cell-style-name="ce28">
              <table:table-cell>
                <text:p text:style-name="P25"><text:span text:style-name="T115">尿</text:span><text:span text:style-name="T112">Cre</text:span></text:p>
              </table:table-cell>
              <table:table-cell>
                <text:p text:style-name="P25"><text:span text:style-name="T111">32.5</text:span></text:p>
              </table:table-cell>
              <table:table-cell>
                <text:p text:style-name="P25"><text:span text:style-name="T115">尿</text:span><text:span text:style-name="T112">Mg</text:span></text:p>
              </table:table-cell>
              <table:table-cell>
                <text:p text:style-name="P25"><text:span text:style-name="T111">2.4</text:span></text:p>
              </table:table-cell>
            </table:table-row>
            <table:table-row table:style-name="ro2" table:default-cell-style-name="ce28">
              <table:table-cell>
                <text:p text:style-name="P25"><text:span text:style-name="T110">１日糧</text:span></text:p>
              </table:table-cell>
              <table:table-cell>
                <text:p text:style-name="P25"><text:span text:style-name="T117">0.62</text:span></text:p>
              </table:table-cell>
              <table:table-cell>
                <text:p text:style-name="P25"><text:span text:style-name="T115">１日量</text:span></text:p>
              </table:table-cell>
              <table:table-cell>
                <text:p text:style-name="P25"><text:span text:style-name="T111">0.0</text:span></text:p>
              </table:table-cell>
            </table:table-row>
            <table:table-row table:style-name="ro2" table:default-cell-style-name="ce28">
              <table:table-cell>
                <text:p text:style-name="P25"><text:span text:style-name="T115">尿</text:span><text:span text:style-name="T112">Na</text:span></text:p>
              </table:table-cell>
              <table:table-cell>
                <text:p text:style-name="P25"><text:span text:style-name="T111">71</text:span></text:p>
              </table:table-cell>
              <table:table-cell table:style-name="ce36"/>
              <table:table-cell table:style-name="ce36"/>
            </table:table-row>
            <table:table-row table:style-name="ro2" table:default-cell-style-name="ce28">
              <table:table-cell>
                <text:p text:style-name="P25"><text:span text:style-name="T110">１日量</text:span></text:p>
              </table:table-cell>
              <table:table-cell>
                <text:p text:style-name="P25"><text:span text:style-name="T117">3.10</text:span></text:p>
              </table:table-cell>
              <table:table-cell table:style-name="ce36"/>
              <table:table-cell table:style-name="ce36"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5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初診時　腰椎X線像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初診</text:span><text:span text:style-name="T22">時　</text:span><text:span text:style-name="T22">腰椎</text:span><text:span text:style-name="T55">X</text:span><text:span text:style-name="T55">線</text:span><text:span text:style-name="T55">像</text:span></text:p>
          </draw:text-box>
        </draw:frame>
        <draw:frame draw:name="図 3" draw:style-name="gr293" draw:text-style-name="P27" draw:layer="layout" svg:width="9.822cm" svg:height="15.665cm" svg:x="1.699cm" svg:y="3.394cm">
          <draw:image xlink:href="Pictures/1000000000000388000004C8E2C0FA71.png" xlink:type="simple" xlink:show="embed" xlink:actuate="onLoad" draw:mime-type="image/png">
            <text:p/>
          </draw:image>
        </draw:frame>
        <draw:frame draw:name="図 4" draw:style-name="gr294" draw:text-style-name="P27" draw:layer="layout" svg:width="10.425cm" svg:height="15.665cm" svg:x="13.7cm" svg:y="3.394cm">
          <draw:image xlink:href="Pictures/100000000000038D000004C8FBBCF6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初診時　骨塩量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初診</text:span><text:span text:style-name="T22">時　</text:span><text:span text:style-name="T22">骨塩</text:span><text:span text:style-name="T22">量</text:span></text:p>
          </draw:text-box>
        </draw:frame>
        <draw:frame draw:name="表 3" draw:style-name="gr3" draw:layer="layout" svg:width="22.399cm" svg:height="12.209cm" svg:x="1.299cm" svg:y="5.525cm">
          <table:table>
            <table:table-column table:style-name="co33"/>
            <table:table-column table:style-name="co34"/>
            <table:table-column table:style-name="co35"/>
            <table:table-column table:style-name="co35"/>
            <table:table-row table:style-name="ro1" table:default-cell-style-name="standard">
              <table:table-cell table:style-name="ce37" table:number-columns-spanned="4"/>
              <table:covered-table-cell/>
              <table:covered-table-cell/>
              <table:covered-table-cell/>
            </table:table-row>
            <table:table-row table:style-name="ro22" table:default-cell-style-name="ce27">
              <table:table-cell table:style-name="ce38"/>
              <table:table-cell>
                <text:p text:style-name="P69"><text:span text:style-name="T60">T-Score</text:span></text:p>
              </table:table-cell>
              <table:table-cell>
                <text:p text:style-name="P69"><text:span text:style-name="T60">YAM</text:span></text:p>
              </table:table-cell>
              <table:table-cell>
                <text:p text:style-name="P69"><text:span text:style-name="T60">Z-Score</text:span></text:p>
              </table:table-cell>
            </table:table-row>
            <table:table-row table:style-name="ro22" table:default-cell-style-name="ce28">
              <table:table-cell>
                <text:p text:style-name="P69"><text:span text:style-name="T119">腰椎</text:span></text:p>
              </table:table-cell>
              <table:table-cell>
                <text:p text:style-name="P69"><text:span text:style-name="T120">-3.6</text:span></text:p>
              </table:table-cell>
              <table:table-cell>
                <text:p text:style-name="P69"><text:span text:style-name="T120">58</text:span><text:span text:style-name="T121">％</text:span></text:p>
              </table:table-cell>
              <table:table-cell>
                <text:p text:style-name="P69"><text:span text:style-name="T120">-2.0</text:span></text:p>
              </table:table-cell>
            </table:table-row>
            <table:table-row table:style-name="ro22" table:default-cell-style-name="ce28">
              <table:table-cell>
                <text:p text:style-name="P69"><text:span text:style-name="T119">右大腿近位部</text:span></text:p>
              </table:table-cell>
              <table:table-cell>
                <text:p text:style-name="P69"><text:span text:style-name="T120">-2.2</text:span></text:p>
              </table:table-cell>
              <table:table-cell>
                <text:p text:style-name="P69"><text:span text:style-name="T60">72</text:span><text:span text:style-name="T61">％</text:span></text:p>
              </table:table-cell>
              <table:table-cell>
                <text:p text:style-name="P69"><text:span text:style-name="T120">-1.1</text:span></text:p>
              </table:table-cell>
            </table:table-row>
            <table:table-row table:style-name="ro22" table:default-cell-style-name="ce28">
              <table:table-cell>
                <text:p text:style-name="P69"><text:span text:style-name="T119">左大腿近位部</text:span></text:p>
              </table:table-cell>
              <table:table-cell>
                <text:p text:style-name="P69"><text:span text:style-name="T120">-3.0</text:span></text:p>
              </table:table-cell>
              <table:table-cell>
                <text:p text:style-name="P69"><text:span text:style-name="T120">62</text:span><text:span text:style-name="T121">％</text:span></text:p>
              </table:table-cell>
              <table:table-cell>
                <text:p text:style-name="P69"><text:span text:style-name="T120">-1.9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5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診断いたる経緯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7.525cm" presentation:class="title" presentation:user-transformed="true">
          <draw:text-box>
            <text:p text:style-name="P25"><text:span text:style-name="T22">診断</text:span><text:span text:style-name="T22">いた</text:span><text:span text:style-name="T22">る経</text:span><text:span text:style-name="T22">緯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V投与によりFanconi症候群をきたしたB型肝炎" draw:style-name="dp3" draw:master-page-name="タイトルとコンテンツ" presentation:presentation-page-layout-name="AL1T11">
        <draw:frame draw:name="タイトル 1" presentation:style-name="pr4" draw:text-style-name="P26" draw:layer="layout" svg:width="25.145cm" svg:height="2.774cm" svg:x="0.127cm" svg:y="0.149cm" presentation:class="title" presentation:user-transformed="true">
          <draw:text-box>
            <text:p text:style-name="P25"><text:span text:style-name="T122">ADV</text:span><text:span text:style-name="T123">投与</text:span><text:span text:style-name="T123">によ</text:span><text:span text:style-name="T123">り</text:span><text:span text:style-name="T123">Fanco</text:span><text:span text:style-name="T123">ni</text:span><text:span text:style-name="T123">症候</text:span><text:span text:style-name="T123">群を</text:span><text:span text:style-name="T123">きた</text:span><text:span text:style-name="T123">した</text:span><text:span text:style-name="T123">B</text:span><text:span text:style-name="T123">型肝</text:span><text:span text:style-name="T123">炎</text:span></text:p>
          </draw:text-box>
        </draw:frame>
        <draw:frame draw:name="Picture 2" draw:style-name="gr252" draw:text-style-name="P27" draw:layer="layout" svg:width="22.469cm" svg:height="14.801cm" svg:x="1.508cm" svg:y="3.124cm">
          <draw:image xlink:href="Pictures/10000000000002F300000530B3846A09.png" xlink:type="simple" xlink:show="embed" xlink:actuate="onLoad" draw:mime-type="image/png">
            <text:p/>
          </draw:image>
        </draw:frame>
        <draw:custom-shape draw:name="テキスト ボックス 3" draw:style-name="gr295" draw:text-style-name="P52" draw:layer="layout" svg:width="14.401cm" svg:height="1.013cm" svg:x="10.957cm" svg:y="17.957cm">
          <text:p text:style-name="P51"><text:span text:style-name="T26">The Japan Society of Hepatology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5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nconi症候群とは.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54">Fan</text:span><text:span text:style-name="T54">coni</text:span><text:span text:style-name="T55">症候</text:span><text:span text:style-name="T55">群と</text:span><text:span text:style-name="T55">は</text:span><text:span text:style-name="T55">.</text:span></text:p>
          </draw:text-box>
        </draw:frame>
        <draw:frame draw:name="コンテンツ プレースホルダー 2" presentation:style-name="pr7" draw:text-style-name="P66" draw:layer="layout" svg:width="24.802cm" svg:height="4.6cm" svg:x="0.299cm" svg:y="3.524cm" presentation:class="outline" presentation:user-transformed="true">
          <draw:text-box>
            <text:p text:style-name="P70"><text:span text:style-name="T124">[</text:span><text:span text:style-name="T125">概念・定義</text:span><text:span text:style-name="T125">]</text:span></text:p>
            <text:p text:style-name="P70"><text:span text:style-name="T125">　近位尿細管において全般的に輸送が障害されている状態</text:span><text:span text:style-name="T125">.</text:span><text:span text:style-name="T125">アミノ酸</text:span><text:span text:style-name="T125">,</text:span><text:span text:style-name="T125">ブド</text:span><text:span text:style-name="T125">ウ糖</text:span><text:span text:style-name="T125">,</text:span><text:span text:style-name="T125">重炭酸</text:span><text:span text:style-name="T125">,</text:span><text:span text:style-name="T125">無気</text:span><text:span text:style-name="T125">P</text:span><text:span text:style-name="T125">などの溶質再吸収の障害により、結果としてアシドー</text:span><text:span text:style-name="T125">シス・発達障害・くる病などを呈する</text:span></text:p>
            <text:p text:style-name="P70"><text:span text:style-name="T125"/></text:p>
          </draw:text-box>
        </draw:frame>
        <draw:frame draw:name="表 3" draw:style-name="gr3" draw:layer="layout" svg:width="6.599cm" svg:height="10.265cm" svg:x="0.699cm" svg:y="7.725cm">
          <table:table>
            <table:table-column table:style-name="co36"/>
            <table:table-row table:style-name="ro2">
              <table:table-cell table:style-name="ce28">
                <text:p text:style-name="P71"><text:span text:style-name="T111">[</text:span><text:span text:style-name="T112">病態</text:span><text:span text:style-name="T112">]</text:span></text:p>
              </table:table-cell>
            </table:table-row>
            <table:table-row table:style-name="ro2">
              <table:table-cell table:style-name="ce28">
                <text:p text:style-name="P25"><text:span text:style-name="T115">汎アミノ酸尿</text:span></text:p>
              </table:table-cell>
            </table:table-row>
            <table:table-row table:style-name="ro2">
              <table:table-cell table:style-name="ce28">
                <text:p text:style-name="P25"><text:span text:style-name="T115">腎性糖尿</text:span></text:p>
              </table:table-cell>
            </table:table-row>
            <table:table-row table:style-name="ro2">
              <table:table-cell table:style-name="ce28">
                <text:p text:style-name="P25"><text:span text:style-name="T115">低分子蛋白尿</text:span></text:p>
              </table:table-cell>
            </table:table-row>
            <table:table-row table:style-name="ro4">
              <table:table-cell table:style-name="ce28">
                <text:p text:style-name="P25"><text:span text:style-name="T115">尿細管性アシドーシス</text:span></text:p>
              </table:table-cell>
            </table:table-row>
            <table:table-row table:style-name="ro2">
              <table:table-cell table:style-name="ce28">
                <text:p text:style-name="P25"><text:span text:style-name="T115">多飲多尿</text:span></text:p>
              </table:table-cell>
            </table:table-row>
            <table:table-row table:style-name="ro2">
              <table:table-cell table:style-name="ce28">
                <text:p text:style-name="P25"><text:span text:style-name="T115">低尿酸血症</text:span></text:p>
              </table:table-cell>
            </table:table-row>
            <table:table-row table:style-name="ro2">
              <table:table-cell table:style-name="ce28">
                <text:p text:style-name="P25"><text:span text:style-name="T115">電解質異常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表 4" draw:style-name="gr3" draw:layer="layout" svg:width="15.999cm" svg:height="14.5cm" svg:x="8.5cm" svg:y="7.525cm">
          <table:table>
            <table:table-column table:style-name="co37"/>
            <table:table-column table:style-name="co38"/>
            <table:table-row table:style-name="ro23">
              <table:table-cell table:style-name="ce28" table:number-columns-spanned="2">
                <text:p text:style-name="P71"><text:span text:style-name="T111">[</text:span><text:span text:style-name="T112">後天性</text:span><text:span text:style-name="T112">Fanconi</text:span><text:span text:style-name="T112">症候群の原因</text:span><text:span text:style-name="T112">]</text:span></text:p>
              </table:table-cell>
              <table:covered-table-cell table:style-name="standard"/>
            </table:table-row>
            <table:table-row table:style-name="ro23" table:default-cell-style-name="ce28">
              <table:table-cell>
                <text:p text:style-name="P71"><text:span text:style-name="T115">疾患に続発するもの</text:span></text:p>
              </table:table-cell>
              <table:table-cell>
                <text:p text:style-name="P71"><text:span text:style-name="T115">薬物性</text:span></text:p>
              </table:table-cell>
            </table:table-row>
            <table:table-row table:style-name="ro24" table:default-cell-style-name="ce28">
              <table:table-cell>
                <text:p text:style-name="P71"><text:span text:style-name="T126">アミロイドーシス</text:span></text:p>
              </table:table-cell>
              <table:table-cell>
                <text:p text:style-name="P71"><text:span text:style-name="T126">抗癌剤</text:span></text:p>
              </table:table-cell>
            </table:table-row>
            <table:table-row table:style-name="ro24" table:default-cell-style-name="ce27">
              <table:table-cell>
                <text:p text:style-name="P71"><text:span text:style-name="T126">間質性腎炎</text:span></text:p>
              </table:table-cell>
              <table:table-cell table:number-rows-spanned="2">
                <text:p text:style-name="P71"><text:span text:style-name="T126">抗菌薬</text:span></text:p>
                <text:p text:style-name="P71"><text:span text:style-name="T104">(</text:span><text:span text:style-name="T104">ゲンタマイシン　テトラサイクリン</text:span><text:span text:style-name="T104">)</text:span></text:p>
              </table:table-cell>
            </table:table-row>
            <table:table-row table:style-name="ro25">
              <table:table-cell table:style-name="ce27">
                <text:p text:style-name="P71"><text:span text:style-name="T126">膜性腎症</text:span></text:p>
              </table:table-cell>
              <table:covered-table-cell table:style-name="standard"/>
            </table:table-row>
            <table:table-row table:style-name="ro24" table:default-cell-style-name="ce27">
              <table:table-cell>
                <text:p text:style-name="P71"><text:span text:style-name="T127">Lighht</text:span><text:span text:style-name="T128"> Chain</text:span><text:span text:style-name="T128">　蛋白尿症</text:span></text:p>
              </table:table-cell>
              <table:table-cell table:number-rows-spanned="2">
                <text:p text:style-name="P71"><text:span text:style-name="T126">抗ウイルス薬</text:span></text:p>
                <text:p text:style-name="P71"><text:span text:style-name="T126">（</text:span><text:span text:style-name="T128">ADV</text:span><text:span text:style-name="T128">・シドホビル　等）</text:span></text:p>
              </table:table-cell>
            </table:table-row>
            <table:table-row table:style-name="ro24">
              <table:table-cell table:style-name="ce27">
                <text:p text:style-name="P71"><text:span text:style-name="T126">多発性骨髄腫</text:span></text:p>
              </table:table-cell>
              <table:covered-table-cell table:style-name="standard"/>
            </table:table-row>
            <table:table-row table:style-name="ro24" table:default-cell-style-name="ce27">
              <table:table-cell>
                <text:p text:style-name="P71"><text:span text:style-name="T126">腎移植後</text:span></text:p>
              </table:table-cell>
              <table:table-cell table:number-rows-spanned="2">
                <text:p text:style-name="P71"><text:span text:style-name="T126">免疫抑制剤</text:span></text:p>
                <text:p text:style-name="P71"><text:span text:style-name="T126">（シクロスポリン　タクロリムス）</text:span></text:p>
              </table:table-cell>
            </table:table-row>
            <table:table-row table:style-name="ro26">
              <table:table-cell table:style-name="ce28">
                <text:p text:style-name="P71"><text:span text:style-name="T127">Sjogren</text:span><text:span text:style-name="T128">症候群</text:span></text:p>
              </table:table-cell>
              <table:covered-table-cell table:style-name="standard"/>
            </table:table-row>
            <table:table-row table:style-name="ro24">
              <table:table-cell table:style-name="ce39"/>
              <table:table-cell table:style-name="ce28">
                <text:p text:style-name="P71"><text:span text:style-name="T126">重金属（鉛・</text:span><text:span text:style-name="T128">Cd</text:span><text:span text:style-name="T128">）</text:span></text:p>
              </table:table-cell>
            </table:table-row>
            <table:table-row table:style-name="ro24">
              <table:table-cell table:style-name="ce39"/>
              <table:table-cell table:style-name="ce28">
                <text:p text:style-name="P71"><text:span text:style-name="T126">抗寄生虫薬</text:span></text:p>
              </table:table-cell>
            </table:table-row>
            <table:table-row table:style-name="ro27">
              <table:table-cell table:style-name="ce39"/>
              <table:table-cell table:style-name="ce28">
                <text:p text:style-name="P71"><text:span text:style-name="T126">パラコート　バルプロ酸　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5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診断は？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診断</text:span><text:span text:style-name="T22">は？</text:span></text:p>
          </draw:text-box>
        </draw:frame>
        <draw:frame draw:name="コンテンツ プレースホルダー 2" presentation:style-name="pr11" draw:text-style-name="P66" draw:layer="layout" svg:width="22.859cm" svg:height="8.491cm" svg:x="1.299cm" svg:y="6.725cm" presentation:class="outline" presentation:user-transformed="true">
          <draw:text-box>
            <text:list text:style-name="L11">
              <text:list-item>
                <text:p text:style-name="P65"><text:span text:style-name="T78">腎臓内科の診断</text:span></text:p>
              </text:list-item>
            </text:list>
            <text:p text:style-name="P67"><text:span text:style-name="T78">　　　</text:span></text:p>
            <text:p text:style-name="P67"><text:span text:style-name="T78">　　　</text:span><text:span text:style-name="T80">Fanconi</text:span><text:span text:style-name="T80">症候群の確定診断とはならず、</text:span></text:p>
            <text:p text:style-name="P67"><text:span text:style-name="T80">　　　間質性腎炎との診断</text:span><text:span text:style-name="T80">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臨床的には骨軟化症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099cm" svg:y="5.525cm" presentation:class="title" presentation:user-transformed="true">
          <draw:text-box>
            <text:p text:style-name="P25"><text:span text:style-name="T22">臨床</text:span><text:span text:style-name="T22">的に</text:span><text:span text:style-name="T22">は骨</text:span><text:span text:style-name="T22">軟化</text:span><text:span text:style-name="T22">症</text:span></text:p>
          </draw:text-box>
        </draw:frame>
        <draw:custom-shape draw:name="タイトル 1" draw:style-name="gr296" draw:text-style-name="P73" draw:layer="layout" svg:width="22.859cm" svg:height="3.174cm" svg:x="1.099cm" svg:y="11.725cm">
          <text:p text:style-name="P72"><text:span text:style-name="T129">確定診断は出来ず</text:span><text:span text:style-name="T130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5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骨軟化症" draw:style-name="dp5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骨軟</text:span><text:span text:style-name="T22">化症</text:span></text:p>
          </draw:text-box>
        </draw:frame>
        <draw:frame draw:name="コンテンツ プレースホルダー 2" presentation:style-name="pr7" draw:text-style-name="P66" draw:layer="layout" svg:width="20.781cm" svg:height="14.28cm" svg:x="2.699cm" svg:y="4.445cm" presentation:class="outline" presentation:user-transformed="true">
          <draw:text-box>
            <text:p text:style-name="P67"><text:span text:style-name="T79">[</text:span><text:span text:style-name="T80">定義</text:span><text:span text:style-name="T80">]</text:span><text:span text:style-name="T80">骨の石灰化障害による類骨の増加</text:span></text:p>
            <text:p text:style-name="P67"><text:span text:style-name="T80">[</text:span><text:span text:style-name="T80">臨床像</text:span><text:span text:style-name="T80">]</text:span></text:p>
            <text:p text:style-name="P67"><text:span text:style-name="T80">　骨粗鬆症にみる急性の疼痛発作を生じない</text:span></text:p>
            <text:p text:style-name="P67"><text:span text:style-name="T80">　疼痛は臀部・股関節・下腿・足にも出現</text:span></text:p>
            <text:p text:style-name="P67"><text:span text:style-name="T80">　筋力低下　特に下肢近位筋の低下</text:span></text:p>
            <text:p text:style-name="P67"><text:span text:style-name="T80">[X</text:span><text:span text:style-name="T80">線像所見</text:span><text:span text:style-name="T80">]</text:span></text:p>
            <text:p text:style-name="P67"><text:span text:style-name="T80">　骨萎縮・</text:span><text:span text:style-name="T80">Looser</text:span><text:span text:style-name="T80">の骨改変像・骨変形</text:span></text:p>
            <text:p text:style-name="P67"><text:span text:style-name="T80">　椎体では、魚椎変形を認めることがある</text:span><text:span text:style-name="T80">.</text:span></text:p>
            <text:p text:style-name="P67"><text:span text:style-name="T80">[</text:span><text:span text:style-name="T80">生化学所見</text:span><text:span text:style-name="T80">]</text:span></text:p>
            <text:p text:style-name="P67"><text:span text:style-name="T80">　高</text:span><text:span text:style-name="T80">ALP</text:span><text:span text:style-name="T80">血症　　血清</text:span><text:span text:style-name="T80">P≦2.5mg/dl</text:span><text:span text:style-name="T80">　　</text:span></text:p>
            <text:p text:style-name="P74"><text:span text:style-name="T131">　　血清</text:span><text:span text:style-name="T131">Ca</text:span><text:span text:style-name="T131">は正常範囲のものもある。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治療方針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22">治療</text:span><text:span text:style-name="T22">方針</text:span></text:p>
          </draw:text-box>
        </draw:frame>
        <draw:frame draw:name="表 5" draw:style-name="gr3" draw:layer="layout" svg:width="11.599cm" svg:height="6.083cm" svg:x="1.033cm" svg:y="4.774cm">
          <table:table>
            <table:table-column table:style-name="co39"/>
            <table:table-column table:style-name="co40"/>
            <table:table-row table:style-name="ro28">
              <table:table-cell table:style-name="ce35" table:number-columns-spanned="2">
                <text:p text:style-name="P25"><text:span text:style-name="T132">骨塩量</text:span></text:p>
              </table:table-cell>
              <table:covered-table-cell table:style-name="standard"/>
            </table:table-row>
            <table:table-row table:style-name="ro1" table:default-cell-style-name="ce27">
              <table:table-cell>
                <text:p text:style-name="P61"><text:span text:style-name="T133">腰椎</text:span></text:p>
              </table:table-cell>
              <table:table-cell>
                <text:p text:style-name="P25"><text:span text:style-name="T120">58</text:span><text:span text:style-name="T121">％</text:span></text:p>
              </table:table-cell>
            </table:table-row>
            <table:table-row table:style-name="ro1" table:default-cell-style-name="ce28">
              <table:table-cell>
                <text:p text:style-name="P61"><text:span text:style-name="T119">右大腿骨近位部</text:span></text:p>
              </table:table-cell>
              <table:table-cell>
                <text:p text:style-name="P25"><text:span text:style-name="T60">72</text:span><text:span text:style-name="T61">％</text:span></text:p>
              </table:table-cell>
            </table:table-row>
            <table:table-row table:style-name="ro1" table:default-cell-style-name="ce28">
              <table:table-cell>
                <text:p text:style-name="P61"><text:span text:style-name="T133">左大腿骨近位部</text:span></text:p>
              </table:table-cell>
              <table:table-cell>
                <text:p text:style-name="P25"><text:span text:style-name="T120">62</text:span><text:span text:style-name="T121">％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name="表 6" draw:style-name="gr3" draw:layer="layout" svg:width="9.465cm" svg:height="5.828cm" svg:x="14.434cm" svg:y="4.774cm">
          <table:table>
            <table:table-column table:style-name="co41"/>
            <table:table-column table:style-name="co41"/>
            <table:table-row table:style-name="ro28">
              <table:table-cell table:style-name="ce35" table:number-columns-spanned="2">
                <text:p text:style-name="P25"><text:span text:style-name="T132">骨代謝マーカー</text:span></text:p>
              </table:table-cell>
              <table:covered-table-cell table:style-name="standard"/>
            </table:table-row>
            <table:table-row table:style-name="ro22" table:default-cell-style-name="ce27">
              <table:table-cell>
                <text:p text:style-name="P61"><text:span text:style-name="T134">TRACP-5b</text:span></text:p>
              </table:table-cell>
              <table:table-cell>
                <text:p text:style-name="P25"><text:span text:style-name="T134">749</text:span></text:p>
              </table:table-cell>
            </table:table-row>
            <table:table-row table:style-name="ro1" table:default-cell-style-name="ce28">
              <table:table-cell>
                <text:p text:style-name="P61"><text:span text:style-name="T134">P1NP</text:span></text:p>
              </table:table-cell>
              <table:table-cell>
                <text:p text:style-name="P25"><text:span text:style-name="T134">120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name="下矢印 8" draw:style-name="gr297" draw:text-style-name="P75" draw:layer="layout" svg:width="10.6cm" svg:height="1.599cm" svg:x="7.299cm" svg:y="11.92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テキスト ボックス 9" draw:style-name="gr298" draw:text-style-name="P29" draw:layer="layout" svg:width="15.401cm" svg:height="2.961cm" svg:x="4.991cm" svg:y="14.501cm">
          <text:p text:style-name="P28"><text:span text:style-name="T135">高回転型骨粗鬆症</text:span></text:p>
          <text:p text:style-name="P28"><text:span text:style-name="T135">として治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6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治療経過" draw:style-name="dp3" draw:master-page-name="タイトルとコンテンツ" presentation:presentation-page-layout-name="AL1T11">
        <draw:frame draw:name="タイトル 1" presentation:style-name="pr8" draw:text-style-name="P26" draw:layer="layout" svg:width="22.859cm" svg:height="3.174cm" svg:x="1.448cm" svg:y="0.724cm" presentation:class="title" presentation:user-transformed="true">
          <draw:text-box>
            <text:p text:style-name="P25"><text:span text:style-name="T136">治療</text:span><text:span text:style-name="T136">経過</text:span></text:p>
          </draw:text-box>
        </draw:frame>
        <draw:custom-shape draw:name="テキスト ボックス 8" draw:style-name="gr299" draw:text-style-name="P52" draw:layer="layout" svg:width="1.898cm" svg:height="0.717cm" svg:x="0.2cm" svg:y="12.47cm">
          <text:p text:style-name="P51"><text:span text:style-name="T137">uc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300" draw:text-style-name="P52" draw:layer="layout" svg:width="3.799cm" svg:height="1.583cm" svg:x="21.824cm" svg:y="12.768cm">
          <text:p text:style-name="P51"><text:span text:style-name="T138">P1NP ug/l</text:span></text:p>
          <text:p text:style-name="P51"><text:span text:style-name="T139">TRACP-5</text:span><text:span text:style-name="T140">ｂ </text:span><text:span text:style-name="T140">mU/dl</text:span><text:span text:style-name="T141">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1" draw:style-name="gr301" draw:text-style-name="P76" draw:layer="layout" svg:width="15.317cm" svg:height="0.676cm" svg:x="4.499cm" svg:y="3.506cm">
          <text:p text:style-name="P51"><text:span text:style-name="T142">活性型</text:span><text:span text:style-name="T143">Vit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302" draw:text-style-name="P77" draw:layer="layout" svg:width="12.591cm" svg:height="0.676cm" svg:x="7.228cm" svg:y="4.154cm">
          <text:p text:style-name="P51"><text:span text:style-name="T144">Ca/P</text:span><text:span text:style-name="T143">補正開始 <text:s text:c="6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303" draw:text-style-name="P52" draw:layer="layout" svg:width="1.399cm" svg:height="0.589cm" svg:x="0.899cm" svg:y="12.975cm">
          <text:p text:style-name="P51"><text:span text:style-name="T145">ng/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グラフ 16" draw:style-name="gr179" draw:text-style-name="P27" draw:layer="layout" svg:width="21.999cm" svg:height="6.999cm" svg:x="1.531cm" svg:y="12.29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name="下矢印 7" draw:style-name="gr304" draw:text-style-name="P78" draw:layer="layout" svg:width="0.599cm" svg:height="0.999cm" svg:x="5.115cm" svg:y="4.98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下矢印 17" draw:style-name="gr304" draw:text-style-name="P78" draw:layer="layout" svg:width="0.599cm" svg:height="0.999cm" svg:x="8.7cm" svg:y="4.98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下矢印 18" draw:style-name="gr304" draw:text-style-name="P78" draw:layer="layout" svg:width="0.599cm" svg:height="0.999cm" svg:x="12.3cm" svg:y="4.98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下矢印 19" draw:style-name="gr304" draw:text-style-name="P78" draw:layer="layout" svg:width="0.599cm" svg:height="0.999cm" svg:x="15.9cm" svg:y="4.98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下矢印 20" draw:style-name="gr304" draw:text-style-name="P78" draw:layer="layout" svg:width="0.599cm" svg:height="0.999cm" svg:x="19.52cm" svg:y="4.98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テキスト ボックス 21" draw:style-name="gr305" draw:text-style-name="P79" draw:layer="layout" svg:width="2.63cm" svg:height="1.183cm" svg:x="2.556cm" svg:y="4.968cm">
          <text:p text:style-name="P51"><text:span text:style-name="T146">denosum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2" draw:style-name="gr306" draw:text-style-name="P31" draw:layer="layout" svg:width="1.398cm" svg:height="0.717cm" svg:x="4.699cm" svg:y="11.779cm">
          <text:p text:style-name="P30"><text:span text:style-name="T146">0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3" draw:style-name="gr307" draw:text-style-name="P31" draw:layer="layout" svg:width="1.398cm" svg:height="0.717cm" svg:x="6.52cm" svg:y="11.779cm">
          <text:p text:style-name="P30"><text:span text:style-name="T146">3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4" draw:style-name="gr308" draw:text-style-name="P31" draw:layer="layout" svg:width="1.398cm" svg:height="0.717cm" svg:x="8.301cm" svg:y="11.779cm">
          <text:p text:style-name="P30"><text:span text:style-name="T146">6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5" draw:style-name="gr309" draw:text-style-name="P31" draw:layer="layout" svg:width="1.398cm" svg:height="0.717cm" svg:x="10.082cm" svg:y="11.779cm">
          <text:p text:style-name="P30"><text:span text:style-name="T146">9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6" draw:style-name="gr310" draw:text-style-name="P31" draw:layer="layout" svg:width="1.398cm" svg:height="0.717cm" svg:x="11.913cm" svg:y="11.779cm">
          <text:p text:style-name="P30"><text:span text:style-name="T146">12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7" draw:style-name="gr311" draw:text-style-name="P31" draw:layer="layout" svg:width="1.398cm" svg:height="0.717cm" svg:x="13.694cm" svg:y="11.779cm">
          <text:p text:style-name="P30"><text:span text:style-name="T146">15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8" draw:style-name="gr312" draw:text-style-name="P31" draw:layer="layout" svg:width="1.398cm" svg:height="0.717cm" svg:x="15.482cm" svg:y="11.779cm">
          <text:p text:style-name="P30"><text:span text:style-name="T146">18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9" draw:style-name="gr313" draw:text-style-name="P31" draw:layer="layout" svg:width="1.398cm" svg:height="0.717cm" svg:x="17.302cm" svg:y="11.779cm">
          <text:p text:style-name="P30"><text:span text:style-name="T146">21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0" draw:style-name="gr314" draw:text-style-name="P31" draw:layer="layout" svg:width="1.398cm" svg:height="0.717cm" svg:x="19.102cm" svg:y="11.779cm">
          <text:p text:style-name="P30"><text:span text:style-name="T146">24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グラフ 31" draw:style-name="gr179" draw:text-style-name="P27" draw:layer="layout" svg:width="21.999cm" svg:height="6.999cm" svg:x="0.883cm" svg:y="5.52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name="テキスト ボックス 32" draw:style-name="gr315" draw:text-style-name="P52" draw:layer="layout" svg:width="1.999cm" svg:height="0.717cm" svg:x="-0.101cm" svg:y="5.122cm">
          <text:p text:style-name="P51"><text:span text:style-name="T147">B2M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3" draw:style-name="gr316" draw:text-style-name="P52" draw:layer="layout" svg:width="2.92cm" svg:height="0.717cm" svg:x="21.581cm" svg:y="4.928cm">
          <text:p text:style-name="P51"><text:span text:style-name="T148">Intact-P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6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治療経過 (2)" draw:style-name="dp3" draw:master-page-name="タイトルとコンテンツ" presentation:presentation-page-layout-name="AL1T11">
        <draw:frame draw:name="タイトル 1" presentation:style-name="pr8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136">治療</text:span><text:span text:style-name="T136">経過</text:span></text:p>
          </draw:text-box>
        </draw:frame>
        <draw:frame draw:name="グラフ 3" draw:style-name="gr179" draw:text-style-name="P27" draw:layer="layout" svg:width="21.999cm" svg:height="6.999cm" svg:x="2.533cm" svg:y="5.59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name="テキスト ボックス 5" draw:style-name="gr317" draw:text-style-name="P52" draw:layer="layout" svg:width="1.898cm" svg:height="1.099cm" svg:x="0.945cm" svg:y="5.525cm">
          <text:p text:style-name="P51"><text:span text:style-name="T149">尿中</text:span><text:span text:style-name="T150">Ca</text:span><text:span text:style-name="T151"> mg/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318" draw:text-style-name="P76" draw:layer="layout" svg:width="15.317cm" svg:height="0.676cm" svg:x="5.299cm" svg:y="3.506cm">
          <text:p text:style-name="P51"><text:span text:style-name="T142">活性型</text:span><text:span text:style-name="T143">Vit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319" draw:text-style-name="P77" draw:layer="layout" svg:width="12.591cm" svg:height="0.676cm" svg:x="8.028cm" svg:y="4.154cm">
          <text:p text:style-name="P51"><text:span text:style-name="T144">Ca/P</text:span><text:span text:style-name="T143">補正開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下矢印 10" draw:style-name="gr304" draw:text-style-name="P78" draw:layer="layout" svg:width="0.599cm" svg:height="0.999cm" svg:x="5.915cm" svg:y="4.98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下矢印 11" draw:style-name="gr304" draw:text-style-name="P78" draw:layer="layout" svg:width="0.599cm" svg:height="0.999cm" svg:x="9.5cm" svg:y="4.98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下矢印 12" draw:style-name="gr304" draw:text-style-name="P78" draw:layer="layout" svg:width="0.599cm" svg:height="0.999cm" svg:x="13.1cm" svg:y="4.98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下矢印 13" draw:style-name="gr304" draw:text-style-name="P78" draw:layer="layout" svg:width="0.599cm" svg:height="0.999cm" svg:x="16.7cm" svg:y="4.98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下矢印 14" draw:style-name="gr304" draw:text-style-name="P78" draw:layer="layout" svg:width="0.599cm" svg:height="0.999cm" svg:x="20.32cm" svg:y="4.98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テキスト ボックス 15" draw:style-name="gr320" draw:text-style-name="P79" draw:layer="layout" svg:width="2.63cm" svg:height="1.183cm" svg:x="3.356cm" svg:y="4.968cm">
          <text:p text:style-name="P51"><text:span text:style-name="T146">denosum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321" draw:text-style-name="P31" draw:layer="layout" svg:width="1.398cm" svg:height="0.717cm" svg:x="5.499cm" svg:y="11.779cm">
          <text:p text:style-name="P30"><text:span text:style-name="T146">0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322" draw:text-style-name="P31" draw:layer="layout" svg:width="1.398cm" svg:height="0.717cm" svg:x="7.32cm" svg:y="11.779cm">
          <text:p text:style-name="P30"><text:span text:style-name="T146">3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323" draw:text-style-name="P31" draw:layer="layout" svg:width="1.398cm" svg:height="0.717cm" svg:x="9.101cm" svg:y="11.779cm">
          <text:p text:style-name="P30"><text:span text:style-name="T146">6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324" draw:text-style-name="P31" draw:layer="layout" svg:width="1.398cm" svg:height="0.717cm" svg:x="10.882cm" svg:y="11.779cm">
          <text:p text:style-name="P30"><text:span text:style-name="T146">9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0" draw:style-name="gr325" draw:text-style-name="P31" draw:layer="layout" svg:width="1.398cm" svg:height="0.717cm" svg:x="12.713cm" svg:y="11.779cm">
          <text:p text:style-name="P30"><text:span text:style-name="T146">12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1" draw:style-name="gr326" draw:text-style-name="P31" draw:layer="layout" svg:width="1.398cm" svg:height="0.717cm" svg:x="14.494cm" svg:y="11.779cm">
          <text:p text:style-name="P30"><text:span text:style-name="T146">15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2" draw:style-name="gr327" draw:text-style-name="P31" draw:layer="layout" svg:width="1.398cm" svg:height="0.717cm" svg:x="16.283cm" svg:y="11.779cm">
          <text:p text:style-name="P30"><text:span text:style-name="T146">18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3" draw:style-name="gr328" draw:text-style-name="P31" draw:layer="layout" svg:width="1.398cm" svg:height="0.717cm" svg:x="18.102cm" svg:y="11.779cm">
          <text:p text:style-name="P30"><text:span text:style-name="T146">21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4" draw:style-name="gr329" draw:text-style-name="P31" draw:layer="layout" svg:width="1.398cm" svg:height="0.717cm" svg:x="19.902cm" svg:y="11.779cm">
          <text:p text:style-name="P30"><text:span text:style-name="T146">24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5" draw:style-name="gr330" draw:text-style-name="P52" draw:layer="layout" svg:width="1.898cm" svg:height="1.099cm" svg:x="22.701cm" svg:y="5.525cm">
          <text:p text:style-name="P51"><text:span text:style-name="T152">尿中</text:span><text:span text:style-name="T153">IP</text:span><text:span text:style-name="T154"> mg/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6" draw:style-name="gr331" draw:text-style-name="P52" draw:layer="layout" svg:width="1.399cm" svg:height="0.589cm" svg:x="1.886cm" svg:y="12.331cm">
          <text:p text:style-name="P51"><text:span text:style-name="T145">mg/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グラフ 27" draw:style-name="gr179" draw:text-style-name="P27" draw:layer="layout" svg:width="21.999cm" svg:height="6.999cm" svg:x="2.318cm" svg:y="12.62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6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治療経過 (3)" draw:style-name="dp3" draw:master-page-name="タイトルとコンテンツ" presentation:presentation-page-layout-name="AL1T11">
        <draw:frame draw:name="グラフ 4" draw:style-name="gr179" draw:text-style-name="P27" draw:layer="layout" svg:width="21.999cm" svg:height="6.999cm" svg:x="1.874cm" svg:y="7.92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ustom-shape draw:name="テキスト ボックス 5" draw:style-name="gr332" draw:text-style-name="P31" draw:layer="layout" svg:width="1.451cm" svg:height="0.695cm" svg:x="0.578cm" svg:y="7.926cm">
          <text:p text:style-name="P30"><text:span text:style-name="T155">A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333" draw:text-style-name="P31" draw:layer="layout" svg:width="1.756cm" svg:height="1.139cm" svg:x="0.425cm" svg:y="8.622cm">
          <text:p text:style-name="P30"><text:span text:style-name="T138">ALP3</text:span><text:span text:style-name="T156">活性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7" draw:style-name="gr334" draw:text-style-name="P31" draw:layer="layout" svg:width="1.596cm" svg:height="0.695cm" svg:x="22.922cm" svg:y="8.126cm">
          <text:p text:style-name="P30"><text:span text:style-name="T157">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335" draw:text-style-name="P31" draw:layer="layout" svg:width="1.596cm" svg:height="0.695cm" svg:x="22.922cm" svg:y="8.726cm">
          <text:p text:style-name="P30"><text:span text:style-name="T158">A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336" draw:text-style-name="P31" draw:layer="layout" svg:width="2.338cm" svg:height="0.695cm" svg:x="22.551cm" svg:y="9.326cm">
          <text:p text:style-name="P30"><text:span text:style-name="T159">ALP3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337" draw:text-style-name="P31" draw:layer="layout" svg:width="1.398cm" svg:height="0.717cm" svg:x="5.246cm" svg:y="14.103cm">
          <text:p text:style-name="P30"><text:span text:style-name="T146">0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1" draw:style-name="gr338" draw:text-style-name="P31" draw:layer="layout" svg:width="1.398cm" svg:height="0.717cm" svg:x="7.067cm" svg:y="14.103cm">
          <text:p text:style-name="P30"><text:span text:style-name="T146">3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339" draw:text-style-name="P31" draw:layer="layout" svg:width="1.398cm" svg:height="0.717cm" svg:x="8.848cm" svg:y="14.103cm">
          <text:p text:style-name="P30"><text:span text:style-name="T146">6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340" draw:text-style-name="P31" draw:layer="layout" svg:width="1.398cm" svg:height="0.717cm" svg:x="10.629cm" svg:y="14.103cm">
          <text:p text:style-name="P30"><text:span text:style-name="T146">9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341" draw:text-style-name="P31" draw:layer="layout" svg:width="1.398cm" svg:height="0.717cm" svg:x="12.46cm" svg:y="14.103cm">
          <text:p text:style-name="P30"><text:span text:style-name="T146">12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" draw:style-name="gr342" draw:text-style-name="P31" draw:layer="layout" svg:width="1.398cm" svg:height="0.717cm" svg:x="14.241cm" svg:y="14.103cm">
          <text:p text:style-name="P30"><text:span text:style-name="T146">15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343" draw:text-style-name="P31" draw:layer="layout" svg:width="1.398cm" svg:height="0.717cm" svg:x="16.029cm" svg:y="14.103cm">
          <text:p text:style-name="P30"><text:span text:style-name="T146">18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344" draw:text-style-name="P31" draw:layer="layout" svg:width="1.398cm" svg:height="0.717cm" svg:x="17.849cm" svg:y="14.103cm">
          <text:p text:style-name="P30"><text:span text:style-name="T146">21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345" draw:text-style-name="P31" draw:layer="layout" svg:width="1.398cm" svg:height="0.717cm" svg:x="19.649cm" svg:y="14.103cm">
          <text:p text:style-name="P30"><text:span text:style-name="T146">24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タイトル 1" presentation:style-name="pr8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136">治療</text:span><text:span text:style-name="T136">経過</text:span></text:p>
          </draw:text-box>
        </draw:frame>
        <draw:custom-shape draw:name="テキスト ボックス 20" draw:style-name="gr346" draw:text-style-name="P80" draw:layer="layout" svg:width="17.102cm" svg:height="1.014cm" svg:x="3.246cm" svg:y="5.242cm">
          <text:p text:style-name="P51"><text:span text:style-name="T26">Entecavir 0.5m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1" draw:style-name="gr347" draw:text-style-name="P81" draw:layer="layout" svg:width="17.102cm" svg:height="1.014cm" svg:x="3.246cm" svg:y="6.018cm">
          <text:p text:style-name="P51"><text:span text:style-name="T26">Adefovir 10m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下矢印 22" draw:style-name="gr348" draw:text-style-name="P38" draw:layer="layout" svg:width="0.898cm" svg:height="1.295cm" draw:transform="rotate (-3.14159265358979) translate (21.648cm 15.821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テキスト ボックス 23" draw:style-name="gr349" draw:text-style-name="P52" draw:layer="layout" svg:width="7.719cm" svg:height="1.013cm" svg:x="17.381cm" svg:y="16.042cm">
          <text:p text:style-name="P51"><text:span text:style-name="T26">Switch</text:span><text:span text:style-name="T27"> to Tenofov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下矢印 24" draw:style-name="gr304" draw:text-style-name="P78" draw:layer="layout" svg:width="0.599cm" svg:height="0.999cm" svg:x="5.662cm" svg:y="7.26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下矢印 25" draw:style-name="gr304" draw:text-style-name="P78" draw:layer="layout" svg:width="0.599cm" svg:height="0.999cm" svg:x="9.247cm" svg:y="7.26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下矢印 26" draw:style-name="gr304" draw:text-style-name="P78" draw:layer="layout" svg:width="0.599cm" svg:height="0.999cm" svg:x="12.847cm" svg:y="7.26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下矢印 27" draw:style-name="gr304" draw:text-style-name="P78" draw:layer="layout" svg:width="0.599cm" svg:height="0.999cm" svg:x="16.447cm" svg:y="7.26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下矢印 28" draw:style-name="gr304" draw:text-style-name="P78" draw:layer="layout" svg:width="0.599cm" svg:height="0.999cm" svg:x="20.067cm" svg:y="7.26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テキスト ボックス 29" draw:style-name="gr350" draw:text-style-name="P79" draw:layer="layout" svg:width="2.63cm" svg:height="1.183cm" svg:x="3.103cm" svg:y="7.251cm">
          <text:p text:style-name="P51"><text:span text:style-name="T146">denosum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6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nosumab投与24Mの結果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0.763cm" presentation:class="title" presentation:user-transformed="true">
          <draw:text-box>
            <text:p text:style-name="P25"><text:span text:style-name="T54">Den</text:span><text:span text:style-name="T54">osu</text:span><text:span text:style-name="T54">mab</text:span><text:span text:style-name="T55">投与</text:span><text:span text:style-name="T55">24M</text:span><text:span text:style-name="T55">の結</text:span><text:span text:style-name="T55">果</text:span></text:p>
          </draw:text-box>
        </draw:frame>
        <draw:frame draw:name="コンテンツ プレースホルダー 3" draw:style-name="gr3" draw:layer="layout" svg:width="22.859cm" svg:height="10.043cm" svg:x="1.299cm" svg:y="6.525cm">
          <table:table>
            <table:table-column table:style-name="co42"/>
            <table:table-column table:style-name="co42"/>
            <table:table-column table:style-name="co42"/>
            <table:table-column table:style-name="co42"/>
            <table:table-row table:style-name="ro28" table:default-cell-style-name="ce28">
              <table:table-cell>
                <text:p text:style-name="P25"><text:span text:style-name="T160">YAM</text:span></text:p>
              </table:table-cell>
              <table:table-cell>
                <text:p text:style-name="P25"><text:span text:style-name="T132">腰椎</text:span></text:p>
              </table:table-cell>
              <table:table-cell>
                <text:p text:style-name="P25"><text:span text:style-name="T132">右股</text:span></text:p>
              </table:table-cell>
              <table:table-cell>
                <text:p text:style-name="P25"><text:span text:style-name="T132">左股</text:span></text:p>
              </table:table-cell>
            </table:table-row>
            <table:table-row table:style-name="ro28" table:default-cell-style-name="ce12">
              <table:table-cell>
                <text:p text:style-name="P25"><text:span text:style-name="T160">0M</text:span></text:p>
              </table:table-cell>
              <table:table-cell>
                <text:p text:style-name="P25"><text:span text:style-name="T160">57%</text:span></text:p>
              </table:table-cell>
              <table:table-cell>
                <text:p text:style-name="P25"><text:span text:style-name="T160">72%</text:span></text:p>
              </table:table-cell>
              <table:table-cell>
                <text:p text:style-name="P25"><text:span text:style-name="T160">62%</text:span></text:p>
              </table:table-cell>
            </table:table-row>
            <table:table-row table:style-name="ro28" table:default-cell-style-name="ce12">
              <table:table-cell>
                <text:p text:style-name="P25"><text:span text:style-name="T161">6M</text:span></text:p>
              </table:table-cell>
              <table:table-cell>
                <text:p text:style-name="P25"><text:span text:style-name="T161">65%</text:span></text:p>
              </table:table-cell>
              <table:table-cell>
                <text:p text:style-name="P25"><text:span text:style-name="T161">76%</text:span></text:p>
              </table:table-cell>
              <table:table-cell>
                <text:p text:style-name="P25"><text:span text:style-name="T161">72%</text:span></text:p>
              </table:table-cell>
            </table:table-row>
            <table:table-row table:style-name="ro28" table:default-cell-style-name="ce12">
              <table:table-cell>
                <text:p text:style-name="P25"><text:span text:style-name="T160">12M</text:span></text:p>
              </table:table-cell>
              <table:table-cell>
                <text:p text:style-name="P25"><text:span text:style-name="T160">67%</text:span></text:p>
              </table:table-cell>
              <table:table-cell>
                <text:p text:style-name="P25"><text:span text:style-name="T160">77%</text:span></text:p>
              </table:table-cell>
              <table:table-cell>
                <text:p text:style-name="P25"><text:span text:style-name="T160">75%</text:span></text:p>
              </table:table-cell>
            </table:table-row>
            <table:table-row table:style-name="ro28" table:default-cell-style-name="ce12">
              <table:table-cell>
                <text:p text:style-name="P25"><text:span text:style-name="T160">18M</text:span></text:p>
              </table:table-cell>
              <table:table-cell>
                <text:p text:style-name="P60"><text:span text:style-name="T160">69%</text:span></text:p>
              </table:table-cell>
              <table:table-cell>
                <text:p text:style-name="P25"><text:span text:style-name="T160">77%</text:span></text:p>
              </table:table-cell>
              <table:table-cell>
                <text:p text:style-name="P25"><text:span text:style-name="T160">73%</text:span></text:p>
              </table:table-cell>
            </table:table-row>
            <table:table-row table:style-name="ro28" table:default-cell-style-name="ce12">
              <table:table-cell>
                <text:p text:style-name="P25"><text:span text:style-name="T160">24M</text:span></text:p>
              </table:table-cell>
              <table:table-cell>
                <text:p text:style-name="P25"><text:span text:style-name="T160">66%</text:span></text:p>
              </table:table-cell>
              <table:table-cell>
                <text:p text:style-name="P25"><text:span text:style-name="T160">77%</text:span></text:p>
              </table:table-cell>
              <table:table-cell>
                <text:p text:style-name="P25"><text:span text:style-name="T160">75%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6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タイトルとコンテンツ" presentation:presentation-page-layout-name="AL1T11">
        <draw:frame draw:name="コンテンツ プレースホルダー 2" presentation:style-name="pr11" draw:text-style-name="P66" draw:layer="layout" svg:width="24.802cm" svg:height="10.2cm" svg:x="0.299cm" svg:y="5.925cm" presentation:class="outline" presentation:user-transformed="true">
          <draw:text-box>
            <text:list text:style-name="L11">
              <text:list-item>
                <text:p text:style-name="P65"><text:span text:style-name="T79">Denosumab</text:span><text:span text:style-name="T80">の投与により、</text:span><text:span text:style-name="T80">24w</text:span><text:span text:style-name="T80">までは骨密</text:span><text:span text:style-name="T80">度の改善が認められた</text:span><text:span text:style-name="T80">.</text:span></text:p>
              </text:list-item>
              <text:list-item>
                <text:p text:style-name="P65"><text:span text:style-name="T80">初回投与により劇的な改善が認められた</text:span><text:span text:style-name="T80">.</text:span></text:p>
              </text:list-item>
              <text:list-item>
                <text:p text:style-name="P65"><text:span text:style-name="T80">投与開始２４</text:span><text:span text:style-name="T80">M</text:span><text:span text:style-name="T80">の経過において骨密度は維</text:span><text:span text:style-name="T80">持しているが</text:span><text:span text:style-name="T80">,</text:span><text:span text:style-name="T80">改善は乏しい</text:span><text:span text:style-name="T80">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タイトルとコンテンツ" presentation:presentation-page-layout-name="AL1T11">
        <draw:frame draw:name="Picture 7" draw:style-name="gr252" draw:text-style-name="P27" draw:layer="layout" svg:width="20.1cm" svg:height="8.79cm" svg:x="2.699cm" svg:y="0.017cm">
          <draw:image xlink:href="Pictures/1000000000000455000001E56846EB3B.png" xlink:type="simple" xlink:show="embed" xlink:actuate="onLoad" draw:mime-type="image/png">
            <text:p/>
          </draw:image>
        </draw:frame>
        <draw:custom-shape draw:name="テキスト ボックス 3" draw:style-name="gr351" draw:text-style-name="P52" draw:layer="layout" svg:width="7.92cm" svg:height="1.013cm" svg:x="16.14cm" svg:y="8.791cm">
          <text:p text:style-name="P51"><text:span text:style-name="T28">Lancet 2015;386:433-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352" draw:text-style-name="P52" draw:layer="layout" svg:width="9.699cm" svg:height="9.052cm" svg:x="2.8cm" svg:y="9.725cm">
          <text:p text:style-name="P51"><text:span text:style-name="T43">Prospective </text:span></text:p>
          <text:p text:style-name="P51"><text:span text:style-name="T43">Double-blind </text:span></text:p>
          <text:p text:style-name="P51"><text:span text:style-name="T43">placebo-controlled</text:span></text:p>
          <text:p text:style-name="P51"><text:span text:style-name="T43">Randomised</text:span></text:p>
          <text:p text:style-name="P51"><text:span text:style-name="T43">Mluticentres</text:span></text:p>
          <text:p text:style-name="P51"><text:span text:style-name="T43"><text:s text:c="14"/></text:span><text:span text:style-name="T43">in Austria and Sweden.</text:span></text:p>
          <text:p text:style-name="P51"><text:span text:style-name="T43"/></text:p>
          <text:p text:style-name="P51"><text:span text:style-name="T45">乳癌患者　</text:span><text:span text:style-name="T45">3425</text:span><text:span text:style-name="T45">人　</text:span></text:p>
          <text:p text:style-name="P51"><text:span text:style-name="T45"><text:s/></text:span><text:span text:style-name="T45">(</text:span><text:span text:style-name="T45">ホルモンレセプター陽性患者のみ</text:span><text:span text:style-name="T45">)</text:span></text:p>
          <text:p text:style-name="P51"><text:span text:style-name="T45"/></text:p>
          <text:p text:style-name="P51"><text:span text:style-name="T45">Adjuvant endocrine therapy</text:span></text:p>
          <text:p text:style-name="P51"><text:span text:style-name="T45"><text:s/></text:span><text:span text:style-name="T45">(Receiving treatment with </text:span></text:p>
          <text:p text:style-name="P51"><text:span text:style-name="T45"><text:s text:c="10"/></text:span><text:span text:style-name="T45">aromatase inhibito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52" draw:text-style-name="P27" draw:layer="layout" svg:width="12.468cm" svg:height="9.288cm" svg:x="12.816cm" svg:y="9.675cm">
          <draw:image xlink:href="Pictures/10000000000002B2000002029FD8B1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タイトルとコンテンツ" presentation:presentation-page-layout-name="AL1T11">
        <draw:frame draw:name="Picture 4" draw:style-name="gr353" draw:text-style-name="P27" draw:layer="layout" svg:width="12.778cm" svg:height="8.248cm" svg:x="5.896cm" svg:y="0.324cm">
          <draw:image xlink:href="Pictures/10000000000001E30000014736E831B5.png" xlink:type="simple" xlink:show="embed" xlink:actuate="onLoad" draw:mime-type="image/png">
            <text:p/>
          </draw:image>
        </draw:frame>
        <draw:frame draw:name="Picture 5" draw:style-name="gr354" draw:text-style-name="P27" draw:layer="layout" svg:width="12.567cm" svg:height="8.477cm" svg:x="0.048cm" svg:y="9.525cm">
          <draw:image xlink:href="Pictures/10000000000001DB00000148C508359C.png" xlink:type="simple" xlink:show="embed" xlink:actuate="onLoad" draw:mime-type="image/png">
            <text:p/>
          </draw:image>
        </draw:frame>
        <draw:frame draw:name="Picture 6" draw:style-name="gr355" draw:text-style-name="P27" draw:layer="layout" svg:width="12.725cm" svg:height="8.477cm" svg:x="12.667cm" svg:y="9.525cm">
          <draw:image xlink:href="Pictures/10000000000001E1000001564D2A096B.png" xlink:type="simple" xlink:show="embed" xlink:actuate="onLoad" draw:mime-type="image/png">
            <text:p/>
          </draw:image>
        </draw:frame>
        <draw:custom-shape draw:name="テキスト ボックス 6" draw:style-name="gr356" draw:text-style-name="P31" draw:layer="layout" svg:width="2.199cm" svg:height="0.695cm" svg:x="8.266cm" svg:y="8.475cm">
          <text:p text:style-name="P30"><text:span text:style-name="T155">12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357" draw:text-style-name="P31" draw:layer="layout" svg:width="2.199cm" svg:height="0.695cm" svg:x="11.883cm" svg:y="8.475cm">
          <text:p text:style-name="P30"><text:span text:style-name="T155">24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9" draw:style-name="gr358" draw:text-style-name="P31" draw:layer="layout" svg:width="1.817cm" svg:height="0.695cm" svg:x="15.624cm" svg:y="8.475cm">
          <text:p text:style-name="P30"><text:span text:style-name="T155">36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359" draw:text-style-name="P31" draw:layer="layout" svg:width="2.199cm" svg:height="0.695cm" svg:x="2.699cm" svg:y="17.877cm">
          <text:p text:style-name="P30"><text:span text:style-name="T155">12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1" draw:style-name="gr360" draw:text-style-name="P31" draw:layer="layout" svg:width="2.199cm" svg:height="0.695cm" svg:x="6.316cm" svg:y="17.877cm">
          <text:p text:style-name="P30"><text:span text:style-name="T155">24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361" draw:text-style-name="P31" draw:layer="layout" svg:width="1.817cm" svg:height="0.695cm" svg:x="10.057cm" svg:y="17.877cm">
          <text:p text:style-name="P30"><text:span text:style-name="T155">36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362" draw:text-style-name="P31" draw:layer="layout" svg:width="2.199cm" svg:height="0.695cm" svg:x="15.525cm" svg:y="17.887cm">
          <text:p text:style-name="P30"><text:span text:style-name="T155">12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363" draw:text-style-name="P31" draw:layer="layout" svg:width="2.199cm" svg:height="0.695cm" svg:x="19.142cm" svg:y="17.887cm">
          <text:p text:style-name="P30"><text:span text:style-name="T155">24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" draw:style-name="gr364" draw:text-style-name="P31" draw:layer="layout" svg:width="1.817cm" svg:height="0.695cm" svg:x="22.883cm" svg:y="17.887cm">
          <text:p text:style-name="P30"><text:span text:style-name="T155">36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6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タイトルとコンテンツ" presentation:presentation-page-layout-name="AL1T11">
        <draw:frame draw:name="Picture 2" draw:style-name="gr252" draw:text-style-name="P27" draw:layer="layout" svg:width="16.398cm" svg:height="10.05cm" svg:x="0.099cm" svg:y="0.074cm">
          <draw:image xlink:href="Pictures/100000000000044A000002A13C1C7B10.png" xlink:type="simple" xlink:show="embed" xlink:actuate="onLoad" draw:mime-type="image/png">
            <text:p/>
          </draw:image>
        </draw:frame>
        <draw:custom-shape draw:name="テキスト ボックス 4" draw:style-name="gr365" draw:text-style-name="P52" draw:layer="layout" svg:width="9.699cm" svg:height="5.667cm" svg:x="0.299cm" svg:y="10.998cm">
          <text:p text:style-name="P51"><text:span text:style-name="T43">Prospective </text:span></text:p>
          <text:p text:style-name="P51"><text:span text:style-name="T43">Double-blind </text:span></text:p>
          <text:p text:style-name="P51"><text:span text:style-name="T43">placebo-controlled</text:span></text:p>
          <text:p text:style-name="P51"><text:span text:style-name="T43">Randomised</text:span></text:p>
          <text:p text:style-name="P51"><text:span text:style-name="T43">Mluticentres</text:span><text:span text:style-name="T45">　</text:span><text:span text:style-name="T45">in Japan.</text:span></text:p>
          <text:p text:style-name="P51"><text:span text:style-name="T45"/></text:p>
          <text:p text:style-name="P51"><text:span text:style-name="T45">RA</text:span><text:span text:style-name="T45">患者　</text:span><text:span text:style-name="T45">350</text:span><text:span text:style-name="T45">人</text:span></text:p>
          <text:p text:style-name="P51"><text:span text:style-name="T45">関節リウマチ罹病期間　</text:span><text:span text:style-name="T45">0.5</text:span><text:span text:style-name="T45">年‐</text:span><text:span text:style-name="T45">5</text:span><text:span text:style-name="T45">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366" draw:text-style-name="P52" draw:layer="layout" svg:width="9.8cm" svg:height="0.695cm" svg:x="7.499cm" svg:y="10.02cm">
          <text:p text:style-name="P51"><text:span text:style-name="T73">Takeuchi T, et al. Ann Rheum Dis 2016;75:983–99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67" draw:text-style-name="P27" draw:layer="layout" svg:width="14.384cm" svg:height="7.99cm" svg:x="10.917cm" svg:y="10.908cm">
          <draw:image xlink:href="Pictures/100000000000031C000001D5D9E6AC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タイトルとコンテンツ" presentation:presentation-page-layout-name="AL1T11">
        <draw:frame draw:name="Picture 2" draw:style-name="gr252" draw:text-style-name="P27" draw:layer="layout" svg:width="12.397cm" svg:height="8.09cm" svg:x="0.266cm" svg:y="9.835cm">
          <draw:image xlink:href="Pictures/1000000000000237000001724EF33CCE.png" xlink:type="simple" xlink:show="embed" xlink:actuate="onLoad" draw:mime-type="image/png">
            <text:p/>
          </draw:image>
        </draw:frame>
        <draw:frame draw:name="Picture 4" draw:style-name="gr368" draw:text-style-name="P27" draw:layer="layout" svg:width="12.397cm" svg:height="8.09cm" svg:x="12.769cm" svg:y="9.835cm">
          <draw:image xlink:href="Pictures/100000000000024B0000019DA2328300.png" xlink:type="simple" xlink:show="embed" xlink:actuate="onLoad" draw:mime-type="image/png">
            <text:p/>
          </draw:image>
        </draw:frame>
        <draw:frame draw:name="Picture 7" draw:style-name="gr369" draw:text-style-name="P27" draw:layer="layout" svg:width="23.135cm" svg:height="4.039cm" svg:x="1.061cm" svg:y="0.769cm">
          <draw:image xlink:href="Pictures/10000000000004930000024FBA8AEDB7.png" xlink:type="simple" xlink:show="embed" xlink:actuate="onLoad" draw:mime-type="image/png">
            <text:p/>
          </draw:image>
        </draw:frame>
        <draw:frame draw:name="Picture 8" draw:style-name="gr370" draw:text-style-name="P27" draw:layer="layout" svg:width="23.135cm" svg:height="3.321cm" svg:x="1.061cm" svg:y="4.803cm">
          <draw:image xlink:href="Pictures/10000000000004930000024FBA8AED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ご清聴ありがとうございました。" draw:style-name="dp3" draw:master-page-name="タイトルとコンテンツ" presentation:presentation-page-layout-name="AL1T11">
        <draw:frame draw:name="タイトル 1" presentation:style-name="pr4" draw:text-style-name="P26" draw:layer="layout" svg:width="22.859cm" svg:height="3.174cm" svg:x="1.27cm" svg:y="7.55cm" presentation:class="title" presentation:user-transformed="true">
          <draw:text-box>
            <text:p text:style-name="P25"><text:span text:style-name="T22">ご清</text:span><text:span text:style-name="T22">聴あ</text:span><text:span text:style-name="T22">りが</text:span><text:span text:style-name="T22">とう</text:span><text:span text:style-name="T22">ござ</text:span><text:span text:style-name="T22">いま</text:span><text:span text:style-name="T22">した。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" svg:font-family="Century"/>
    <style:font-face style:name="IPAゴシック" svg:font-family="IPAゴシック" style:font-family-generic="swiss" style:font-pitch="variable"/>
    <style:font-face style:name="IPA明朝" svg:font-family="IPA明朝" style:font-pitch="variable"/>
    <style:font-face style:name="Liberation Mono" svg:font-family="'Liberation Mono'" style:font-adornments="標準" style:font-family-generic="modern" style:font-pitch="fixed"/>
    <style:font-face style:name="Liberation Sans" svg:font-family="'Liberation Sans'" style:font-family-generic="roman" style:font-pitch="variable"/>
    <style:font-face style:name="Nasu" svg:font-family="Nasu" style:font-pitch="variable"/>
    <style:font-face style:name="NasuM" svg:font-family="NasuM" style:font-adornments="標準" style:font-pitch="variable"/>
    <style:font-face style:name="NasuM1" svg:font-family="Nasu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URW Bookman" svg:font-family="'URW Bookman'" style:font-adornments="細字斜体" style:font-pitch="variable"/>
    <style:font-face style:name="URW Bookman1" svg:font-family="'URW Bookman'" style:font-adornments="標準" style:font-pitch="variable"/>
    <style:font-face style:name="ＭＳ Ｐ明朝" svg:font-family="'ＭＳ Ｐ明朝'"/>
  </office:font-face-decls>
  <office:styles>
    <draw:gradient draw:name="Gradient_20_11" draw:display-name="Gradient 11" draw:style="radial" draw:cx="50%" draw:cy="50%" draw:start-color="#467fc4" draw:end-color="#ffff00" draw:start-intensity="100%" draw:end-intensity="100%" draw:border="0%">
      <loext:gradient-stop svg:offset="0" loext:color-type="rgb" loext:color-value="#467fc4"/>
      <loext:gradient-stop svg:offset="0.5" loext:color-type="rgb" loext:color-value="#ffff00"/>
    </draw:gradient>
    <draw:gradient draw:name="Gradient_20_12" draw:display-name="Gradient 12" draw:style="linear" draw:start-color="#00afef" draw:end-color="#00688e" draw:start-intensity="100%" draw:end-intensity="100%" draw:angle="225deg" draw:border="0%">
      <loext:gradient-stop svg:offset="0" loext:color-type="rgb" loext:color-value="#00afef"/>
      <loext:gradient-stop svg:offset="0.5" loext:color-type="rgb" loext:color-value="#0094ca"/>
      <loext:gradient-stop svg:offset="1" loext:color-type="rgb" loext:color-value="#00688e"/>
    </draw:gradient>
    <draw:gradient draw:name="Gradient_20_13" draw:display-name="Gradient 13" draw:style="linear" draw:start-color="#478c93" draw:end-color="#78ecf8" draw:start-intensity="100%" draw:end-intensity="100%" draw:angle="180deg" draw:border="0%">
      <loext:gradient-stop svg:offset="0" loext:color-type="rgb" loext:color-value="#478c93"/>
      <loext:gradient-stop svg:offset="0.5" loext:color-type="rgb" loext:color-value="#65c7d2"/>
      <loext:gradient-stop svg:offset="1" loext:color-type="rgb" loext:color-value="#78ecf8"/>
    </draw:gradient>
    <draw:gradient draw:name="Gradient_20_14" draw:display-name="Gradient 14" draw:style="linear" draw:start-color="#970000" draw:end-color="#ff0000" draw:start-intensity="100%" draw:end-intensity="100%" draw:angle="180deg" draw:border="0%">
      <loext:gradient-stop svg:offset="0" loext:color-type="rgb" loext:color-value="#970000"/>
      <loext:gradient-stop svg:offset="0.5" loext:color-type="rgb" loext:color-value="#d60000"/>
      <loext:gradient-stop svg:offset="1" loext:color-type="rgb" loext:color-value="#ff0000"/>
    </draw:gradient>
    <draw:gradient draw:name="gradient" draw:style="radial" draw:cx="50%" draw:cy="50%" draw:start-color="#000099" draw:end-color="#5e7cc4" draw:start-intensity="100%" draw:end-intensity="100%" draw:border="9%">
      <loext:gradient-stop svg:offset="0" loext:color-type="rgb" loext:color-value="#000099"/>
      <loext:gradient-stop svg:offset="0.406593406593407" loext:color-type="rgb" loext:color-value="#2d3eaf"/>
      <loext:gradient-stop svg:offset="0.757120879120879" loext:color-type="rgb" loext:color-value="#516ec1"/>
      <loext:gradient-stop svg:offset="0.912087912087912" loext:color-type="rgb" loext:color-value="#5e7cc4"/>
    </draw:gradient>
    <draw:gradient draw:name="msFillGradient_20_1" draw:display-name="msFillGradient 1" draw:style="radial" draw:cx="50%" draw:cy="50%" draw:start-color="#000099" draw:end-color="#5e7cc4" draw:start-intensity="100%" draw:end-intensity="100%" draw:border="9%">
      <loext:gradient-stop svg:offset="0" loext:color-type="rgb" loext:color-value="#000099"/>
      <loext:gradient-stop svg:offset="0.406593406593407" loext:color-type="rgb" loext:color-value="#2d3eaf"/>
      <loext:gradient-stop svg:offset="0.757120879120879" loext:color-type="rgb" loext:color-value="#516ec1"/>
      <loext:gradient-stop svg:offset="0.912087912087912" loext:color-type="rgb" loext:color-value="#5e7cc4"/>
    </draw:gradient>
    <draw:gradient draw:name="msFillGradient_20_10" draw:display-name="msFillGradient 10" draw:style="radial" draw:cx="50%" draw:cy="50%" draw:start-color="#000099" draw:end-color="#5e7cc4" draw:start-intensity="100%" draw:end-intensity="100%" draw:border="9%">
      <loext:gradient-stop svg:offset="0" loext:color-type="rgb" loext:color-value="#000099"/>
      <loext:gradient-stop svg:offset="0.406593406593407" loext:color-type="rgb" loext:color-value="#2d3eaf"/>
      <loext:gradient-stop svg:offset="0.757120879120879" loext:color-type="rgb" loext:color-value="#516ec1"/>
      <loext:gradient-stop svg:offset="0.912087912087912" loext:color-type="rgb" loext:color-value="#5e7cc4"/>
    </draw:gradient>
    <draw:gradient draw:name="msFillGradient_20_11" draw:display-name="msFillGradient 11" draw:style="radial" draw:cx="50%" draw:cy="50%" draw:start-color="#000099" draw:end-color="#5e7cc4" draw:start-intensity="100%" draw:end-intensity="100%" draw:border="9%">
      <loext:gradient-stop svg:offset="0" loext:color-type="rgb" loext:color-value="#000099"/>
      <loext:gradient-stop svg:offset="0.406593406593407" loext:color-type="rgb" loext:color-value="#2d3eaf"/>
      <loext:gradient-stop svg:offset="0.757120879120879" loext:color-type="rgb" loext:color-value="#516ec1"/>
      <loext:gradient-stop svg:offset="0.912087912087912" loext:color-type="rgb" loext:color-value="#5e7cc4"/>
    </draw:gradient>
    <draw:gradient draw:name="msFillGradient_20_2" draw:display-name="msFillGradient 2" draw:style="radial" draw:cx="50%" draw:cy="50%" draw:start-color="#000099" draw:end-color="#5e7cc4" draw:start-intensity="100%" draw:end-intensity="100%" draw:border="9%">
      <loext:gradient-stop svg:offset="0" loext:color-type="rgb" loext:color-value="#000099"/>
      <loext:gradient-stop svg:offset="0.406593406593407" loext:color-type="rgb" loext:color-value="#2d3eaf"/>
      <loext:gradient-stop svg:offset="0.757120879120879" loext:color-type="rgb" loext:color-value="#516ec1"/>
      <loext:gradient-stop svg:offset="0.912087912087912" loext:color-type="rgb" loext:color-value="#5e7cc4"/>
    </draw:gradient>
    <draw:gradient draw:name="msFillGradient_20_3" draw:display-name="msFillGradient 3" draw:style="radial" draw:cx="50%" draw:cy="50%" draw:start-color="#000099" draw:end-color="#5e7cc4" draw:start-intensity="100%" draw:end-intensity="100%" draw:border="9%">
      <loext:gradient-stop svg:offset="0" loext:color-type="rgb" loext:color-value="#000099"/>
      <loext:gradient-stop svg:offset="0.406593406593407" loext:color-type="rgb" loext:color-value="#2d3eaf"/>
      <loext:gradient-stop svg:offset="0.757120879120879" loext:color-type="rgb" loext:color-value="#516ec1"/>
      <loext:gradient-stop svg:offset="0.912087912087912" loext:color-type="rgb" loext:color-value="#5e7cc4"/>
    </draw:gradient>
    <draw:gradient draw:name="msFillGradient_20_4" draw:display-name="msFillGradient 4" draw:style="radial" draw:cx="50%" draw:cy="50%" draw:start-color="#000099" draw:end-color="#5e7cc4" draw:start-intensity="100%" draw:end-intensity="100%" draw:border="9%">
      <loext:gradient-stop svg:offset="0" loext:color-type="rgb" loext:color-value="#000099"/>
      <loext:gradient-stop svg:offset="0.406593406593407" loext:color-type="rgb" loext:color-value="#2d3eaf"/>
      <loext:gradient-stop svg:offset="0.757120879120879" loext:color-type="rgb" loext:color-value="#516ec1"/>
      <loext:gradient-stop svg:offset="0.912087912087912" loext:color-type="rgb" loext:color-value="#5e7cc4"/>
    </draw:gradient>
    <draw:gradient draw:name="msFillGradient_20_5" draw:display-name="msFillGradient 5" draw:style="radial" draw:cx="50%" draw:cy="50%" draw:start-color="#000099" draw:end-color="#5e7cc4" draw:start-intensity="100%" draw:end-intensity="100%" draw:border="9%">
      <loext:gradient-stop svg:offset="0" loext:color-type="rgb" loext:color-value="#000099"/>
      <loext:gradient-stop svg:offset="0.406593406593407" loext:color-type="rgb" loext:color-value="#2d3eaf"/>
      <loext:gradient-stop svg:offset="0.757120879120879" loext:color-type="rgb" loext:color-value="#516ec1"/>
      <loext:gradient-stop svg:offset="0.912087912087912" loext:color-type="rgb" loext:color-value="#5e7cc4"/>
    </draw:gradient>
    <draw:gradient draw:name="msFillGradient_20_6" draw:display-name="msFillGradient 6" draw:style="radial" draw:cx="50%" draw:cy="50%" draw:start-color="#000099" draw:end-color="#5e7cc4" draw:start-intensity="100%" draw:end-intensity="100%" draw:border="9%">
      <loext:gradient-stop svg:offset="0" loext:color-type="rgb" loext:color-value="#000099"/>
      <loext:gradient-stop svg:offset="0.406593406593407" loext:color-type="rgb" loext:color-value="#2d3eaf"/>
      <loext:gradient-stop svg:offset="0.757120879120879" loext:color-type="rgb" loext:color-value="#516ec1"/>
      <loext:gradient-stop svg:offset="0.912087912087912" loext:color-type="rgb" loext:color-value="#5e7cc4"/>
    </draw:gradient>
    <draw:gradient draw:name="msFillGradient_20_7" draw:display-name="msFillGradient 7" draw:style="radial" draw:cx="50%" draw:cy="50%" draw:start-color="#000099" draw:end-color="#5e7cc4" draw:start-intensity="100%" draw:end-intensity="100%" draw:border="9%">
      <loext:gradient-stop svg:offset="0" loext:color-type="rgb" loext:color-value="#000099"/>
      <loext:gradient-stop svg:offset="0.406593406593407" loext:color-type="rgb" loext:color-value="#2d3eaf"/>
      <loext:gradient-stop svg:offset="0.757120879120879" loext:color-type="rgb" loext:color-value="#516ec1"/>
      <loext:gradient-stop svg:offset="0.912087912087912" loext:color-type="rgb" loext:color-value="#5e7cc4"/>
    </draw:gradient>
    <draw:gradient draw:name="msFillGradient_20_8" draw:display-name="msFillGradient 8" draw:style="radial" draw:cx="50%" draw:cy="50%" draw:start-color="#000099" draw:end-color="#5e7cc4" draw:start-intensity="100%" draw:end-intensity="100%" draw:border="9%">
      <loext:gradient-stop svg:offset="0" loext:color-type="rgb" loext:color-value="#000099"/>
      <loext:gradient-stop svg:offset="0.406593406593407" loext:color-type="rgb" loext:color-value="#2d3eaf"/>
      <loext:gradient-stop svg:offset="0.757120879120879" loext:color-type="rgb" loext:color-value="#516ec1"/>
      <loext:gradient-stop svg:offset="0.912087912087912" loext:color-type="rgb" loext:color-value="#5e7cc4"/>
    </draw:gradient>
    <draw:gradient draw:name="msFillGradient_20_9" draw:display-name="msFillGradient 9" draw:style="radial" draw:cx="50%" draw:cy="50%" draw:start-color="#000099" draw:end-color="#5e7cc4" draw:start-intensity="100%" draw:end-intensity="100%" draw:border="9%">
      <loext:gradient-stop svg:offset="0" loext:color-type="rgb" loext:color-value="#000099"/>
      <loext:gradient-stop svg:offset="0.406593406593407" loext:color-type="rgb" loext:color-value="#2d3eaf"/>
      <loext:gradient-stop svg:offset="0.757120879120879" loext:color-type="rgb" loext:color-value="#516ec1"/>
      <loext:gradient-stop svg:offset="0.912087912087912" loext:color-type="rgb" loext:color-value="#5e7cc4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msArrowOpenEnd_20_5_20_159" draw:display-name="msArrowOpenEnd 5 159" svg:viewBox="0 0 350 350" svg:d="M175 0l175 274-76 76-49-75v75h-101v-75l-49 75-75-76z"/>
    <draw:marker draw:name="msArrowOpenEnd_20_5_20_168" draw:display-name="msArrowOpenEnd 5 168" svg:viewBox="0 0 350 350" svg:d="M175 0l175 275-75 75-50-75v75h-100v-75l-50 75-75-75z"/>
    <draw:marker draw:name="msArrowOpenEnd_20_5_20_212" draw:display-name="msArrowOpenEnd 5 212" svg:viewBox="0 0 350 350" svg:d="M175 0l175 275-75 75-50-75v75h-100v-75l-50 75-75-75z"/>
    <draw:marker draw:name="msArrowOpenEnd_20_5_20_26" draw:display-name="msArrowOpenEnd 5 26" svg:viewBox="0 0 350 350" svg:d="M175 0l175 322-28 28-129-248v248h-37v-248l-129 248-27-28z"/>
    <draw:marker draw:name="msArrowOpenEnd_20_5_20_79" draw:display-name="msArrowOpenEnd 5 79" svg:viewBox="0 0 350 350" svg:d="M175 0l175 274-76 76-49-75v75h-101v-75l-49 75-75-76z"/>
    <draw:marker draw:name="msArrowOpenEnd_20_6_20_106" draw:display-name="msArrowOpenEnd 6 106" svg:viewBox="0 0 350 550" svg:d="M175 0l175 432-75 118-50-118v118h-100v-118l-50 118-75-118z"/>
    <draw:stroke-dash draw:name="Dash_20_Dot_20_1" draw:display-name="Dash Dot 1" draw:style="rect" draw:dots1="1" draw:dots1-length="300%" draw:distance="100%"/>
    <draw:stroke-dash draw:name="Dash_20_Dot_20_2" draw:display-name="Dash Dot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_20_Dot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.5cm" fo:margin-right="0.3cm" fo:margin-top="0.1cm" fo:margin-bottom="0.1cm" fo:line-height="100%" fo:text-indent="0.3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URW Bookman" fo:font-family="'URW Bookman'" style:font-style-name="細字斜体" style:font-pitch="variable" fo:font-size="20pt" fo:font-style="italic" fo:text-shadow="none" style:text-underline-style="none" fo:font-weight="250" style:letter-kerning="true" style:font-name-asian="URW Bookman1" style:font-family-asian="'URW Bookman'" style:font-style-name-asian="標準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table-body" style:family="table-cell" style:parent-style-name="default">
      <style:text-properties style:font-name="NasuM" fo:font-family="NasuM" style:font-style-name="標準" style:font-pitch="variable"/>
    </style:styl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table-body"/>
      <table:odd-rows table:style-name="default"/>
      <table:odd-columns table:style-name="default"/>
    </table:table-template>
    <style:style style:name="タイトル_20_スライド-background" style:display-name="タイトル スライド-background" style:family="presentation">
      <style:graphic-properties draw:stroke="none" draw:fill="gradient" draw:fill-gradient-name="msFillGradient_20_1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false" style:shrink-to-fit="true" style:writing-mode="lr-tb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32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32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タイトル_20_スライド-outline2" style:display-name="タイトル スライド-outline2" style:family="presentation" style:parent-style-name="タイトル_20_スライド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4pt" fo:letter-spacing="normal" fo:font-style="normal" style:text-underline-style="none" fo:font-weight="normal" fo:background-color="transparent" style:font-name-asian="ＭＳ Ｐ明朝" style:font-family-asian="'ＭＳ Ｐ明朝'" style:font-size-asian="24pt" style:font-style-asian="normal" style:font-weight-asian="normal" style:font-size-complex="24pt" style:font-style-complex="normal" style:font-weight-complex="normal" fo:hyphenate="false">
        <loext:char-complex-color loext:theme-type="light1" loext:color-type="theme"/>
      </style:text-properties>
    </style:style>
    <style:style style:name="タイトル_20_スライド-outline3" style:display-name="タイトル スライド-outline3" style:family="presentation" style:parent-style-name="タイトル_20_スライド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タイトル_20_スライド-outline4" style:display-name="タイトル スライド-outline4" style:family="presentation" style:parent-style-name="タイトル_20_スライド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 style:writing-mode="lr-tb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18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1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タイトルと_a_縦書きテキスト-background" style:display-name="タイトルと&#10;縦書きテキスト-background" style:family="presentation">
      <style:graphic-properties draw:stroke="none" draw:fill="gradient" draw:fill-gradient-name="msFillGradient_20_2"/>
      <style:text-properties style:letter-kerning="true"/>
    </style:style>
    <style:style style:name="タイトルと_a_縦書きテキスト-backgroundobjects" style:display-name="タイトルと&#10;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_a_縦書きテキスト-notes" style:display-name="タイトルと&#10;縦書きテキスト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_a_縦書きテキスト-outline1" style:display-name="タイトルと&#10;縦書きテキスト-outline1" style:family="presentation">
      <style:graphic-properties draw:stroke="none" draw:fill="none" draw:auto-grow-height="false" draw:fit-to-size="false" style:shrink-to-fit="true" style:writing-mode="lr-tb">
        <text:list-style style:name="タイトルと_a_縦書きテキスト-outline1" style:display-name="タイトルと&#10;縦書きテキスト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32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32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タイトルと_a_縦書きテキスト-outline2" style:display-name="タイトルと&#10;縦書きテキスト-outline2" style:family="presentation" style:parent-style-name="タイトルと_a_縦書きテキスト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4pt" fo:letter-spacing="normal" fo:font-style="normal" style:text-underline-style="none" fo:font-weight="normal" fo:background-color="transparent" style:font-name-asian="ＭＳ Ｐ明朝" style:font-family-asian="'ＭＳ Ｐ明朝'" style:font-size-asian="24pt" style:font-style-asian="normal" style:font-weight-asian="normal" style:font-size-complex="24pt" style:font-style-complex="normal" style:font-weight-complex="normal" fo:hyphenate="false">
        <loext:char-complex-color loext:theme-type="light1" loext:color-type="theme"/>
      </style:text-properties>
    </style:style>
    <style:style style:name="タイトルと_a_縦書きテキスト-outline3" style:display-name="タイトルと&#10;縦書きテキスト-outline3" style:family="presentation" style:parent-style-name="タイトルと_a_縦書きテキスト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タイトルと_a_縦書きテキスト-outline4" style:display-name="タイトルと&#10;縦書きテキスト-outline4" style:family="presentation" style:parent-style-name="タイトルと_a_縦書きテキスト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タイトルと_a_縦書きテキスト-outline5" style:display-name="タイトルと&#10;縦書きテキスト-outline5" style:family="presentation" style:parent-style-name="タイトルと_a_縦書きテキスト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と_a_縦書きテキスト-outline6" style:display-name="タイトルと&#10;縦書きテキスト-outline6" style:family="presentation" style:parent-style-name="タイトルと_a_縦書きテキスト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と_a_縦書きテキスト-outline7" style:display-name="タイトルと&#10;縦書きテキスト-outline7" style:family="presentation" style:parent-style-name="タイトルと_a_縦書きテキスト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と_a_縦書きテキスト-outline8" style:display-name="タイトルと&#10;縦書きテキスト-outline8" style:family="presentation" style:parent-style-name="タイトルと_a_縦書きテキスト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と_a_縦書きテキスト-outline9" style:display-name="タイトルと&#10;縦書きテキスト-outline9" style:family="presentation" style:parent-style-name="タイトルと_a_縦書きテキスト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と_a_縦書きテキスト-subtitle" style:display-name="タイトルと&#10;縦書きテキスト-subtitle" style:family="presentation">
      <style:graphic-properties draw:stroke="none" draw:fill="none" draw:textarea-vertical-align="middle">
        <text:list-style style:name="タイトルと_a_縦書きテキスト-subtitle" style:display-name="タイトルと&#10;縦書きテキスト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_a_縦書きテキスト-title" style:display-name="タイトルと&#10;縦書きテキスト-title" style:family="presentation">
      <style:graphic-properties draw:stroke="none" draw:fill="none" draw:textarea-vertical-align="middle" style:writing-mode="lr-tb">
        <text:list-style style:name="タイトルと_a_縦書きテキスト-title" style:display-name="タイトルと&#10;縦書きテキスト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18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1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縦書きタイトルと_a_縦書きテキスト-background" style:display-name="縦書きタイトルと&#10;縦書きテキスト-background" style:family="presentation">
      <style:graphic-properties draw:stroke="none" draw:fill="gradient" draw:fill-gradient-name="msFillGradient_20_3"/>
      <style:text-properties style:letter-kerning="true"/>
    </style:style>
    <style:style style:name="縦書きタイトルと_a_縦書きテキスト-backgroundobjects" style:display-name="縦書きタイトルと&#10;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縦書きタイトルと_a_縦書きテキスト-notes" style:display-name="縦書きタイトルと&#10;縦書きテキスト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縦書きタイトルと_a_縦書きテキスト-outline1" style:display-name="縦書きタイトルと&#10;縦書きテキスト-outline1" style:family="presentation">
      <style:graphic-properties draw:stroke="none" draw:fill="none" draw:auto-grow-height="false" draw:fit-to-size="false" style:shrink-to-fit="true" style:writing-mode="lr-tb">
        <text:list-style style:name="縦書きタイトルと_a_縦書きテキスト-outline1" style:display-name="縦書きタイトルと&#10;縦書きテキスト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32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32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縦書きタイトルと_a_縦書きテキスト-outline2" style:display-name="縦書きタイトルと&#10;縦書きテキスト-outline2" style:family="presentation" style:parent-style-name="縦書きタイトルと_a_縦書きテキスト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4pt" fo:letter-spacing="normal" fo:font-style="normal" style:text-underline-style="none" fo:font-weight="normal" fo:background-color="transparent" style:font-name-asian="ＭＳ Ｐ明朝" style:font-family-asian="'ＭＳ Ｐ明朝'" style:font-size-asian="24pt" style:font-style-asian="normal" style:font-weight-asian="normal" style:font-size-complex="24pt" style:font-style-complex="normal" style:font-weight-complex="normal" fo:hyphenate="false">
        <loext:char-complex-color loext:theme-type="light1" loext:color-type="theme"/>
      </style:text-properties>
    </style:style>
    <style:style style:name="縦書きタイトルと_a_縦書きテキスト-outline3" style:display-name="縦書きタイトルと&#10;縦書きテキスト-outline3" style:family="presentation" style:parent-style-name="縦書きタイトルと_a_縦書きテキスト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縦書きタイトルと_a_縦書きテキスト-outline4" style:display-name="縦書きタイトルと&#10;縦書きテキスト-outline4" style:family="presentation" style:parent-style-name="縦書きタイトルと_a_縦書きテキスト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縦書きタイトルと_a_縦書きテキスト-outline5" style:display-name="縦書きタイトルと&#10;縦書きテキスト-outline5" style:family="presentation" style:parent-style-name="縦書きタイトルと_a_縦書きテキスト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縦書きタイトルと_a_縦書きテキスト-outline6" style:display-name="縦書きタイトルと&#10;縦書きテキスト-outline6" style:family="presentation" style:parent-style-name="縦書きタイトルと_a_縦書きテキスト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縦書きタイトルと_a_縦書きテキスト-outline7" style:display-name="縦書きタイトルと&#10;縦書きテキスト-outline7" style:family="presentation" style:parent-style-name="縦書きタイトルと_a_縦書きテキスト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縦書きタイトルと_a_縦書きテキスト-outline8" style:display-name="縦書きタイトルと&#10;縦書きテキスト-outline8" style:family="presentation" style:parent-style-name="縦書きタイトルと_a_縦書きテキスト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縦書きタイトルと_a_縦書きテキスト-outline9" style:display-name="縦書きタイトルと&#10;縦書きテキスト-outline9" style:family="presentation" style:parent-style-name="縦書きタイトルと_a_縦書きテキスト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縦書きタイトルと_a_縦書きテキスト-subtitle" style:display-name="縦書きタイトルと&#10;縦書きテキスト-subtitle" style:family="presentation">
      <style:graphic-properties draw:stroke="none" draw:fill="none" draw:textarea-vertical-align="middle">
        <text:list-style style:name="縦書きタイトルと_a_縦書きテキスト-subtitle" style:display-name="縦書きタイトルと&#10;縦書きテキスト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縦書きタイトルと_a_縦書きテキスト-title" style:display-name="縦書きタイトルと&#10;縦書きテキスト-title" style:family="presentation">
      <style:graphic-properties draw:stroke="none" draw:fill="none" draw:textarea-vertical-align="middle" style:writing-mode="lr-tb">
        <text:list-style style:name="縦書きタイトルと_a_縦書きテキスト-title" style:display-name="縦書きタイトルと&#10;縦書きテキスト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18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1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タイトルとコンテンツ-background" style:family="presentation">
      <style:graphic-properties draw:stroke="none" draw:fill="gradient" draw:fill-gradient-name="msFillGradient_20_4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false" style:shrink-to-fit="true" style:writing-mode="lr-tb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family="IPA明朝" style:font-pitch="variable" fo:font-size="32pt" fo:letter-spacing="normal" fo:font-style="normal" fo:text-shadow="none" style:text-underline-style="none" fo:font-weight="normal" style:letter-kerning="true" fo:background-color="transparent" style:font-name-asian="IPA明朝" style:font-family-asian="IPA明朝" style:font-pitch-asian="variable" style:font-size-asian="32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タイトルとコンテンツ-outline2" style:family="presentation" style:parent-style-name="タイトルとコンテンツ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family="IPA明朝" style:font-pitch="variable" fo:font-size="24pt" fo:letter-spacing="normal" fo:font-style="normal" style:text-underline-style="none" fo:font-weight="normal" fo:background-color="transparent" style:font-name-asian="IPA明朝" style:font-family-asian="IPA明朝" style:font-pitch-asian="variable" style:font-size-asian="24pt" style:font-style-asian="normal" style:font-weight-asian="normal" style:font-size-complex="24pt" style:font-style-complex="normal" style:font-weight-complex="normal" fo:hyphenate="false">
        <loext:char-complex-color loext:theme-type="light1" loext:color-type="theme"/>
      </style:text-properties>
    </style:style>
    <style:style style:name="タイトルとコンテンツ-outline3" style:family="presentation" style:parent-style-name="タイトルとコンテンツ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family="IPA明朝" style:font-pitch="variable" fo:font-size="20pt" fo:letter-spacing="normal" fo:font-style="normal" style:text-underline-style="none" fo:font-weight="normal" fo:background-color="transparent" style:font-name-asian="IPA明朝" style:font-family-asian="IPA明朝" style:font-pitch-asian="variable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タイトルとコンテンツ-outline4" style:family="presentation" style:parent-style-name="タイトルとコンテンツ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PA明朝" fo:font-family="IPA明朝" style:font-pitch="variable" fo:font-size="20pt" fo:letter-spacing="normal" fo:font-style="normal" style:text-underline-style="none" fo:font-weight="normal" fo:background-color="transparent" style:font-name-asian="IPA明朝" style:font-family-asian="IPA明朝" style:font-pitch-asian="variable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タイトルとコンテンツ-outline5" style:family="presentation" style:parent-style-name="タイトルとコンテンツ-outline4">
      <style:paragraph-properties fo:margin-left="0cm" fo:margin-right="0cm" fo:margin-top="0.1cm" fo:margin-bottom="0cm" fo:text-indent="0cm"/>
      <style:text-properties style:font-name="IPA明朝" fo:font-family="IPA明朝" style:font-pitch="variable" fo:font-size="20pt" style:font-name-asian="IPA明朝" style:font-family-asian="IPA明朝" style:font-pitch-asian="variable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 style:writing-mode="lr-tb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d428" loext:opacity="100%" style:text-outline="false" style:text-line-through-style="none" style:text-line-through-type="none" style:text-position="0% 100%" style:font-name="IPA明朝" fo:font-family="IPA明朝" style:font-pitch="variable" fo:font-size="40pt" fo:letter-spacing="normal" fo:font-style="normal" fo:text-shadow="none" style:text-underline-style="none" fo:font-weight="bold" style:letter-kerning="true" fo:background-color="transparent" style:font-name-asian="IPA明朝" style:font-family-asian="IPA明朝" style:font-pitch-asian="variable" style:font-size-asian="40pt" style:language-asian="ja" style:country-asian="JP" style:font-style-asian="normal" style:font-weight-asian="bold" style:font-name-complex="Noto Sans Devanagari" style:font-family-complex="'Noto Sans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 fo:hyphenate="false"/>
    </style:style>
    <style:style style:name="セクション見出し-background" style:family="presentation">
      <style:graphic-properties draw:stroke="none" draw:fill="gradient" draw:fill-gradient-name="msFillGradient_20_5"/>
      <style:text-properties style:letter-kerning="true"/>
    </style:style>
    <style:style style:name="セクション見出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セクション見出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セクション見出し-outline1" style:family="presentation">
      <style:graphic-properties draw:stroke="none" draw:fill="none" draw:auto-grow-height="false" draw:fit-to-size="false" style:shrink-to-fit="true" style:writing-mode="lr-tb">
        <text:list-style style:name="セクション見出し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32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32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セクション見出し-outline2" style:family="presentation" style:parent-style-name="セクション見出し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4pt" fo:letter-spacing="normal" fo:font-style="normal" style:text-underline-style="none" fo:font-weight="normal" fo:background-color="transparent" style:font-name-asian="ＭＳ Ｐ明朝" style:font-family-asian="'ＭＳ Ｐ明朝'" style:font-size-asian="24pt" style:font-style-asian="normal" style:font-weight-asian="normal" style:font-size-complex="24pt" style:font-style-complex="normal" style:font-weight-complex="normal" fo:hyphenate="false">
        <loext:char-complex-color loext:theme-type="light1" loext:color-type="theme"/>
      </style:text-properties>
    </style:style>
    <style:style style:name="セクション見出し-outline3" style:family="presentation" style:parent-style-name="セクション見出し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セクション見出し-outline4" style:family="presentation" style:parent-style-name="セクション見出し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セクション見出し-outline5" style:family="presentation" style:parent-style-name="セクション見出し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セクション見出し-outline6" style:family="presentation" style:parent-style-name="セクション見出し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セクション見出し-outline7" style:family="presentation" style:parent-style-name="セクション見出し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セクション見出し-outline8" style:family="presentation" style:parent-style-name="セクション見出し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セクション見出し-outline9" style:family="presentation" style:parent-style-name="セクション見出し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セクション見出し-subtitle" style:family="presentation">
      <style:graphic-properties draw:stroke="none" draw:fill="none" draw:textarea-vertical-align="middle">
        <text:list-style style:name="セクション見出し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セクション見出し-title" style:family="presentation">
      <style:graphic-properties draw:stroke="none" draw:fill="none" draw:textarea-vertical-align="middle" style:writing-mode="lr-tb">
        <text:list-style style:name="セクション見出し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18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1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_32__20_つのコンテンツ-background" style:display-name="2 つのコンテンツ-background" style:family="presentation">
      <style:graphic-properties draw:stroke="none" draw:fill="gradient" draw:fill-gradient-name="msFillGradient_20_6"/>
      <style:text-properties style:letter-kerning="true"/>
    </style:style>
    <style:style style:name="_32__20_つのコンテンツ-backgroundobjects" style:display-name="2 つ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つのコンテンツ-notes" style:display-name="2 つの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つのコンテンツ-outline1" style:display-name="2 つのコンテンツ-outline1" style:family="presentation">
      <style:graphic-properties draw:stroke="none" draw:fill="none" draw:auto-grow-height="false" draw:fit-to-size="false" style:shrink-to-fit="true" style:writing-mode="lr-tb">
        <text:list-style style:name="_32__20_つのコンテンツ-outline1" style:display-name="2 つのコンテンツ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32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32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_32__20_つのコンテンツ-outline2" style:display-name="2 つのコンテンツ-outline2" style:family="presentation" style:parent-style-name="_32__20_つのコンテンツ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4pt" fo:letter-spacing="normal" fo:font-style="normal" style:text-underline-style="none" fo:font-weight="normal" fo:background-color="transparent" style:font-name-asian="ＭＳ Ｐ明朝" style:font-family-asian="'ＭＳ Ｐ明朝'" style:font-size-asian="24pt" style:font-style-asian="normal" style:font-weight-asian="normal" style:font-size-complex="24pt" style:font-style-complex="normal" style:font-weight-complex="normal" fo:hyphenate="false">
        <loext:char-complex-color loext:theme-type="light1" loext:color-type="theme"/>
      </style:text-properties>
    </style:style>
    <style:style style:name="_32__20_つのコンテンツ-outline3" style:display-name="2 つのコンテンツ-outline3" style:family="presentation" style:parent-style-name="_32__20_つのコンテンツ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_32__20_つのコンテンツ-outline4" style:display-name="2 つのコンテンツ-outline4" style:family="presentation" style:parent-style-name="_32__20_つのコンテンツ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_32__20_つのコンテンツ-outline5" style:display-name="2 つのコンテンツ-outline5" style:family="presentation" style:parent-style-name="_32__20_つのコンテンツ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20_つのコンテンツ-outline6" style:display-name="2 つのコンテンツ-outline6" style:family="presentation" style:parent-style-name="_32__20_つのコンテンツ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20_つのコンテンツ-outline7" style:display-name="2 つのコンテンツ-outline7" style:family="presentation" style:parent-style-name="_32__20_つのコンテンツ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20_つのコンテンツ-outline8" style:display-name="2 つのコンテンツ-outline8" style:family="presentation" style:parent-style-name="_32__20_つのコンテンツ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20_つのコンテンツ-outline9" style:display-name="2 つのコンテンツ-outline9" style:family="presentation" style:parent-style-name="_32__20_つのコンテンツ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20_つのコンテンツ-subtitle" style:display-name="2 つのコンテンツ-subtitle" style:family="presentation">
      <style:graphic-properties draw:stroke="none" draw:fill="none" draw:textarea-vertical-align="middle">
        <text:list-style style:name="_32__20_つのコンテンツ-subtitle" style:display-name="2 つのコンテンツ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つのコンテンツ-title" style:display-name="2 つのコンテンツ-title" style:family="presentation">
      <style:graphic-properties draw:stroke="none" draw:fill="none" draw:textarea-vertical-align="middle" style:writing-mode="lr-tb">
        <text:list-style style:name="_32__20_つのコンテンツ-title" style:display-name="2 つのコンテンツ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18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1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比較-background" style:family="presentation">
      <style:graphic-properties draw:stroke="none" draw:fill="gradient" draw:fill-gradient-name="msFillGradient_20_7"/>
      <style:text-properties style:letter-kerning="true"/>
    </style:style>
    <style:style style:name="比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比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比較-outline1" style:family="presentation">
      <style:graphic-properties draw:stroke="none" draw:fill="none" draw:auto-grow-height="false" draw:fit-to-size="false" style:shrink-to-fit="true" style:writing-mode="lr-tb">
        <text:list-style style:name="比較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32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32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比較-outline2" style:family="presentation" style:parent-style-name="比較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4pt" fo:letter-spacing="normal" fo:font-style="normal" style:text-underline-style="none" fo:font-weight="normal" fo:background-color="transparent" style:font-name-asian="ＭＳ Ｐ明朝" style:font-family-asian="'ＭＳ Ｐ明朝'" style:font-size-asian="24pt" style:font-style-asian="normal" style:font-weight-asian="normal" style:font-size-complex="24pt" style:font-style-complex="normal" style:font-weight-complex="normal" fo:hyphenate="false">
        <loext:char-complex-color loext:theme-type="light1" loext:color-type="theme"/>
      </style:text-properties>
    </style:style>
    <style:style style:name="比較-outline3" style:family="presentation" style:parent-style-name="比較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比較-outline4" style:family="presentation" style:parent-style-name="比較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比較-outline5" style:family="presentation" style:parent-style-name="比較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比較-outline6" style:family="presentation" style:parent-style-name="比較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比較-outline7" style:family="presentation" style:parent-style-name="比較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比較-outline8" style:family="presentation" style:parent-style-name="比較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比較-outline9" style:family="presentation" style:parent-style-name="比較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比較-subtitle" style:family="presentation">
      <style:graphic-properties draw:stroke="none" draw:fill="none" draw:textarea-vertical-align="middle">
        <text:list-style style:name="比較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比較-title" style:family="presentation">
      <style:graphic-properties draw:stroke="none" draw:fill="none" draw:textarea-vertical-align="middle" style:writing-mode="lr-tb">
        <text:list-style style:name="比較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18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1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タイトルのみ-background" style:family="presentation">
      <style:graphic-properties draw:stroke="none" draw:fill="gradient" draw:fill-gradient-name="msFillGradient_20_8"/>
      <style:text-properties style:letter-kerning="true"/>
    </style:style>
    <style:style style:name="タイトルの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の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のみ-outline1" style:family="presentation">
      <style:graphic-properties draw:stroke="none" draw:fill="none" draw:auto-grow-height="false" draw:fit-to-size="false" style:shrink-to-fit="true" style:writing-mode="lr-tb">
        <text:list-style style:name="タイトルのみ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32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32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タイトルのみ-outline2" style:family="presentation" style:parent-style-name="タイトルのみ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4pt" fo:letter-spacing="normal" fo:font-style="normal" style:text-underline-style="none" fo:font-weight="normal" fo:background-color="transparent" style:font-name-asian="ＭＳ Ｐ明朝" style:font-family-asian="'ＭＳ Ｐ明朝'" style:font-size-asian="24pt" style:font-style-asian="normal" style:font-weight-asian="normal" style:font-size-complex="24pt" style:font-style-complex="normal" style:font-weight-complex="normal" fo:hyphenate="false">
        <loext:char-complex-color loext:theme-type="light1" loext:color-type="theme"/>
      </style:text-properties>
    </style:style>
    <style:style style:name="タイトルのみ-outline3" style:family="presentation" style:parent-style-name="タイトルのみ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タイトルのみ-outline4" style:family="presentation" style:parent-style-name="タイトルのみ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タイトルのみ-outline5" style:family="presentation" style:parent-style-name="タイトルのみ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のみ-outline6" style:family="presentation" style:parent-style-name="タイトルのみ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のみ-outline7" style:family="presentation" style:parent-style-name="タイトルのみ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のみ-outline8" style:family="presentation" style:parent-style-name="タイトルのみ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のみ-outline9" style:family="presentation" style:parent-style-name="タイトルのみ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のみ-subtitle" style:family="presentation">
      <style:graphic-properties draw:stroke="none" draw:fill="none" draw:textarea-vertical-align="middle">
        <text:list-style style:name="タイトルのみ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のみ-title" style:family="presentation">
      <style:graphic-properties draw:stroke="none" draw:fill="none" draw:textarea-vertical-align="middle" style:writing-mode="lr-tb">
        <text:list-style style:name="タイトルのみ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18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1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白紙-background" style:family="presentation">
      <style:graphic-properties draw:stroke="none" draw:fill="gradient" draw:fill-gradient-name="msFillGradient_20_9"/>
      <style:text-properties style:letter-kerning="true"/>
    </style:style>
    <style:style style:name="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白紙-outline1" style:family="presentation">
      <style:graphic-properties draw:stroke="none" draw:fill="none" draw:auto-grow-height="false" draw:fit-to-size="false" style:shrink-to-fit="true" style:writing-mode="lr-tb">
        <text:list-style style:name="白紙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32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32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白紙-outline2" style:family="presentation" style:parent-style-name="白紙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4pt" fo:letter-spacing="normal" fo:font-style="normal" style:text-underline-style="none" fo:font-weight="normal" fo:background-color="transparent" style:font-name-asian="ＭＳ Ｐ明朝" style:font-family-asian="'ＭＳ Ｐ明朝'" style:font-size-asian="24pt" style:font-style-asian="normal" style:font-weight-asian="normal" style:font-size-complex="24pt" style:font-style-complex="normal" style:font-weight-complex="normal" fo:hyphenate="false">
        <loext:char-complex-color loext:theme-type="light1" loext:color-type="theme"/>
      </style:text-properties>
    </style:style>
    <style:style style:name="白紙-outline3" style:family="presentation" style:parent-style-name="白紙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白紙-outline4" style:family="presentation" style:parent-style-name="白紙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白紙-outline5" style:family="presentation" style:parent-style-name="白紙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白紙-outline6" style:family="presentation" style:parent-style-name="白紙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白紙-outline7" style:family="presentation" style:parent-style-name="白紙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白紙-outline8" style:family="presentation" style:parent-style-name="白紙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白紙-outline9" style:family="presentation" style:parent-style-name="白紙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白紙-subtitle" style:family="presentation">
      <style:graphic-properties draw:stroke="none" draw:fill="none" draw:textarea-vertical-align="middle">
        <text:list-style style:name="白紙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白紙-title" style:family="presentation">
      <style:graphic-properties draw:stroke="none" draw:fill="none" draw:textarea-vertical-align="middle" style:writing-mode="lr-tb">
        <text:list-style style:name="白紙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18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1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タイトル付きの_a_コンテンツ-background" style:display-name="タイトル付きの&#10;コンテンツ-background" style:family="presentation">
      <style:graphic-properties draw:stroke="none" draw:fill="gradient" draw:fill-gradient-name="msFillGradient_20_10"/>
      <style:text-properties style:letter-kerning="true"/>
    </style:style>
    <style:style style:name="タイトル付きの_a_コンテンツ-backgroundobjects" style:display-name="タイトル付きの&#10;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付きの_a_コンテンツ-notes" style:display-name="タイトル付きの&#10;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付きの_a_コンテンツ-outline1" style:display-name="タイトル付きの&#10;コンテンツ-outline1" style:family="presentation">
      <style:graphic-properties draw:stroke="none" draw:fill="none" draw:auto-grow-height="false" draw:fit-to-size="false" style:shrink-to-fit="true" style:writing-mode="lr-tb">
        <text:list-style style:name="タイトル付きの_a_コンテンツ-outline1" style:display-name="タイトル付きの&#10;コンテンツ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32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32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タイトル付きの_a_コンテンツ-outline2" style:display-name="タイトル付きの&#10;コンテンツ-outline2" style:family="presentation" style:parent-style-name="タイトル付きの_a_コンテンツ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4pt" fo:letter-spacing="normal" fo:font-style="normal" style:text-underline-style="none" fo:font-weight="normal" fo:background-color="transparent" style:font-name-asian="ＭＳ Ｐ明朝" style:font-family-asian="'ＭＳ Ｐ明朝'" style:font-size-asian="24pt" style:font-style-asian="normal" style:font-weight-asian="normal" style:font-size-complex="24pt" style:font-style-complex="normal" style:font-weight-complex="normal" fo:hyphenate="false">
        <loext:char-complex-color loext:theme-type="light1" loext:color-type="theme"/>
      </style:text-properties>
    </style:style>
    <style:style style:name="タイトル付きの_a_コンテンツ-outline3" style:display-name="タイトル付きの&#10;コンテンツ-outline3" style:family="presentation" style:parent-style-name="タイトル付きの_a_コンテンツ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タイトル付きの_a_コンテンツ-outline4" style:display-name="タイトル付きの&#10;コンテンツ-outline4" style:family="presentation" style:parent-style-name="タイトル付きの_a_コンテンツ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タイトル付きの_a_コンテンツ-outline5" style:display-name="タイトル付きの&#10;コンテンツ-outline5" style:family="presentation" style:parent-style-name="タイトル付きの_a_コンテンツ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付きの_a_コンテンツ-outline6" style:display-name="タイトル付きの&#10;コンテンツ-outline6" style:family="presentation" style:parent-style-name="タイトル付きの_a_コンテンツ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付きの_a_コンテンツ-outline7" style:display-name="タイトル付きの&#10;コンテンツ-outline7" style:family="presentation" style:parent-style-name="タイトル付きの_a_コンテンツ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付きの_a_コンテンツ-outline8" style:display-name="タイトル付きの&#10;コンテンツ-outline8" style:family="presentation" style:parent-style-name="タイトル付きの_a_コンテンツ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付きの_a_コンテンツ-outline9" style:display-name="タイトル付きの&#10;コンテンツ-outline9" style:family="presentation" style:parent-style-name="タイトル付きの_a_コンテンツ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付きの_a_コンテンツ-subtitle" style:display-name="タイトル付きの&#10;コンテンツ-subtitle" style:family="presentation">
      <style:graphic-properties draw:stroke="none" draw:fill="none" draw:textarea-vertical-align="middle">
        <text:list-style style:name="タイトル付きの_a_コンテンツ-subtitle" style:display-name="タイトル付きの&#10;コンテンツ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付きの_a_コンテンツ-title" style:display-name="タイトル付きの&#10;コンテンツ-title" style:family="presentation">
      <style:graphic-properties draw:stroke="none" draw:fill="none" draw:textarea-vertical-align="middle" style:writing-mode="lr-tb">
        <text:list-style style:name="タイトル付きの_a_コンテンツ-title" style:display-name="タイトル付きの&#10;コンテンツ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18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1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タイトル付きの図-background" style:family="presentation">
      <style:graphic-properties draw:stroke="none" draw:fill="gradient" draw:fill-gradient-name="msFillGradient_20_11"/>
      <style:text-properties style:letter-kerning="true"/>
    </style:style>
    <style:style style:name="タイトル付きの図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付きの図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付きの図-outline1" style:family="presentation">
      <style:graphic-properties draw:stroke="none" draw:fill="none" draw:auto-grow-height="false" draw:fit-to-size="false" style:shrink-to-fit="true" style:writing-mode="lr-tb">
        <text:list-style style:name="タイトル付きの図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32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32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タイトル付きの図-outline2" style:family="presentation" style:parent-style-name="タイトル付きの図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4pt" fo:letter-spacing="normal" fo:font-style="normal" style:text-underline-style="none" fo:font-weight="normal" fo:background-color="transparent" style:font-name-asian="ＭＳ Ｐ明朝" style:font-family-asian="'ＭＳ Ｐ明朝'" style:font-size-asian="24pt" style:font-style-asian="normal" style:font-weight-asian="normal" style:font-size-complex="24pt" style:font-style-complex="normal" style:font-weight-complex="normal" fo:hyphenate="false">
        <loext:char-complex-color loext:theme-type="light1" loext:color-type="theme"/>
      </style:text-properties>
    </style:style>
    <style:style style:name="タイトル付きの図-outline3" style:family="presentation" style:parent-style-name="タイトル付きの図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タイトル付きの図-outline4" style:family="presentation" style:parent-style-name="タイトル付きの図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20pt" fo:letter-spacing="normal" fo:font-style="normal" style:text-underline-style="none" fo:font-weight="normal" fo:background-color="transparent" style:font-name-asian="ＭＳ Ｐ明朝" style:font-family-asian="'ＭＳ Ｐ明朝'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タイトル付きの図-outline5" style:family="presentation" style:parent-style-name="タイトル付きの図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付きの図-outline6" style:family="presentation" style:parent-style-name="タイトル付きの図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付きの図-outline7" style:family="presentation" style:parent-style-name="タイトル付きの図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付きの図-outline8" style:family="presentation" style:parent-style-name="タイトル付きの図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付きの図-outline9" style:family="presentation" style:parent-style-name="タイトル付きの図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タイトル付きの図-subtitle" style:family="presentation">
      <style:graphic-properties draw:stroke="none" draw:fill="none" draw:textarea-vertical-align="middle">
        <text:list-style style:name="タイトル付きの図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付きの図-title" style:family="presentation">
      <style:graphic-properties draw:stroke="none" draw:fill="none" draw:textarea-vertical-align="middle" style:writing-mode="lr-tb">
        <text:list-style style:name="タイトル付きの図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family="Century" fo:font-size="18pt" fo:letter-spacing="normal" fo:font-style="normal" fo:text-shadow="none" style:text-underline-style="none" fo:font-weight="normal" style:letter-kerning="true" fo:background-color="transparent" style:font-name-asian="ＭＳ Ｐ明朝" style:font-family-asian="'ＭＳ Ｐ明朝'" style:font-size-asian="1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タイトル_20_スライド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タイトル_20_スライド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タイトルと_a_縦書きテキスト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タイトルと_a_縦書きテキスト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タイトルと_a_縦書きテキスト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タイトルと_a_縦書きテキスト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タイトルと_a_縦書きテキスト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縦書きタイトルと_a_縦書きテキスト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縦書きタイトルと_a_縦書きテキスト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縦書きタイトルと_a_縦書きテキスト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縦書きタイトルと_a_縦書きテキスト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縦書きタイトルと_a_縦書きテキスト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タイトルとコンテンツ-title">
      <style:graphic-properties svg:stroke-width="0cm" loext:fill-use-slide-background="false" draw:textarea-horizontal-align="justify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タイトルとコンテンツ-outline1">
      <style:graphic-properties svg:stroke-width="0cm" loext:fill-use-slide-background="false" draw:textarea-horizontal-align="justify" draw:textarea-vertical-align="top" draw:auto-grow-heigh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タイトルとコンテンツ-backgroundobjects">
      <style:graphic-properties draw:auto-grow-height="false" fo:min-height="11.049cm" loext:decorative="false"/>
      <style:paragraph-properties style:writing-mode="lr-tb"/>
    </style:style>
    <style:style style:name="Mpr18" style:family="presentation" style:parent-style-name="タイトルとコンテンツ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セクション見出し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セクション見出し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セクション見出し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セクション見出し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セクション見出し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_32__20_つのコンテンツ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_32__20_つの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_32__20_つの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_32__20_つのコンテンツ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_32__20_つのコンテンツ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比較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比較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比較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比較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比較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比較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タイトルのみ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タイトルのみ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タイトルのみ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タイトルのみ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白紙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白紙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白紙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タイトル付きの_a_コンテンツ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タイトル付きの_a_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タイトル付きの_a_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タイトル付きの_a_コンテンツ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タイトル付きの_a_コンテンツ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タイトル付きの図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タイトル付きの図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タイトル付きの図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タイトル付きの図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タイトル付きの図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hyphenate="false"/>
    </style:style>
    <style:style style:name="MP17" style:family="paragraph">
      <style:paragraph-properties fo:margin-left="0cm" fo:margin-right="0cm" fo:margin-top="0.226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hyphenate="false"/>
    </style:style>
    <style:style style:name="MP18" style:family="paragraph">
      <style:text-properties style:font-name="IPA明朝" fo:font-size="12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8" style:family="paragraph">
      <style:paragraph-properties fo:margin-left="0cm" fo:margin-right="0cm" fo:margin-top="0.09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44pt" fo:letter-spacing="normal" fo:font-style="normal" style:text-underline-style="none" fo:font-weight="normal" fo:background-color="transparent" style:font-name-asian="ＭＳ Ｐ明朝" style:font-size-asian="44pt" style:language-asian="ja" style:country-asian="JP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2pt" fo:letter-spacing="normal" fo:font-style="normal" style:text-underline-style="none" fo:font-weight="normal" fo:background-color="transparent" style:font-name-asian="ＭＳ Ｐ明朝" style:font-size-asian="12pt" style:language-asian="ja" style:country-asian="JP" style:font-style-asian="normal" style:font-weight-asian="normal" style:font-size-complex="12pt" style:font-style-complex="normal" style:font-weight-complex="normal">
        <loext:char-complex-color loext:theme-type="light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32pt" fo:letter-spacing="normal" fo:font-style="normal" style:text-underline-style="none" fo:font-weight="normal" fo:background-color="transparent" style:font-name-asian="ＭＳ Ｐ明朝" style:font-size-asian="32pt" style:language-asian="ja" style:country-asian="JP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8pt" fo:letter-spacing="normal" fo:font-style="normal" style:text-underline-style="none" fo:font-weight="normal" fo:background-color="transparent" style:font-name-asian="ＭＳ Ｐ明朝" style:font-size-asian="28pt" style:language-asian="ja" style:country-asian="JP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8pt" fo:letter-spacing="normal" fo:language="en" fo:country="US" fo:font-style="normal" style:text-underline-style="none" fo:font-weight="normal" fo:background-color="transparent" style:font-name-asian="ＭＳ Ｐ明朝" style:font-size-asian="28pt" style:language-asian="ja" style:country-asian="JP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4pt" fo:letter-spacing="normal" fo:language="en" fo:country="US" fo:font-style="normal" style:text-underline-style="none" fo:font-weight="normal" fo:background-color="transparent" style:font-name-asian="ＭＳ Ｐ明朝" style:font-size-asian="24pt" style:language-asian="ja" style:country-asian="JP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0pt" fo:letter-spacing="normal" fo:language="en" fo:country="US" fo:font-style="normal" style:text-underline-style="none" fo:font-weight="normal" fo:background-color="transparent" style:font-name-asian="ＭＳ Ｐ明朝" style:font-size-asian="20pt" style:language-asian="ja" style:country-asian="JP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9" style:family="text">
      <style:text-properties fo:language="en" fo:country="US"/>
    </style:style>
    <style:style style:name="MT10" style:family="text">
      <style:text-properties fo:font-size="12pt" style:font-name-asian="Liberation Mono" style:font-size-asian="12pt"/>
    </style:style>
    <style:style style:name="MT11" style:family="text">
      <style:text-properties style:font-name="IPA明朝" fo:font-size="14pt" style:font-name-asian="IPA明朝" style:font-size-asian="14pt" style:font-size-complex="14pt"/>
    </style:style>
    <style:style style:name="MT12" style:family="text">
      <style:text-properties fo:text-transform="uppercase" fo:color="#ffffff" loext:opacity="100%" style:text-outline="false" style:text-line-through-style="none" style:text-line-through-type="none" style:text-position="0% 100%" style:font-name="Century" fo:font-size="40pt" fo:letter-spacing="normal" fo:font-style="normal" style:text-underline-style="none" fo:font-weight="bold" fo:background-color="transparent" style:font-name-asian="ＭＳ Ｐ明朝" style:font-size-asian="40pt" style:language-asian="ja" style:country-asian="JP" style:font-style-asian="normal" style:font-weight-asian="bold" style:font-size-complex="40pt" style:font-style-complex="normal" style:font-weight-complex="bold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0pt" fo:letter-spacing="normal" fo:font-style="normal" style:text-underline-style="none" fo:font-weight="normal" fo:background-color="transparent" style:font-name-asian="ＭＳ Ｐ明朝" style:font-size-asian="20pt" style:language-asian="ja" style:country-asian="JP" style:font-style-asian="normal" style:font-weight-asian="normal" style:font-size-complex="20pt" style:font-style-complex="normal" style:font-weight-complex="normal">
        <loext:char-complex-color loext:theme-type="light1" loext:color-type="theme">
          <loext:transformation loext:type="tint" loext:value="7500"/>
        </loext:char-complex-color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4pt" fo:letter-spacing="normal" fo:font-style="normal" style:text-underline-style="none" fo:font-weight="normal" fo:background-color="transparent" style:font-name-asian="ＭＳ Ｐ明朝" style:font-size-asian="24pt" style:language-asian="ja" style:country-asian="JP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8pt" fo:letter-spacing="normal" fo:language="en" fo:country="US" fo:font-style="normal" style:text-underline-style="none" fo:font-weight="normal" fo:background-color="transparent" style:font-name-asian="ＭＳ Ｐ明朝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4pt" fo:letter-spacing="normal" fo:font-style="normal" style:text-underline-style="none" fo:font-weight="bold" fo:background-color="transparent" style:font-name-asian="ＭＳ Ｐ明朝" style:font-size-asian="24pt" style:language-asian="ja" style:country-asian="JP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0pt" fo:letter-spacing="normal" fo:font-style="normal" style:text-underline-style="none" fo:font-weight="normal" fo:background-color="transparent" style:font-name-asian="ＭＳ Ｐ明朝" style:font-size-asian="20pt" style:language-asian="ja" style:country-asian="JP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6pt" fo:letter-spacing="normal" fo:language="en" fo:country="US" fo:font-style="normal" style:text-underline-style="none" fo:font-weight="normal" fo:background-color="transparent" style:font-name-asian="ＭＳ Ｐ明朝" style:font-size-asian="16pt" style:language-asian="ja" style:country-asian="JP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20pt" fo:letter-spacing="normal" fo:font-style="normal" style:text-underline-style="none" fo:font-weight="bold" fo:background-color="transparent" style:font-name-asian="ＭＳ Ｐ明朝" style:font-size-asian="20pt" style:language-asian="ja" style:country-asian="JP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" fo:font-size="14pt" fo:letter-spacing="normal" fo:font-style="normal" style:text-underline-style="none" fo:font-weight="normal" fo:background-color="transparent" style:font-name-asian="ＭＳ Ｐ明朝" style:font-size-asian="14pt" style:language-asian="ja" style:country-asian="JP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タイトル_20_スライド" style:display-name="タイトル スライド" style:page-layout-name="PM1" draw:style-name="Mdp1">
      <loext:theme loext:name="Office ​​テーマ">
        <loext:theme-colors loext:name="ユーザー定義 1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ff0000"/>
          <loext:color loext:name="accent3" loext:color="#55db1f"/>
          <loext:color loext:name="accent4" loext:color="#7030a0"/>
          <loext:color loext:name="accent5" loext:color="#2dd5e7"/>
          <loext:color loext:name="accent6" loext:color="#f68d1a"/>
          <loext:color loext:name="hyperlink" loext:color="#1c21fc"/>
          <loext:color loext:name="followed-hyperlink" loext:color="#800080"/>
        </loext:theme-colors>
      </loext:theme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マス</text:span><text:span text:style-name="MT2">ター </text:span><text:span text:style-name="MT2">タイ</text:span><text:span text:style-name="MT2">トル</text:span><text:span text:style-name="MT2">の書</text:span><text:span text:style-name="MT2">式設</text:span><text:span text:style-name="MT2">定</text:span></text:p>
        </draw:text-box>
      </draw:frame>
      <draw:frame draw:name="日付プレースホルダー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タイトル_20_スライド-title" draw:layer="backgroundobjects" svg:width="19.798cm" svg:height="11.136cm" svg:x="0.6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_a_縦書きテキスト" style:display-name="タイトルと&#10;縦書きテキスト" style:page-layout-name="PM1" draw:style-name="Mdp2">
      <loext:theme loext:name="Office ​​テーマ">
        <loext:theme-colors loext:name="ユーザー定義 1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ff0000"/>
          <loext:color loext:name="accent3" loext:color="#55db1f"/>
          <loext:color loext:name="accent4" loext:color="#7030a0"/>
          <loext:color loext:name="accent5" loext:color="#2dd5e7"/>
          <loext:color loext:name="accent6" loext:color="#f68d1a"/>
          <loext:color loext:name="hyperlink" loext:color="#1c21fc"/>
          <loext:color loext:name="followed-hyperlink" loext:color="#800080"/>
        </loext:theme-colors>
      </loext:theme>
      <draw:frame draw:name="タイトル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</text:span><text:span text:style-name="MT2">ター </text:span><text:span text:style-name="MT2">タイ</text:span><text:span text:style-name="MT2">トル</text:span><text:span text:style-name="MT2">の書</text:span><text:span text:style-name="MT2">式設</text:span><text:span text:style-name="MT2">定</text:span></text:p>
        </draw:text-box>
      </draw:frame>
      <draw:frame draw:name="縦書きテキスト プレースホルダー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マス</text:span><text:span text:style-name="MT4">ター </text:span><text:span text:style-name="MT4">テキ</text:span><text:span text:style-name="MT4">スト</text:span><text:span text:style-name="MT4">の書</text:span><text:span text:style-name="MT4">式設</text:span><text:span text:style-name="MT4">定</text:span></text:p>
              <text:list>
                <text:list-item>
                  <text:p text:style-name="MP12"><text:span text:style-name="MT5">第 </text:span><text:span text:style-name="MT6">2 </text:span><text:span text:style-name="MT6">レ</text:span><text:span text:style-name="MT6">ベ</text:span><text:span text:style-name="MT6">ル</text:span></text:p>
                  <text:list>
                    <text:list-item>
                      <text:p text:style-name="MP13"><text:span text:style-name="MT7">第</text:span><text:span text:style-name="MT7"> </text:span><text:span text:style-name="MT7">3</text:span><text:span text:style-name="MT7"> </text:span><text:span text:style-name="MT7">レ</text:span><text:span text:style-name="MT7">ベ</text:span><text:span text:style-name="MT7">ル</text:span></text:p>
                      <text:list>
                        <text:list-item>
                          <text:p text:style-name="MP14"><text:span text:style-name="MT8">第</text:span><text:span text:style-name="MT8"> </text:span><text:span text:style-name="MT8">4</text:span><text:span text:style-name="MT8"> </text:span><text:span text:style-name="MT8">レ</text:span><text:span text:style-name="MT8">ベ</text:span><text:span text:style-name="MT8">ル</text:span></text:p>
                          <text:list>
                            <text:list-item>
                              <text:p text:style-name="MP14"><text:span text:style-name="MT8">第</text:span><text:span text:style-name="MT8"> </text:span><text:span text:style-name="MT8">5</text:span><text:span text:style-name="MT8"> </text:span><text:span text:style-name="MT8">レ</text:span><text:span text:style-name="MT8">ベ</text:span><text:span text:style-name="MT8">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2">
        <draw:page-thumbnail presentation:style-name="タイトルと_a_縦書きテキスト-title" draw:layer="backgroundobjects" svg:width="0.001cm" svg:height="0.001cm" svg:x="0cm" svg:y="2.257cm" presentation:class="page"/>
        <draw:frame presentation:style-name="タイトルと_a_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縦書きタイトルと_a_縦書きテキスト" style:display-name="縦書きタイトルと&#10;縦書きテキスト" style:page-layout-name="PM1" draw:style-name="Mdp3">
      <loext:theme loext:name="Office ​​テーマ">
        <loext:theme-colors loext:name="ユーザー定義 1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ff0000"/>
          <loext:color loext:name="accent3" loext:color="#55db1f"/>
          <loext:color loext:name="accent4" loext:color="#7030a0"/>
          <loext:color loext:name="accent5" loext:color="#2dd5e7"/>
          <loext:color loext:name="accent6" loext:color="#f68d1a"/>
          <loext:color loext:name="hyperlink" loext:color="#1c21fc"/>
          <loext:color loext:name="followed-hyperlink" loext:color="#800080"/>
        </loext:theme-colors>
      </loext:theme>
      <draw:frame draw:name="縦書きタイトル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マ</text:span><text:span text:style-name="MT2">ス</text:span><text:span text:style-name="MT2">タ</text:span><text:span text:style-name="MT2">ー</text:span><text:span text:style-name="MT2"> </text:span><text:span text:style-name="MT2">タ</text:span><text:span text:style-name="MT2">イ</text:span><text:span text:style-name="MT2">ト</text:span><text:span text:style-name="MT2">ル</text:span><text:span text:style-name="MT2">の</text:span><text:span text:style-name="MT2">書</text:span><text:span text:style-name="MT2">式</text:span><text:span text:style-name="MT2">設</text:span><text:span text:style-name="MT2">定</text:span></text:p>
        </draw:text-box>
      </draw:frame>
      <draw:frame draw:name="縦書きテキスト プレースホルダー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マス</text:span><text:span text:style-name="MT4">ター </text:span><text:span text:style-name="MT4">テキ</text:span><text:span text:style-name="MT4">スト</text:span><text:span text:style-name="MT4">の書</text:span><text:span text:style-name="MT4">式設</text:span><text:span text:style-name="MT4">定</text:span></text:p>
              <text:list>
                <text:list-item>
                  <text:p text:style-name="MP12"><text:span text:style-name="MT5">第 </text:span><text:span text:style-name="MT6">2 </text:span><text:span text:style-name="MT6">レ</text:span><text:span text:style-name="MT6">ベ</text:span><text:span text:style-name="MT6">ル</text:span></text:p>
                  <text:list>
                    <text:list-item>
                      <text:p text:style-name="MP13"><text:span text:style-name="MT7">第</text:span><text:span text:style-name="MT7"> </text:span><text:span text:style-name="MT7">3</text:span><text:span text:style-name="MT7"> </text:span><text:span text:style-name="MT7">レ</text:span><text:span text:style-name="MT7">ベ</text:span><text:span text:style-name="MT7">ル</text:span></text:p>
                      <text:list>
                        <text:list-item>
                          <text:p text:style-name="MP14"><text:span text:style-name="MT8">第</text:span><text:span text:style-name="MT8"> </text:span><text:span text:style-name="MT8">4</text:span><text:span text:style-name="MT8"> </text:span><text:span text:style-name="MT8">レ</text:span><text:span text:style-name="MT8">ベ</text:span><text:span text:style-name="MT8">ル</text:span></text:p>
                          <text:list>
                            <text:list-item>
                              <text:p text:style-name="MP14"><text:span text:style-name="MT8">第</text:span><text:span text:style-name="MT8"> </text:span><text:span text:style-name="MT8">5</text:span><text:span text:style-name="MT8"> </text:span><text:span text:style-name="MT8">レ</text:span><text:span text:style-name="MT8">ベ</text:span><text:span text:style-name="MT8">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2">
        <draw:page-thumbnail presentation:style-name="縦書きタイトルと_a_縦書きテキスト-title" draw:layer="backgroundobjects" svg:width="0.001cm" svg:height="0.001cm" svg:x="0cm" svg:y="2.257cm" presentation:class="page"/>
        <draw:frame presentation:style-name="縦書きタイトルと_a_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4">
      <loext:theme loext:name="Office ​​テーマ">
        <loext:theme-colors loext:name="ユーザー定義 1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ff0000"/>
          <loext:color loext:name="accent3" loext:color="#55db1f"/>
          <loext:color loext:name="accent4" loext:color="#7030a0"/>
          <loext:color loext:name="accent5" loext:color="#2dd5e7"/>
          <loext:color loext:name="accent6" loext:color="#f68d1a"/>
          <loext:color loext:name="hyperlink" loext:color="#1c21fc"/>
          <loext:color loext:name="followed-hyperlink" loext:color="#800080"/>
        </loext:theme-colors>
      </loext:theme>
      <draw:frame draw:name="タイトル 1" presentation:style-name="Mpr15" draw:text-style-name="MP16" draw:layer="backgroundobjects" svg:width="22.859cm" svg:height="3.174cm" svg:x="1.27cm" svg:y="0.763cm" presentation:class="title" presentation:user-transformed="true">
        <draw:text-box>
          <text:p text:style-name="MP5">マスター タイトルの書式設定</text:p>
        </draw:text-box>
      </draw:frame>
      <draw:frame draw:name="コンテンツ プレースホルダー 2" presentation:style-name="Mpr16" draw:text-style-name="MP17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マスター テキストの書式設定</text:p>
              <text:list>
                <text:list-item>
                  <text:p text:style-name="MP12">第 <text:span text:style-name="MT9">2 </text:span><text:span text:style-name="MT9">レベル</text:span></text:p>
                  <text:list>
                    <text:list-item>
                      <text:p text:style-name="MP13"><text:span text:style-name="MT9">第 </text:span><text:span text:style-name="MT9">3 </text:span><text:span text:style-name="MT9">レベル</text:span></text:p>
                      <text:list>
                        <text:list-item>
                          <text:p text:style-name="MP14"><text:span text:style-name="MT9">第 </text:span><text:span text:style-name="MT9">4 </text:span><text:span text:style-name="MT9">レベル</text:span></text:p>
                          <text:list>
                            <text:list-item>
                              <text:p text:style-name="MP14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17" draw:layer="backgroundobjects" svg:width="5.93cm" svg:height="1cm" svg:x="1.27cm" svg:y="17.657cm" presentation:class="date-time" presentation:user-transformed="true">
        <draw:text-box>
          <text:p><text:span text:style-name="MT10"><presentation:date-time/></text:span></text:p>
        </draw:text-box>
      </draw:frame>
      <draw:frame draw:name="フッター プレースホルダー 4" presentation:style-name="Mpr17" draw:text-style-name="MP18" draw:layer="backgroundobjects" svg:width="8.04cm" svg:height="1cm" svg:x="8.678cm" svg:y="17.657cm" presentation:class="footer" presentation:user-transformed="true">
        <draw:text-box>
          <text:p text:style-name="MP18"><text:span text:style-name="MT11"><presentation:footer/></text:span></text:p>
        </draw:text-box>
      </draw:frame>
      <draw:frame draw:name="スライド番号プレースホルダー 5" presentation:style-name="Mpr17" draw:layer="backgroundobjects" svg:width="5.93cm" svg:height="1cm" svg:x="18.203cm" svg:y="17.657cm" presentation:class="page-number" presentation:user-transformed="true">
        <draw:text-box>
          <text:p><text:span text:style-name="MT11"><text:page-number>&lt;番号&gt;</text:page-number></text:span></text:p>
        </draw:text-box>
      </draw:frame>
      <presentation:notes style:page-layout-name="PM2">
        <draw:page-thumbnail presentation:style-name="タイトルとコンテンツ-title" draw:layer="backgroundobjects" svg:width="0.001cm" svg:height="0.001cm" svg:x="0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セクション見出し" style:page-layout-name="PM1" draw:style-name="Mdp5">
      <loext:theme loext:name="Office ​​テーマ">
        <loext:theme-colors loext:name="ユーザー定義 1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ff0000"/>
          <loext:color loext:name="accent3" loext:color="#55db1f"/>
          <loext:color loext:name="accent4" loext:color="#7030a0"/>
          <loext:color loext:name="accent5" loext:color="#2dd5e7"/>
          <loext:color loext:name="accent6" loext:color="#f68d1a"/>
          <loext:color loext:name="hyperlink" loext:color="#1c21fc"/>
          <loext:color loext:name="followed-hyperlink" loext:color="#800080"/>
        </loext:theme-colors>
      </loext:theme>
      <draw:frame draw:name="タイトル 1" presentation:style-name="Mpr20" draw:text-style-name="MP20" draw:layer="backgroundobjects" svg:width="21.589cm" svg:height="3.783cm" svg:x="2.006cm" svg:y="12.241cm" presentation:class="title" presentation:user-transformed="true">
        <draw:text-box>
          <text:p text:style-name="MP19"><text:span text:style-name="MT12">マス</text:span><text:span text:style-name="MT12">ター </text:span><text:span text:style-name="MT12">タイ</text:span><text:span text:style-name="MT12">トル</text:span><text:span text:style-name="MT12">の書</text:span><text:span text:style-name="MT12">式設</text:span><text:span text:style-name="MT12">定</text:span></text:p>
        </draw:text-box>
      </draw:frame>
      <draw:frame draw:name="テキスト プレースホルダー 2" presentation:style-name="Mpr21" draw:text-style-name="MP22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21"><text:span text:style-name="MT13">マスター テキストの書式設定</text:span></text:p>
            </text:list-item>
          </text:list>
        </draw:text-box>
      </draw:frame>
      <draw:frame draw:name="日付プレースホルダー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2">
        <draw:page-thumbnail presentation:style-name="セクション見出し-title" draw:layer="backgroundobjects" svg:width="0.001cm" svg:height="0.001cm" svg:x="0cm" svg:y="2.257cm" presentation:class="page"/>
        <draw:frame presentation:style-name="セクション見出し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_32__20_つのコンテンツ" style:display-name="2 つのコンテンツ" style:page-layout-name="PM1" draw:style-name="Mdp6">
      <loext:theme loext:name="Office ​​テーマ">
        <loext:theme-colors loext:name="ユーザー定義 1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ff0000"/>
          <loext:color loext:name="accent3" loext:color="#55db1f"/>
          <loext:color loext:name="accent4" loext:color="#7030a0"/>
          <loext:color loext:name="accent5" loext:color="#2dd5e7"/>
          <loext:color loext:name="accent6" loext:color="#f68d1a"/>
          <loext:color loext:name="hyperlink" loext:color="#1c21fc"/>
          <loext:color loext:name="followed-hyperlink" loext:color="#800080"/>
        </loext:theme-colors>
      </loext:theme>
      <draw:frame draw:name="タイトル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</text:span><text:span text:style-name="MT2">ター </text:span><text:span text:style-name="MT2">タイ</text:span><text:span text:style-name="MT2">トル</text:span><text:span text:style-name="MT2">の書</text:span><text:span text:style-name="MT2">式設</text:span><text:span text:style-name="MT2">定</text:span></text:p>
        </draw:text-box>
      </draw:frame>
      <draw:frame draw:name="コンテンツ プレースホルダー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マスター テキストの書式設定</text:span></text:p>
              <text:list>
                <text:list-item>
                  <text:p text:style-name="MP13"><text:span text:style-name="MT14">第 </text:span><text:span text:style-name="MT7">2 </text:span><text:span text:style-name="MT7">レベル</text:span></text:p>
                  <text:list>
                    <text:list-item>
                      <text:p text:style-name="MP14"><text:span text:style-name="MT8">第 </text:span><text:span text:style-name="MT8">3 </text:span><text:span text:style-name="MT8">レベル</text:span></text:p>
                      <text:list>
                        <text:list-item>
                          <text:p text:style-name="MP23"><text:span text:style-name="MT15">第 </text:span><text:span text:style-name="MT15">4 </text:span><text:span text:style-name="MT15">レベル</text:span></text:p>
                          <text:list>
                            <text:list-item>
                              <text:p text:style-name="MP23"><text:span text:style-name="MT15">第 </text:span><text:span text:style-name="MT15">5 </text:span><text:span text:style-name="MT1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コンテンツ プレースホルダー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14">第 </text:span><text:span text:style-name="MT7">2 </text:span><text:span text:style-name="MT7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8">第 </text:span><text:span text:style-name="MT8">3 </text:span><text:span text:style-name="MT8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5">第 </text:span><text:span text:style-name="MT15">4 </text:span><text:span text:style-name="MT1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5">第 </text:span><text:span text:style-name="MT15">5 </text:span><text:span text:style-name="MT1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2">
        <draw:page-thumbnail presentation:style-name="_32__20_つのコンテンツ-title" draw:layer="backgroundobjects" svg:width="0.001cm" svg:height="0.001cm" svg:x="0cm" svg:y="2.257cm" presentation:class="page"/>
        <draw:frame presentation:style-name="_32__20_つ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比較" style:page-layout-name="PM1" draw:style-name="Mdp7">
      <loext:theme loext:name="Office ​​テーマ">
        <loext:theme-colors loext:name="ユーザー定義 1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ff0000"/>
          <loext:color loext:name="accent3" loext:color="#55db1f"/>
          <loext:color loext:name="accent4" loext:color="#7030a0"/>
          <loext:color loext:name="accent5" loext:color="#2dd5e7"/>
          <loext:color loext:name="accent6" loext:color="#f68d1a"/>
          <loext:color loext:name="hyperlink" loext:color="#1c21fc"/>
          <loext:color loext:name="followed-hyperlink" loext:color="#800080"/>
        </loext:theme-colors>
      </loext:theme>
      <draw:frame draw:name="タイトル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</text:span><text:span text:style-name="MT2">ター </text:span><text:span text:style-name="MT2">タイ</text:span><text:span text:style-name="MT2">トル</text:span><text:span text:style-name="MT2">の書</text:span><text:span text:style-name="MT2">式設</text:span><text:span text:style-name="MT2">定</text:span></text:p>
        </draw:text-box>
      </draw:frame>
      <draw:frame draw:name="テキスト プレースホルダー 2" presentation:style-name="Mpr31" draw:text-style-name="MP26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5"><text:span text:style-name="MT16">マスター テキストの書式設定</text:span></text:p>
            </text:list-item>
          </text:list>
        </draw:text-box>
      </draw:frame>
      <draw:frame draw:name="コンテンツ プレースホルダー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14">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17">第 </text:span><text:span text:style-name="MT8">2 </text:span><text:span text:style-name="MT8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15">第 </text:span><text:span text:style-name="MT15">3 </text:span><text:span text:style-name="MT15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8">第 </text:span><text:span text:style-name="MT18">4 </text:span><text:span text:style-name="MT18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8">第 </text:span><text:span text:style-name="MT18">5 </text:span><text:span text:style-name="MT18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ー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6">マスター テキストの書式設定</text:span></text:p>
        </draw:text-box>
      </draw:frame>
      <draw:frame draw:name="コンテンツ プレースホルダー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14">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17">第 </text:span><text:span text:style-name="MT8">2 </text:span><text:span text:style-name="MT8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15">第 </text:span><text:span text:style-name="MT15">3 </text:span><text:span text:style-name="MT15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8">第 </text:span><text:span text:style-name="MT18">4 </text:span><text:span text:style-name="MT18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8">第 </text:span><text:span text:style-name="MT18">5 </text:span><text:span text:style-name="MT18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2">
        <draw:page-thumbnail presentation:style-name="比較-title" draw:layer="backgroundobjects" svg:width="0.001cm" svg:height="0.001cm" svg:x="0cm" svg:y="2.257cm" presentation:class="page"/>
        <draw:frame presentation:style-name="比較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のみ" style:page-layout-name="PM1" draw:style-name="Mdp8">
      <loext:theme loext:name="Office ​​テーマ">
        <loext:theme-colors loext:name="ユーザー定義 1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ff0000"/>
          <loext:color loext:name="accent3" loext:color="#55db1f"/>
          <loext:color loext:name="accent4" loext:color="#7030a0"/>
          <loext:color loext:name="accent5" loext:color="#2dd5e7"/>
          <loext:color loext:name="accent6" loext:color="#f68d1a"/>
          <loext:color loext:name="hyperlink" loext:color="#1c21fc"/>
          <loext:color loext:name="followed-hyperlink" loext:color="#800080"/>
        </loext:theme-colors>
      </loext:theme>
      <draw:frame draw:name="タイトル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</text:span><text:span text:style-name="MT2">ター </text:span><text:span text:style-name="MT2">タイ</text:span><text:span text:style-name="MT2">トル</text:span><text:span text:style-name="MT2">の書</text:span><text:span text:style-name="MT2">式設</text:span><text:span text:style-name="MT2">定</text:span></text:p>
        </draw:text-box>
      </draw:frame>
      <draw:frame draw:name="日付プレースホルダー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タイトルのみ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タイトルのみ-title" draw:layer="backgroundobjects" svg:width="0.001cm" svg:height="0.001cm" svg:x="0cm" svg:y="2.257cm" presentation:class="page"/>
        <draw:frame presentation:style-name="タイトルのみ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白紙" style:page-layout-name="PM1" draw:style-name="Mdp9">
      <loext:theme loext:name="Office ​​テーマ">
        <loext:theme-colors loext:name="ユーザー定義 1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ff0000"/>
          <loext:color loext:name="accent3" loext:color="#55db1f"/>
          <loext:color loext:name="accent4" loext:color="#7030a0"/>
          <loext:color loext:name="accent5" loext:color="#2dd5e7"/>
          <loext:color loext:name="accent6" loext:color="#f68d1a"/>
          <loext:color loext:name="hyperlink" loext:color="#1c21fc"/>
          <loext:color loext:name="followed-hyperlink" loext:color="#800080"/>
        </loext:theme-colors>
      </loext:theme>
      <draw:frame draw:name="日付プレースホルダー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白紙-title" draw:layer="backgroundobjects" svg:width="22.859cm" svg:height="3.18cm" svg:x="1.27cm" svg:y="0.76cm" presentation:class="title" presentation:placeholder="true">
        <draw:text-box/>
      </draw:frame>
      <draw:frame presentation:style-name="白紙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白紙-title" draw:layer="backgroundobjects" svg:width="0.001cm" svg:height="0.001cm" svg:x="0cm" svg:y="2.257cm" presentation:class="page"/>
        <draw:frame presentation:style-name="白紙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付きの_a_コンテンツ" style:display-name="タイトル付きの&#10;コンテンツ" style:page-layout-name="PM1" draw:style-name="Mdp10">
      <loext:theme loext:name="Office ​​テーマ">
        <loext:theme-colors loext:name="ユーザー定義 1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ff0000"/>
          <loext:color loext:name="accent3" loext:color="#55db1f"/>
          <loext:color loext:name="accent4" loext:color="#7030a0"/>
          <loext:color loext:name="accent5" loext:color="#2dd5e7"/>
          <loext:color loext:name="accent6" loext:color="#f68d1a"/>
          <loext:color loext:name="hyperlink" loext:color="#1c21fc"/>
          <loext:color loext:name="followed-hyperlink" loext:color="#800080"/>
        </loext:theme-colors>
      </loext:theme>
      <draw:frame draw:name="タイトル 1" presentation:style-name="Mpr43" draw:text-style-name="MP22" draw:layer="backgroundobjects" svg:width="8.355cm" svg:height="3.227cm" svg:x="1.27cm" svg:y="0.758cm" presentation:class="title" presentation:user-transformed="true">
        <draw:text-box>
          <text:p text:style-name="MP19"><text:span text:style-name="MT19">マスター </text:span><text:span text:style-name="MT19">タイトル</text:span><text:span text:style-name="MT19">の書式設</text:span><text:span text:style-name="MT19">定</text:span></text:p>
        </draw:text-box>
      </draw:frame>
      <draw:frame draw:name="コンテンツ プレースホルダー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マスター テキストの書式設定</text:span></text:p>
              <text:list>
                <text:list-item>
                  <text:p text:style-name="MP12"><text:span text:style-name="MT5">第 </text:span><text:span text:style-name="MT6">2 </text:span><text:span text:style-name="MT6">レベル</text:span></text:p>
                  <text:list>
                    <text:list-item>
                      <text:p text:style-name="MP13"><text:span text:style-name="MT7">第 </text:span><text:span text:style-name="MT7">3 </text:span><text:span text:style-name="MT7">レベル</text:span></text:p>
                      <text:list>
                        <text:list-item>
                          <text:p text:style-name="MP14"><text:span text:style-name="MT8">第 </text:span><text:span text:style-name="MT8">4 </text:span><text:span text:style-name="MT8">レベル</text:span></text:p>
                          <text:list>
                            <text:list-item>
                              <text:p text:style-name="MP14"><text:span text:style-name="MT8">第 </text:span><text:span text:style-name="MT8">5 </text:span><text:span text:style-name="MT8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ー 3" presentation:style-name="Mpr44" draw:text-style-name="MP29" draw:layer="backgroundobjects" svg:width="8.355cm" svg:height="13.03cm" svg:x="1.27cm" svg:y="3.986cm" presentation:class="outline" presentation:user-transformed="true">
        <draw:text-box>
          <text:p text:style-name="MP28"><text:span text:style-name="MT20">マスター テキストの書式設定</text:span></text:p>
        </draw:text-box>
      </draw:frame>
      <draw:frame draw:name="日付プレースホルダー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2">
        <draw:page-thumbnail presentation:style-name="タイトル付きの_a_コンテンツ-title" draw:layer="backgroundobjects" svg:width="0.001cm" svg:height="0.001cm" svg:x="0cm" svg:y="2.257cm" presentation:class="page"/>
        <draw:frame presentation:style-name="タイトル付きの_a_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付きの図" style:page-layout-name="PM1" draw:style-name="Mdp11">
      <loext:theme loext:name="Office ​​テーマ">
        <loext:theme-colors loext:name="ユーザー定義 1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ff0000"/>
          <loext:color loext:name="accent3" loext:color="#55db1f"/>
          <loext:color loext:name="accent4" loext:color="#7030a0"/>
          <loext:color loext:name="accent5" loext:color="#2dd5e7"/>
          <loext:color loext:name="accent6" loext:color="#f68d1a"/>
          <loext:color loext:name="hyperlink" loext:color="#1c21fc"/>
          <loext:color loext:name="followed-hyperlink" loext:color="#800080"/>
        </loext:theme-colors>
      </loext:theme>
      <draw:frame draw:name="タイトル 1" presentation:style-name="Mpr48" draw:text-style-name="MP22" draw:layer="backgroundobjects" svg:width="15.239cm" svg:height="1.573cm" svg:x="4.979cm" svg:y="13.335cm" presentation:class="title" presentation:user-transformed="true">
        <draw:text-box>
          <text:p text:style-name="MP19"><text:span text:style-name="MT19">マスター </text:span><text:span text:style-name="MT19">タイトル</text:span><text:span text:style-name="MT19">の書式設</text:span><text:span text:style-name="MT19">定</text:span></text:p>
        </draw:text-box>
      </draw:frame>
      <draw:frame draw:name="図プレースホルダー 2" presentation:style-name="タイトル付きの図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テキスト プレースホルダー 3" presentation:style-name="Mpr49" draw:text-style-name="MP29" draw:layer="backgroundobjects" svg:width="15.239cm" svg:height="2.235cm" svg:x="4.979cm" svg:y="14.909cm" presentation:class="outline" presentation:user-transformed="true">
        <draw:text-box>
          <text:p text:style-name="MP28"><text:span text:style-name="MT20">マスター テキストの書式設定</text:span></text:p>
        </draw:text-box>
      </draw:frame>
      <draw:frame draw:name="日付プレースホルダー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2">
        <draw:page-thumbnail presentation:style-name="タイトル付きの図-title" draw:layer="backgroundobjects" svg:width="0.001cm" svg:height="0.001cm" svg:x="0cm" svg:y="2.257cm" presentation:class="page"/>
        <draw:frame presentation:style-name="タイトル付きの図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関節リウマチと骨粗鬆症 Denosumab の使用経験</dc:title>
    <meta:initial-creator>kurisuno</meta:initial-creator>
    <meta:editing-cycles>129</meta:editing-cycles>
    <meta:creation-date>2017-02-05T06:01:36</meta:creation-date>
    <dc:date>2024-12-02T15:04:24.931279547</dc:date>
    <meta:editing-duration>P1DT9H11M7S</meta:editing-duration>
    <meta:generator>LibreOffice/24.8.2.1$Linux_X86_64 LibreOffice_project/480$Build-1</meta:generator>
    <meta:document-statistic meta:object-count="1044"/>
    <meta:user-defined meta:name="AppVersion">14.0000</meta:user-defined>
    <meta:user-defined meta:name="HiddenSlides" meta:value-type="float">4</meta:user-defined>
    <meta:user-defined meta:name="Notes" meta:value-type="float">3</meta:user-defined>
    <meta:user-defined meta:name="PresentationFormat">画面に合わせる (4:3)</meta:user-defined>
    <meta:user-defined meta:name="Slides" meta:value-type="float">129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113P0" style:volatile="true">
      <number:number number:decimal-places="3" number:min-decimal-places="3" number:min-integer-digits="1"/>
      <number:text loext:blank-width-char=")"> </number:text>
    </number:number-style>
    <number:number-style style:name="N113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1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data-label-number="value" chart:data-label-text="false" chart:data-label-symbol="false" chart:data-label-series="false"/>
    </style:style>
    <style:style style:name="ch3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f9f9f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4" style:family="chart" style:data-style-name="N113">
      <style:chart-properties chart:display-label="true" chart:logarithmic="false" chart:minimum="0.4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ffffff" style:text-position="0% 100%" fo:font-family="Calibri" fo:font-size="12pt" fo:font-weight="bold" style:font-family-asian="'ＭＳ Ｐ明朝'" style:font-size-asian="12pt" style:font-weight-asian="bold" style:font-size-complex="12pt" style:font-weight-complex="bold"/>
    </style:style>
    <style:style style:name="ch5" style:family="chart">
      <style:graphic-properties svg:stroke-width="0.026cm" svg:stroke-color="#878787"/>
    </style:style>
    <style:style style:name="ch6" style:family="chart" style:data-style-name="N115">
      <style:chart-properties chart:symbol-type="none" chart:link-data-style-to-source="false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ff0000" draw:fill-color="#ff0000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7" style:family="chart">
      <style:chart-properties chart:solid-type="cuboid" chart:data-label-number="none" chart:data-label-text="false" chart:data-label-symbol="false" chart:data-label-series="false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635cm" svg:height="9.868cm" xlink:href="." xlink:type="simple" chart:class="chart:line" chart:style-name="ch1">
        <chart:plot-area chart:style-name="ch2" chart:data-source-has-labels="both" svg:x="0.639cm" svg:y="0.179cm" svg:width="11.465cm" svg:height="8.628cm">
          <chart:coordinate-region svg:x="2.123cm" svg:y="0.498cm" svg:width="9.981cm" svg:height="7.991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/>
            <chart:data-point chart:style-name="ch7" chart:repeated="3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ine_BM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6755555555556">
                <text:p>0.7067555555555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7844444444445">
                <text:p>0.747844444444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6911111111111">
                <text:p>0.7569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34">
                <text:p>0.7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7488888888889">
                <text:p>0.79748888888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3" number:min-decimal-places="3" number:min-integer-digits="1"/>
      <number:text loext:blank-width-char=")"> </number:text>
    </number:number-style>
    <number:number-style style:name="N113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13P0"/>
    </number:number-style>
    <number:number-style style:name="N115P0" style:volatile="true">
      <number:number number:decimal-places="1" number:min-decimal-places="1" number:min-integer-digits="1" number:grouping="true"/>
      <number:text loext:blank-width-char=")"> </number:text>
    </number:number-style>
    <number:number-style style:name="N115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115P0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4" style:family="chart" style:data-style-name="N0">
      <style:chart-properties chart:display-label="true" chart:logarithmic="false" chart:minimum="6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ffffff" style:text-position="0% 100%" fo:font-family="'ＭＳ Ｐ明朝'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>
      <style:graphic-properties svg:stroke-width="0.026cm" svg:stroke-color="#878787"/>
    </style:style>
    <style:style style:name="ch6" style:family="chart" style:data-style-name="N113">
      <style:chart-properties chart:symbol-type="none" chart:link-data-style-to-source="true" chart:label-position="right" loext:custom-leader-lines="false">
        <chart:label-separator>
          <text:p>; </text:p>
        </chart:label-separator>
      </style:chart-properties>
      <style:graphic-properties svg:stroke-width="0.079cm" svg:stroke-color="#fabb76" draw:fill-color="#fabb76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7" style:family="chart" style:data-style-name="N115">
      <style:chart-properties chart:symbol-type="none" chart:link-data-style-to-source="false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ff6666" draw:fill-color="#ff6666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8" style:family="chart">
      <style:chart-properties chart:solid-type="cuboid" chart:data-label-number="none" chart:data-label-text="false" chart:data-label-symbol="false" chart:data-label-series="false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979cm" svg:height="7cm" xlink:href="." xlink:type="simple" chart:class="chart:line" chart:style-name="ch1">
        <chart:plot-area chart:style-name="ch2" chart:data-source-has-labels="both" svg:x="-0.313cm" svg:y="-0.04cm" svg:width="10.155cm" svg:height="6.925cm">
          <chart:coordinate-region svg:x="0.347cm" svg:y="0.212cm" svg:width="9.495cm" svg:height="6.079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series chart:style-name="ch7" chart:values-cell-range-address="local-table.$C$2:.$C$6" chart:label-cell-address="local-table.$C$1" chart:class="chart:line">
            <chart:data-point/>
            <chart:data-point chart:style-name="ch8" chart:repeated="3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_neck</text:p>
              </table:table-cell>
              <table:table-cell office:value-type="string">
                <text:p>L_hi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61.5227272727273">
                <text:p>61.5227272727273</text:p>
              </table:table-cell>
              <table:table-cell office:value-type="float" office:value="68.4772727272727">
                <text:p>68.47727272727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2.8409090909091">
                <text:p>62.8409090909091</text:p>
              </table:table-cell>
              <table:table-cell office:value-type="float" office:value="71.1363636363636">
                <text:p>71.13636363636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2.5113636363636">
                <text:p>62.5113636363636</text:p>
              </table:table-cell>
              <table:table-cell office:value-type="float" office:value="72.625">
                <text:p>72.6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3.8409090909091">
                <text:p>63.8409090909091</text:p>
              </table:table-cell>
              <table:table-cell office:value-type="float" office:value="72.9545454545455">
                <text:p>72.95454545454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3.9545454545455">
                <text:p>63.9545454545455</text:p>
              </table:table-cell>
              <table:table-cell office:value-type="float" office:value="72.953488372093">
                <text:p>72.9534883720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1" number:min-decimal-places="1" number:min-integer-digits="1" number:grouping="true"/>
      <number:text loext:blank-width-char=")"> </number:text>
    </number:number-style>
    <number:number-style style:name="N113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113P0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4" style:family="chart" style:data-style-name="N0">
      <style:chart-properties chart:display-label="true" chart:logarithmic="false" chart:minimum="60" chart:maximum="80" chart:interval-major="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one" chart:link-data-style-to-source="true" chart:label-position="right" loext:custom-leader-lines="false">
        <chart:label-separator>
          <text:p>; </text:p>
        </chart:label-separator>
      </style:chart-properties>
      <style:graphic-properties svg:stroke-width="0.079cm" svg:stroke-color="#81e6f1" draw:fill-color="#81e6f1" fo:wrap-option="wrap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7" style:family="chart" style:data-style-name="N113">
      <style:chart-properties chart:symbol-type="none" chart:link-data-style-to-source="false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ffffff" draw:fill-color="#ffffff" fo:wrap-option="wrap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8" style:family="chart" style:data-style-name="N0">
      <style:chart-properties chart:symbol-type="none" chart:link-data-style-to-source="true" chart:label-position="right" loext:custom-leader-lines="false">
        <chart:label-separator>
          <text:p>; </text:p>
        </chart:label-separator>
      </style:chart-properties>
      <style:graphic-properties svg:stroke-width="0.079cm" svg:stroke-color="#98ec76" draw:fill-color="#98ec76" fo:wrap-option="wrap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446cm" svg:height="9.317cm" xlink:href="." xlink:type="simple" chart:class="chart:line" chart:style-name="ch1">
        <chart:plot-area chart:style-name="ch2" chart:data-source-has-labels="both" svg:x="-0.314cm" svg:y="-0.03cm" svg:width="10.427cm" svg:height="9.357cm">
          <chart:coordinate-region svg:x="0.332cm" svg:y="0.143cm" svg:width="9.781cm" svg:height="8.59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series chart:style-name="ch7" chart:values-cell-range-address="local-table.$C$2:.$C$6" chart:label-cell-address="local-table.$C$1" chart:class="chart:line">
            <chart:data-point chart:repeated="5"/>
          </chart:series>
          <chart:series chart:style-name="ch8" chart:values-cell-range-address="local-table.$D$2:.$D$6" chart:label-cell-address="local-table.$D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_neck</text:p>
              </table:table-cell>
              <table:table-cell office:value-type="string">
                <text:p>R_toro</text:p>
              </table:table-cell>
              <table:table-cell office:value-type="string">
                <text:p>R_hi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62.6511627906977">
                <text:p>62.6511627906977</text:p>
              </table:table-cell>
              <table:table-cell office:value-type="float" office:value="67.1627906976744">
                <text:p>67.1627906976744</text:p>
              </table:table-cell>
              <table:table-cell office:value-type="float" office:value="68.6744186046512">
                <text:p>68.67441860465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3.9761904761905">
                <text:p>63.9761904761905</text:p>
              </table:table-cell>
              <table:table-cell office:value-type="float" office:value="70.7142857142857">
                <text:p>70.7142857142857</text:p>
              </table:table-cell>
              <table:table-cell office:value-type="float" office:value="71.5581395348837">
                <text:p>71.55813953488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4.5697674418605">
                <text:p>64.5697674418605</text:p>
              </table:table-cell>
              <table:table-cell office:value-type="float" office:value="71.2906976744186">
                <text:p>71.2906976744186</text:p>
              </table:table-cell>
              <table:table-cell office:value-type="float" office:value="71.6627906976744">
                <text:p>71.66279069767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6.5348837209302">
                <text:p>66.5348837209302</text:p>
              </table:table-cell>
              <table:table-cell office:value-type="float" office:value="70.953488372093">
                <text:p>70.953488372093</text:p>
              </table:table-cell>
              <table:table-cell office:value-type="float" office:value="71.5581395348837">
                <text:p>71.55813953488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7.3023255813954">
                <text:p>67.3023255813954</text:p>
              </table:table-cell>
              <table:table-cell office:value-type="float" office:value="69.8372093023256">
                <text:p>69.8372093023256</text:p>
              </table:table-cell>
              <table:table-cell office:value-type="float" office:value="70.9302325581395">
                <text:p>70.93023255813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3" number:min-decimal-places="3" number:min-integer-digits="1"/>
      <number:text loext:blank-width-char=")"> </number:text>
    </number:number-style>
    <number:number-style style:name="N113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13P0"/>
    </number:number-style>
    <number:number-style style:name="N115P0" style:volatile="true">
      <number:number number:decimal-places="1" number:min-decimal-places="1" number:min-integer-digits="1" number:grouping="true"/>
      <number:text loext:blank-width-char=")"> </number:text>
    </number:number-style>
    <number:number-style style:name="N115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115P0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ffffff" style:text-position="0% 100%" fo:font-family="Calibri" fo:font-size="10pt" fo:font-weight="bold" style:font-family-asian="'ＭＳ Ｐ明朝'" style:font-size-asian="10pt" style:font-weight-asian="bold" style:font-size-complex="10pt" style:font-weight-complex="bold"/>
    </style:style>
    <style:style style:name="ch4" style:family="chart" style:data-style-name="N0">
      <style:chart-properties chart:display-label="true" chart:logarithmic="false" chart:minimum="60" chart:maximum="80" chart:interval-major="5" chart:interval-minor-divisor="13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ffffff" style:text-position="0% 100%" fo:font-family="'ＭＳ Ｐ明朝'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>
      <style:graphic-properties svg:stroke-width="0.026cm" svg:stroke-color="#878787"/>
    </style:style>
    <style:style style:name="ch6" style:family="chart" style:data-style-name="N113">
      <style:chart-properties chart:symbol-type="none" chart:link-data-style-to-source="true" chart:label-position="right" loext:custom-leader-lines="false">
        <chart:label-separator>
          <text:p>; </text:p>
        </chart:label-separator>
      </style:chart-properties>
      <style:graphic-properties svg:stroke-width="0.079cm" svg:stroke-color="#fabb76" draw:fill-color="#fabb76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7" style:family="chart" style:data-style-name="N115">
      <style:chart-properties chart:symbol-type="none" chart:link-data-style-to-source="false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ffffff" draw:fill-color="#ffffff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8" style:family="chart" style:data-style-name="N113">
      <style:chart-properties chart:symbol-type="none" chart:link-data-style-to-source="true" chart:label-position="right" loext:custom-leader-lines="false">
        <chart:label-separator>
          <text:p>; </text:p>
        </chart:label-separator>
      </style:chart-properties>
      <style:graphic-properties svg:stroke-width="0.079cm" svg:stroke-color="#ff6666" draw:fill-color="#ff6666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446cm" svg:height="9.317cm" xlink:href="." xlink:type="simple" chart:class="chart:line" chart:style-name="ch1">
        <chart:plot-area chart:style-name="ch2" chart:data-source-has-labels="both" svg:x="-0.328cm" svg:y="-0.109cm" svg:width="10.441cm" svg:height="9.595cm">
          <chart:coordinate-region svg:x="0.332cm" svg:y="0.143cm" svg:width="9.781cm" svg:height="8.59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series chart:style-name="ch7" chart:values-cell-range-address="local-table.$C$2:.$C$6" chart:label-cell-address="local-table.$C$1" chart:class="chart:line">
            <chart:data-point chart:repeated="5"/>
          </chart:series>
          <chart:series chart:style-name="ch8" chart:values-cell-range-address="local-table.$D$2:.$D$6" chart:label-cell-address="local-table.$D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_neck</text:p>
              </table:table-cell>
              <table:table-cell office:value-type="string">
                <text:p>L_toro</text:p>
              </table:table-cell>
              <table:table-cell office:value-type="string">
                <text:p>L_hi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61.5227272727273">
                <text:p>61.5227272727273</text:p>
              </table:table-cell>
              <table:table-cell office:value-type="float" office:value="67.0909090909091">
                <text:p>67.0909090909091</text:p>
              </table:table-cell>
              <table:table-cell office:value-type="float" office:value="68.4772727272727">
                <text:p>68.47727272727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2.8409090909091">
                <text:p>62.8409090909091</text:p>
              </table:table-cell>
              <table:table-cell office:value-type="float" office:value="70.4090909090909">
                <text:p>70.4090909090909</text:p>
              </table:table-cell>
              <table:table-cell office:value-type="float" office:value="71.1363636363636">
                <text:p>71.13636363636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2.5113636363636">
                <text:p>62.5113636363636</text:p>
              </table:table-cell>
              <table:table-cell office:value-type="float" office:value="73.3636363636364">
                <text:p>73.3636363636364</text:p>
              </table:table-cell>
              <table:table-cell office:value-type="float" office:value="72.625">
                <text:p>72.6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3.8409090909091">
                <text:p>63.8409090909091</text:p>
              </table:table-cell>
              <table:table-cell office:value-type="float" office:value="74.2954545454546">
                <text:p>74.2954545454546</text:p>
              </table:table-cell>
              <table:table-cell office:value-type="float" office:value="72.9545454545455">
                <text:p>72.95454545454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3.9545454545455">
                <text:p>63.9545454545455</text:p>
              </table:table-cell>
              <table:table-cell office:value-type="float" office:value="73.1363636363636">
                <text:p>73.1363636363636</text:p>
              </table:table-cell>
              <table:table-cell office:value-type="float" office:value="72.953488372093">
                <text:p>72.95348837209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1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error-category="cell-range" chart:error-upper-range="local-table.$B$2:.$B$6" chart:error-lower-range="local-table.$B$2:.$B$6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9f9f9"/>
      <style:text-properties fo:color="#ffffff" style:text-position="0% 100%" fo:font-family="Century" fo:font-size="10.5pt" fo:font-weight="bold" style:font-family-asian="'ＭＳ Ｐ明朝'" style:font-size-asian="10.5pt" style:font-weight-asian="bold" style:font-size-complex="10.5pt" style:font-weight-complex="bold"/>
    </style:style>
    <style:style style:name="ch5" style:family="chart" style:data-style-name="N113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f9f9f9"/>
      <style:text-properties fo:color="#ffffff" style:text-position="0% 100%" fo:font-family="Century" fo:font-size="10.5pt" fo:font-weight="bold" style:font-family-asian="'ＭＳ Ｐ明朝'" style:font-size-asian="10.5pt" style:font-weight-asian="bold" style:font-size-complex="10.5pt" style:font-weight-complex="bold"/>
    </style:style>
    <style:style style:name="ch6" style:family="chart">
      <style:graphic-properties svg:stroke-width="0.026cm" svg:stroke-color="#f9f9f9"/>
    </style:style>
    <style:style style:name="ch7" style:family="chart" style:data-style-name="N115">
      <style:chart-properties chart:symbol-type="none" chart:link-data-style-to-source="false" chart:error-category="cell-range" chart:error-upper-range="local-table.$B$2:.$B$6" chart:error-lower-range="local-table.$B$2:.$B$6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ffff00" draw:fill-color="#ffff00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6" chart:error-lower-range="local-table.$D$2:.$D$6" loext:std-weight="1"/>
      <style:graphic-properties draw:stroke="solid" svg:stroke-width="0.026cm" svg:stroke-color="#f9f9f9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  <style:style style:name="T1" style:family="text">
      <style:text-properties fo:color="#ffffff" style:text-position="0% 100%" fo:font-family="Century" fo:font-size="18pt" fo:font-weight="bold" style:font-family-asian="'ＭＳ Ｐ明朝'" style:font-size-asian="18pt" style:font-weight-asian="bold" style:font-size-complex="18pt" style:font-weight-complex="bold"/>
    </style:style>
  </office:automatic-styles>
  <office:body>
    <office:chart>
      <chart:chart svg:width="12.7cm" svg:height="11.156cm" xlink:href="." xlink:type="simple" chart:class="chart:line" chart:style-name="ch1">
        <chart:title svg:x="5.348cm" svg:y="0.359cm" chart:style-name="ch2">
          <text:p><text:span text:style-name="T1">PINP</text:span></text:p>
        </chart:title>
        <chart:plot-area chart:style-name="ch3" chart:data-source-has-labels="both" svg:x="0.254cm" svg:y="1.599cm" svg:width="12.192cm" svg:height="9.334cm">
          <chart:coordinate-region svg:x="1.037cm" svg:y="1.785cm" svg:width="11.409cm" svg:height="8.52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error-indicator chart:style-name="ch8" chart:dimension="y"/>
            <chart:data-point/>
            <chart:data-point chart:style-name="ch9" loext:custom-label-pos-x="-0.0166666666666667" loext:custom-label-pos-y="-0.0379451930984566"/>
            <chart:data-point chart:style-name="ch9" loext:custom-label-pos-x="-0.0166666666666667" loext:custom-label-pos-y="0.0221346959740997"/>
            <chart:data-point chart:style-name="ch9" loext:custom-label-pos-x="-0.0166666666666666" loext:custom-label-pos-y="-0.0284588948238424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P</text:p>
              </table:table-cell>
              <table:table-cell office:value-type="string">
                <text:p>系列2</text:p>
              </table:table-cell>
              <table:table-cell office:value-type="string">
                <text:p>系列3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70.8644444444445">
                <text:p>70.8644444444445</text:p>
              </table:table-cell>
              <table:table-cell office:value-type="float" office:value="35.2858999573834">
                <text:p>35.2858999573834</text:p>
              </table:table-cell>
              <table:table-cell office:value-type="float" office:value="35.2858999573834">
                <text:p>35.28589995738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.1766666666667">
                <text:p>24.1766666666667</text:p>
              </table:table-cell>
              <table:table-cell office:value-type="float" office:value="17.5566562242865">
                <text:p>17.5566562242865</text:p>
              </table:table-cell>
              <table:table-cell office:value-type="float" office:value="17.5566562242865">
                <text:p>17.55665622428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.1844444444444">
                <text:p>23.1844444444444</text:p>
              </table:table-cell>
              <table:table-cell office:value-type="float" office:value="12.923277113721">
                <text:p>12.923277113721</text:p>
              </table:table-cell>
              <table:table-cell office:value-type="float" office:value="12.923277113721">
                <text:p>12.92327711372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8.5933333333333">
                <text:p>28.5933333333333</text:p>
              </table:table-cell>
              <table:table-cell office:value-type="float" office:value="19.3498366343951">
                <text:p>19.3498366343951</text:p>
              </table:table-cell>
              <table:table-cell office:value-type="float" office:value="19.3498366343951">
                <text:p>19.349836634395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.0644444444444">
                <text:p>24.0644444444444</text:p>
              </table:table-cell>
              <table:table-cell office:value-type="float" office:value="11.8095847241986">
                <text:p>11.8095847241986</text:p>
              </table:table-cell>
              <table:table-cell office:value-type="float" office:value="11.8095847241986">
                <text:p>11.809584724198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1" number:min-decimal-places="1" number:min-integer-digits="1" number:grouping="true"/>
      <number:text loext:blank-width-char=")"> </number:text>
    </number:number-style>
    <number:number-style style:name="N115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115P0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error-category="cell-range" chart:error-upper-range="local-table.$B$2:.$B$6" chart:error-lower-range="local-table.$B$2:.$B$6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9f9f9"/>
      <style:text-properties fo:color="#ffffff" style:text-position="0% 100%" fo:font-family="Century" fo:font-size="10.5pt" fo:font-weight="bold" style:font-family-asian="'ＭＳ Ｐ明朝'" style:font-size-asian="10.5pt" style:font-weight-asian="bold" style:font-size-complex="10.5pt" style:font-weight-complex="bold"/>
    </style:style>
    <style:style style:name="ch5" style:family="chart" style:data-style-name="N113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f9f9f9"/>
      <style:text-properties fo:color="#ffffff" style:text-position="0% 100%" fo:font-family="Century" fo:font-size="10.5pt" fo:font-weight="bold" style:font-family-asian="'ＭＳ Ｐ明朝'" style:font-size-asian="10.5pt" style:font-weight-asian="bold" style:font-size-complex="10.5pt" style:font-weight-complex="bold"/>
    </style:style>
    <style:style style:name="ch6" style:family="chart">
      <style:graphic-properties svg:stroke-width="0.026cm" svg:stroke-color="#f9f9f9"/>
    </style:style>
    <style:style style:name="ch7" style:family="chart" style:data-style-name="N115">
      <style:chart-properties chart:symbol-type="none" chart:link-data-style-to-source="false" chart:error-category="cell-range" chart:error-upper-range="local-table.$B$2:.$B$6" chart:error-lower-range="local-table.$B$2:.$B$6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ff0000" draw:fill-color="#ff0000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6" chart:error-lower-range="local-table.$D$2:.$D$6" loext:std-weight="1"/>
      <style:graphic-properties draw:stroke="solid" svg:stroke-width="0.026cm" svg:stroke-color="#f9f9f9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  <style:style style:name="T1" style:family="text">
      <style:text-properties fo:color="#ffffff" style:text-position="0% 100%" fo:font-family="Century" fo:font-size="18pt" fo:font-weight="bold" style:font-family-asian="'ＭＳ Ｐ明朝'" style:font-size-asian="18pt" style:font-weight-asian="bold" style:font-size-complex="18pt" style:font-weight-complex="bold"/>
    </style:style>
  </office:automatic-styles>
  <office:body>
    <office:chart>
      <chart:chart svg:width="12.7cm" svg:height="11.156cm" xlink:href="." xlink:type="simple" chart:class="chart:line" chart:style-name="ch1">
        <chart:title svg:x="5.019cm" svg:y="0.359cm" chart:style-name="ch2">
          <text:p><text:span text:style-name="T1">TRACP</text:span></text:p>
        </chart:title>
        <chart:plot-area chart:style-name="ch3" chart:data-source-has-labels="both" svg:x="0.254cm" svg:y="1.599cm" svg:width="12.192cm" svg:height="9.334cm">
          <chart:coordinate-region svg:x="1.249cm" svg:y="1.785cm" svg:width="11.197cm" svg:height="8.52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error-indicator chart:style-name="ch8" chart:dimension="y"/>
            <chart:data-point/>
            <chart:data-point chart:style-name="ch9" loext:custom-label-pos-x="-0.0194444444444444" loext:custom-label-pos-y="0.0221346959740997"/>
            <chart:data-point chart:style-name="ch9" loext:custom-label-pos-x="-0.0194444444444444" loext:custom-label-pos-y="0.0158104971243568"/>
            <chart:data-point chart:style-name="ch9" loext:custom-label-pos-x="-0.0194444444444443" loext:custom-label-pos-y="0.0474314913730707"/>
            <chart:data-point chart:style-name="ch9" loext:custom-label-pos-x="-0.00277777777777778" loext:custom-label-pos-y="-0.01264839769948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CP</text:p>
              </table:table-cell>
              <table:table-cell office:value-type="string">
                <text:p>系列2</text:p>
              </table:table-cell>
              <table:table-cell office:value-type="string">
                <text:p>系列3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368.511111111111">
                <text:p>368.511111111111</text:p>
              </table:table-cell>
              <table:table-cell office:value-type="float" office:value="147.845808901966">
                <text:p>147.845808901966</text:p>
              </table:table-cell>
              <table:table-cell office:value-type="float" office:value="147.845808901966">
                <text:p>147.8458089019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8.022222222222">
                <text:p>198.022222222222</text:p>
              </table:table-cell>
              <table:table-cell office:value-type="float" office:value="125.700435584658">
                <text:p>125.700435584658</text:p>
              </table:table-cell>
              <table:table-cell office:value-type="float" office:value="125.700435584658">
                <text:p>125.7004355846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3.311111111111">
                <text:p>193.311111111111</text:p>
              </table:table-cell>
              <table:table-cell office:value-type="float" office:value="123.741275287903">
                <text:p>123.741275287903</text:p>
              </table:table-cell>
              <table:table-cell office:value-type="float" office:value="123.741275287903">
                <text:p>123.7412752879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6.377777777778">
                <text:p>216.377777777778</text:p>
              </table:table-cell>
              <table:table-cell office:value-type="float" office:value="102.751542597534">
                <text:p>102.751542597534</text:p>
              </table:table-cell>
              <table:table-cell office:value-type="float" office:value="102.751542597534">
                <text:p>102.75154259753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09.955555555556">
                <text:p>209.955555555556</text:p>
              </table:table-cell>
              <table:table-cell office:value-type="float" office:value="119.285829568321">
                <text:p>119.285829568321</text:p>
              </table:table-cell>
              <table:table-cell office:value-type="float" office:value="119.285829568321">
                <text:p>119.28582956832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5" number:min-decimal-places="5" number:min-integer-digits="1"/>
      <number:text loext:blank-width-char=")"> </number:text>
    </number:number-style>
    <number:number-style style:name="N115">
      <style:text-properties fo:color="#ff0000"/>
      <number:text>(</number:text>
      <number:number number:decimal-places="5" number:min-decimal-places="5" number:min-integer-digits="1"/>
      <number:text>)</number:text>
      <style:map style:condition="value()&gt;=0" style:apply-style-name="N115P0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9f9f9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 style:data-style-name="N113">
      <style:chart-properties chart:display-label="true" chart:logarithmic="false" chart:minimum="0" chart:maximum="4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f9f9f9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f9f9f9"/>
    </style:style>
    <style:style style:name="ch7" style:family="chart" style:data-style-name="N11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 fo:wrap-option="wrap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  <style:style style:name="T1" style:family="text">
      <style:text-properties fo:color="#ffffff" style:text-position="0% 100%" fo:font-family="Century" fo:font-size="18pt" fo:font-weight="bold" style:font-family-asian="'ＭＳ Ｐ明朝'" style:font-size-asian="18pt" style:font-weight-asian="bold" style:font-size-complex="18pt" style:font-weight-complex="bold"/>
    </style:style>
  </office:automatic-styles>
  <office:body>
    <office:chart>
      <chart:chart svg:width="12.7cm" svg:height="11.156cm" xlink:href="." xlink:type="simple" chart:class="chart:line" chart:style-name="ch1">
        <chart:title svg:x="5.154cm" svg:y="0.359cm" chart:style-name="ch2">
          <text:p><text:span text:style-name="T1">DAS28</text:span></text:p>
        </chart:title>
        <chart:plot-area chart:style-name="ch3" chart:data-source-has-labels="both" svg:x="0.446cm" svg:y="0.767cm" svg:width="11.477cm" svg:height="9.532cm">
          <chart:coordinate-region svg:x="0.993cm" svg:y="0.94cm" svg:width="10.93cm" svg:height="8.76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S28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2.99185609809915">
                <text:p>2.991856098099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80205612491971">
                <text:p>2.802056124919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67081480119367">
                <text:p>2.670814801193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57880575854137">
                <text:p>2.578805758541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48856822735035">
                <text:p>2.4885682273503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5" number:min-decimal-places="5" number:min-integer-digits="1"/>
      <number:text loext:blank-width-char=")"> </number:text>
    </number:number-style>
    <number:number-style style:name="N115">
      <style:text-properties fo:color="#ff0000"/>
      <number:text>(</number:text>
      <number:number number:decimal-places="5" number:min-decimal-places="5" number:min-integer-digits="1"/>
      <number:text>)</number:text>
      <style:map style:condition="value()&gt;=0" style:apply-style-name="N115P0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9f9f9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 style:data-style-name="N113">
      <style:chart-properties chart:display-label="true" chart:logarithmic="false" chart:minimum="0" chart:maximum="1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f9f9f9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f9f9f9"/>
    </style:style>
    <style:style style:name="ch7" style:family="chart" style:data-style-name="N11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8ec76" draw:fill-color="#98ec76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  <style:style style:name="T1" style:family="text">
      <style:text-properties fo:color="#ffffff" style:text-position="0% 100%" fo:font-family="Century" fo:font-size="18pt" fo:font-weight="bold" style:font-family-asian="'ＭＳ Ｐ明朝'" style:font-size-asian="18pt" style:font-weight-asian="bold" style:font-size-complex="18pt" style:font-weight-complex="bold"/>
    </style:style>
  </office:automatic-styles>
  <office:body>
    <office:chart>
      <chart:chart svg:width="12.7cm" svg:height="11.156cm" xlink:href="." xlink:type="simple" chart:class="chart:line" chart:style-name="ch1">
        <chart:title svg:x="5.19cm" svg:y="0.359cm" chart:style-name="ch2">
          <text:p><text:span text:style-name="T1">MMP3</text:span></text:p>
        </chart:title>
        <chart:plot-area chart:style-name="ch3" chart:data-source-has-labels="both" svg:x="0.513cm" svg:y="0.751cm" svg:width="11.939cm" svg:height="9.551cm">
          <chart:coordinate-region svg:x="1.455cm" svg:y="0.924cm" svg:width="10.997cm" svg:height="8.78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P3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78.0222222222222">
                <text:p>78.02222222222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9.4222222222222">
                <text:p>79.42222222222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6.7333333333333">
                <text:p>76.73333333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9.3333333333333">
                <text:p>79.33333333333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3" number:min-decimal-places="3" number:min-integer-digits="1"/>
      <number:text loext:blank-width-char=")"> </number:text>
    </number:number-style>
    <number:number-style style:name="N115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15P0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9f9f9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 style:data-style-name="N113">
      <style:chart-properties chart:display-label="true" chart:logarithmic="false" chart:interval-major="2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f9f9f9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f9f9f9"/>
    </style:style>
    <style:style style:name="ch7" style:family="chart" style:data-style-name="N11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00" draw:fill-color="#ffff00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  <style:style style:name="T1" style:family="text">
      <style:text-properties fo:color="#ffffff" style:text-position="0% 100%" fo:font-family="Century" fo:font-size="16pt" fo:font-weight="bold" style:font-family-asian="'ＭＳ Ｐ明朝'" style:font-size-asian="16pt" style:font-weight-asian="bold" style:font-size-complex="16pt" style:font-weight-complex="bold"/>
    </style:style>
  </office:automatic-styles>
  <office:body>
    <office:chart>
      <chart:chart svg:width="11.545cm" svg:height="4.301cm" xlink:href="." xlink:type="simple" chart:class="chart:line" chart:style-name="ch1">
        <chart:title svg:x="4.854cm" svg:y="0.466cm" chart:style-name="ch2">
          <text:p><text:span text:style-name="T1">PINP</text:span></text:p>
        </chart:title>
        <chart:plot-area chart:style-name="ch3" chart:data-source-has-labels="both" svg:x="0.303cm" svg:y="1.041cm" svg:width="10.924cm" svg:height="3.122cm">
          <chart:coordinate-region svg:x="1.048cm" svg:y="1.214cm" svg:width="10.179cm" svg:height="2.35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70.8644444444445">
                <text:p>70.86444444444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.1766666666667">
                <text:p>24.1766666666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.1844444444444">
                <text:p>23.18444444444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8.5933333333333">
                <text:p>28.59333333333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.0644444444444">
                <text:p>24.064444444444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3" number:min-decimal-places="3" number:min-integer-digits="1"/>
      <number:text loext:blank-width-char=")"> </number:text>
    </number:number-style>
    <number:number-style style:name="N115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15P0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9f9f9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 style:data-style-name="N113">
      <style:chart-properties chart:display-label="tru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f9f9f9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f9f9f9"/>
    </style:style>
    <style:style style:name="ch7" style:family="chart" style:data-style-name="N11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  <style:style style:name="T1" style:family="text">
      <style:text-properties fo:color="#ffffff" style:text-position="0% 100%" fo:font-family="Century" fo:font-size="16pt" fo:font-weight="bold" style:font-family-asian="'ＭＳ Ｐ明朝'" style:font-size-asian="16pt" style:font-weight-asian="bold" style:font-size-complex="16pt" style:font-weight-complex="bold"/>
    </style:style>
  </office:automatic-styles>
  <office:body>
    <office:chart>
      <chart:chart svg:width="11.545cm" svg:height="4.301cm" xlink:href="." xlink:type="simple" chart:class="chart:line" chart:style-name="ch1">
        <chart:title svg:x="4.558cm" svg:y="0.466cm" chart:style-name="ch2">
          <text:p><text:span text:style-name="T1">TRACP</text:span></text:p>
        </chart:title>
        <chart:plot-area chart:style-name="ch3" chart:data-source-has-labels="both" svg:x="0.267cm" svg:y="1.041cm" svg:width="11.136cm" svg:height="3.122cm">
          <chart:coordinate-region svg:x="1.209cm" svg:y="1.214cm" svg:width="10.194cm" svg:height="2.35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C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368.511111111111">
                <text:p>368.5111111111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8.022222222222">
                <text:p>198.0222222222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3.311111111111">
                <text:p>193.31111111111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6.377777777778">
                <text:p>216.37777777777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09.955555555556">
                <text:p>209.95555555555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3" number:min-decimal-places="3" number:min-integer-digits="1"/>
      <number:text loext:blank-width-char=")"> </number:text>
    </number:number-style>
    <number:number-style style:name="N113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13P0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4" style:family="chart" style:data-style-name="N0">
      <style:chart-properties chart:display-label="true" chart:logarithmic="false" chart:minimum="40" chart:maximum="80" chart:interval-major="1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one" chart:link-data-style-to-source="true" chart:label-position="right" loext:custom-leader-lines="false">
        <chart:label-separator>
          <text:p>; </text:p>
        </chart:label-separator>
      </style:chart-properties>
      <style:graphic-properties svg:stroke-width="0.079cm" svg:stroke-color="#81e6f1" draw:fill-color="#81e6f1" fo:wrap-option="wrap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7" style:family="chart" style:data-style-name="N113">
      <style:chart-properties chart:symbol-type="none" chart:link-data-style-to-source="true" chart:label-position="right" loext:custom-leader-lines="false">
        <chart:label-separator>
          <text:p>; </text:p>
        </chart:label-separator>
      </style:chart-properties>
      <style:graphic-properties svg:stroke-width="0.079cm" svg:stroke-color="#ffffff" draw:fill-color="#ffffff" fo:wrap-option="wrap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8" style:family="chart" style:data-style-name="N0">
      <style:chart-properties chart:symbol-type="none" chart:link-data-style-to-source="true" chart:label-position="right" loext:custom-leader-lines="false">
        <chart:label-separator>
          <text:p>; </text:p>
        </chart:label-separator>
      </style:chart-properties>
      <style:graphic-properties svg:stroke-width="0.079cm" svg:stroke-color="#98ec76" draw:fill-color="#98ec76" fo:wrap-option="wrap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59cm" svg:height="3.951cm" xlink:href="." xlink:type="simple" chart:class="chart:line" chart:style-name="ch1">
        <chart:plot-area chart:style-name="ch2" chart:data-source-has-labels="both" svg:x="0.339cm" svg:y="-0.114cm" svg:width="10.84cm" svg:height="4.409cm">
          <chart:coordinate-region svg:x="0.985cm" svg:y="0.06cm" svg:width="10.194cm" svg:height="3.642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series chart:style-name="ch7" chart:values-cell-range-address="local-table.$C$2:.$C$6" chart:label-cell-address="local-table.$C$1" chart:class="chart:line">
            <chart:data-point chart:repeated="5"/>
          </chart:series>
          <chart:series chart:style-name="ch8" chart:values-cell-range-address="local-table.$D$2:.$D$6" chart:label-cell-address="local-table.$D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_neck</text:p>
              </table:table-cell>
              <table:table-cell office:value-type="string">
                <text:p>R_toro</text:p>
              </table:table-cell>
              <table:table-cell office:value-type="string">
                <text:p>R_hi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62.6511627906977">
                <text:p>62.6511627906977</text:p>
              </table:table-cell>
              <table:table-cell office:value-type="float" office:value="67.1627906976744">
                <text:p>67.1627906976744</text:p>
              </table:table-cell>
              <table:table-cell office:value-type="float" office:value="68.6744186046512">
                <text:p>68.67441860465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3.9761904761905">
                <text:p>63.9761904761905</text:p>
              </table:table-cell>
              <table:table-cell office:value-type="float" office:value="70.7142857142857">
                <text:p>70.7142857142857</text:p>
              </table:table-cell>
              <table:table-cell office:value-type="float" office:value="71.5581395348837">
                <text:p>71.55813953488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4.5697674418605">
                <text:p>64.5697674418605</text:p>
              </table:table-cell>
              <table:table-cell office:value-type="float" office:value="71.2906976744186">
                <text:p>71.2906976744186</text:p>
              </table:table-cell>
              <table:table-cell office:value-type="float" office:value="71.6627906976744">
                <text:p>71.66279069767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6.5348837209302">
                <text:p>66.5348837209302</text:p>
              </table:table-cell>
              <table:table-cell office:value-type="float" office:value="70.953488372093">
                <text:p>70.953488372093</text:p>
              </table:table-cell>
              <table:table-cell office:value-type="float" office:value="71.5581395348837">
                <text:p>71.55813953488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7.3023255813954">
                <text:p>67.3023255813954</text:p>
              </table:table-cell>
              <table:table-cell office:value-type="float" office:value="69.8372093023256">
                <text:p>69.8372093023256</text:p>
              </table:table-cell>
              <table:table-cell office:value-type="float" office:value="70.9302325581395">
                <text:p>70.930232558139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1" number:min-decimal-places="1" number:min-integer-digits="1" number:grouping="true"/>
      <number:text loext:blank-width-char=")"> </number:text>
    </number:number-style>
    <number:number-style style:name="N113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113P0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data-label-number="value" chart:data-label-text="false" chart:data-label-symbol="false" chart:data-label-series="false"/>
    </style:style>
    <style:style style:name="ch3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f9f9f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4" style:family="chart" style:data-style-name="N0">
      <style:chart-properties chart:display-label="true" chart:logarithmic="false" chart:minimum="6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ffffff" style:text-position="0% 100%" fo:font-family="Calibri" fo:font-size="12pt" fo:font-weight="bold" style:font-family-asian="'ＭＳ Ｐ明朝'" style:font-size-asian="12pt" style:font-weight-asian="bold" style:font-size-complex="12pt" style:font-weight-complex="bold"/>
    </style:style>
    <style:style style:name="ch5" style:family="chart">
      <style:graphic-properties svg:stroke-width="0.026cm" svg:stroke-color="#878787"/>
    </style:style>
    <style:style style:name="ch6" style:family="chart" style:data-style-name="N113">
      <style:chart-properties chart:symbol-type="none" chart:link-data-style-to-source="false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ff0000" draw:fill-color="#ff0000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7" style:family="chart">
      <style:chart-properties chart:solid-type="cuboid" chart:data-label-number="none" chart:data-label-text="false" chart:data-label-symbol="false" chart:data-label-series="false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993cm" svg:height="10.001cm" xlink:href="." xlink:type="simple" chart:class="chart:line" chart:style-name="ch1">
        <chart:plot-area chart:style-name="ch2" chart:data-source-has-labels="both" svg:x="0.162cm" svg:y="0.117cm" svg:width="10.73cm" svg:height="8.639cm">
          <chart:coordinate-region svg:x="0.913cm" svg:y="0.435cm" svg:width="9.979cm" svg:height="8.003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/>
            <chart:data-point chart:style-name="ch7" chart:repeated="3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i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.6222222222222">
                <text:p>69.62222222222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.9333333333333">
                <text:p>73.9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.4666666666667">
                <text:p>76.4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.9111111111111">
                <text:p>78.91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3" number:min-decimal-places="3" number:min-integer-digits="1"/>
      <number:text loext:blank-width-char=")"> </number:text>
    </number:number-style>
    <number:number-style style:name="N113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13P0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ffffff" style:text-position="0% 100%" fo:font-family="Calibri" fo:font-size="10pt" fo:font-weight="bold" style:font-family-asian="'ＭＳ Ｐ明朝'" style:font-size-asian="10pt" style:font-weight-asian="bold" style:font-size-complex="10pt" style:font-weight-complex="bold"/>
    </style:style>
    <style:style style:name="ch4" style:family="chart" style:data-style-name="N0">
      <style:chart-properties chart:display-label="true" chart:logarithmic="false" chart:minimum="40" chart:maximum="80" chart:interval-major="10" chart:interval-minor-divisor="2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ffffff" style:text-position="0% 100%" fo:font-family="'ＭＳ Ｐ明朝'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>
      <style:graphic-properties svg:stroke-width="0.026cm" svg:stroke-color="#878787"/>
    </style:style>
    <style:style style:name="ch6" style:family="chart" style:data-style-name="N113">
      <style:chart-properties chart:symbol-type="none" chart:link-data-style-to-source="true" chart:label-position="right" loext:custom-leader-lines="false">
        <chart:label-separator>
          <text:p>; </text:p>
        </chart:label-separator>
      </style:chart-properties>
      <style:graphic-properties svg:stroke-width="0.079cm" svg:stroke-color="#fabb76" draw:fill-color="#fabb76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7" style:family="chart" style:data-style-name="N0">
      <style:chart-properties chart:symbol-type="none" chart:link-data-style-to-source="true" chart:label-position="right" loext:custom-leader-lines="false">
        <chart:label-separator>
          <text:p>; </text:p>
        </chart:label-separator>
      </style:chart-properties>
      <style:graphic-properties svg:stroke-width="0.079cm" svg:stroke-color="#ffffff" draw:fill-color="#ffffff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8" style:family="chart" style:data-style-name="N113">
      <style:chart-properties chart:symbol-type="none" chart:link-data-style-to-source="true" chart:label-position="right" loext:custom-leader-lines="false">
        <chart:label-separator>
          <text:p>; </text:p>
        </chart:label-separator>
      </style:chart-properties>
      <style:graphic-properties svg:stroke-width="0.079cm" svg:stroke-color="#ff6666" draw:fill-color="#ff6666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59cm" svg:height="3.951cm" xlink:href="." xlink:type="simple" chart:class="chart:line" chart:style-name="ch1">
        <chart:plot-area chart:style-name="ch2" chart:data-source-has-labels="both" svg:x="1.331cm" svg:y="-0.193cm" svg:width="10.818cm" svg:height="4.647cm">
          <chart:coordinate-region svg:x="1.99cm" svg:y="0.06cm" svg:width="10.159cm" svg:height="3.642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series chart:style-name="ch7" chart:values-cell-range-address="local-table.$C$2:.$C$6" chart:label-cell-address="local-table.$C$1" chart:class="chart:line">
            <chart:data-point chart:repeated="5"/>
          </chart:series>
          <chart:series chart:style-name="ch8" chart:values-cell-range-address="local-table.$D$2:.$D$6" chart:label-cell-address="local-table.$D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_neck</text:p>
              </table:table-cell>
              <table:table-cell office:value-type="string">
                <text:p>L_toro</text:p>
              </table:table-cell>
              <table:table-cell office:value-type="string">
                <text:p>L_hi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61.5227272727273">
                <text:p>61.5227272727273</text:p>
              </table:table-cell>
              <table:table-cell office:value-type="float" office:value="67.0909090909091">
                <text:p>67.0909090909091</text:p>
              </table:table-cell>
              <table:table-cell office:value-type="float" office:value="68.4772727272727">
                <text:p>68.47727272727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2.8409090909091">
                <text:p>62.8409090909091</text:p>
              </table:table-cell>
              <table:table-cell office:value-type="float" office:value="70.4090909090909">
                <text:p>70.4090909090909</text:p>
              </table:table-cell>
              <table:table-cell office:value-type="float" office:value="71.1363636363636">
                <text:p>71.13636363636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2.5113636363636">
                <text:p>62.5113636363636</text:p>
              </table:table-cell>
              <table:table-cell office:value-type="float" office:value="73.3636363636364">
                <text:p>73.3636363636364</text:p>
              </table:table-cell>
              <table:table-cell office:value-type="float" office:value="72.625">
                <text:p>72.6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3.8409090909091">
                <text:p>63.8409090909091</text:p>
              </table:table-cell>
              <table:table-cell office:value-type="float" office:value="74.2954545454546">
                <text:p>74.2954545454546</text:p>
              </table:table-cell>
              <table:table-cell office:value-type="float" office:value="72.9545454545455">
                <text:p>72.95454545454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3.9545454545455">
                <text:p>63.9545454545455</text:p>
              </table:table-cell>
              <table:table-cell office:value-type="float" office:value="73.1363636363636">
                <text:p>73.1363636363636</text:p>
              </table:table-cell>
              <table:table-cell office:value-type="float" office:value="72.953488372093">
                <text:p>72.95348837209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5" number:min-decimal-places="5" number:min-integer-digits="1"/>
      <number:text loext:blank-width-char=")"> </number:text>
    </number:number-style>
    <number:number-style style:name="N115">
      <style:text-properties fo:color="#ff0000"/>
      <number:text>(</number:text>
      <number:number number:decimal-places="5" number:min-decimal-places="5" number:min-integer-digits="1"/>
      <number:text>)</number:text>
      <style:map style:condition="value()&gt;=0" style:apply-style-name="N115P0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9f9f9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 style:data-style-name="N113">
      <style:chart-properties chart:display-label="true" chart:logarithmic="false" chart:minimum="0" chart:maximum="4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f9f9f9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f9f9f9"/>
    </style:style>
    <style:style style:name="ch7" style:family="chart" style:data-style-name="N11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 fo:wrap-option="wrap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  <style:style style:name="T1" style:family="text">
      <style:text-properties fo:color="#ffffff" style:text-position="0% 100%" fo:font-family="Century" fo:font-size="14pt" fo:font-weight="bold" style:font-family-asian="'ＭＳ Ｐ明朝'" style:font-size-asian="14pt" style:font-weight-asian="bold" style:font-size-complex="14pt" style:font-weight-complex="bold"/>
    </style:style>
  </office:automatic-styles>
  <office:body>
    <office:chart>
      <chart:chart svg:width="12.7cm" svg:height="3.91cm" xlink:href="." xlink:type="simple" chart:class="chart:line" chart:style-name="ch1">
        <chart:title svg:x="5.214cm" svg:y="0.062cm" chart:style-name="ch2">
          <text:p><text:span text:style-name="T1">DAS28</text:span></text:p>
        </chart:title>
        <chart:plot-area chart:style-name="ch3" chart:data-source-has-labels="both" svg:x="0.657cm" svg:y="0.506cm" svg:width="10.772cm" svg:height="3.393cm">
          <chart:coordinate-region svg:x="1.204cm" svg:y="0.679cm" svg:width="10.225cm" svg:height="2.626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S28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2.99185609809915">
                <text:p>2.991856098099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80205612491971">
                <text:p>2.802056124919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67081480119367">
                <text:p>2.670814801193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57880575854137">
                <text:p>2.578805758541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48856822735035">
                <text:p>2.4885682273503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5" number:min-decimal-places="5" number:min-integer-digits="1"/>
      <number:text loext:blank-width-char=")"> </number:text>
    </number:number-style>
    <number:number-style style:name="N115">
      <style:text-properties fo:color="#ff0000"/>
      <number:text>(</number:text>
      <number:number number:decimal-places="5" number:min-decimal-places="5" number:min-integer-digits="1"/>
      <number:text>)</number:text>
      <style:map style:condition="value()&gt;=0" style:apply-style-name="N115P0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9f9f9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 style:data-style-name="N113">
      <style:chart-properties chart:display-label="true" chart:logarithmic="false" chart:minimum="0" chart:maximum="1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f9f9f9"/>
      <style:text-properties fo:color="#ffffff" style:text-position="0% 100%" fo:font-family="Century" fo:font-size="10pt" fo:font-weight="bold" style:font-family-asian="'ＭＳ Ｐ明朝'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f9f9f9"/>
    </style:style>
    <style:style style:name="ch7" style:family="chart" style:data-style-name="N11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8ec76" draw:fill-color="#98ec76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  <style:style style:name="T1" style:family="text">
      <style:text-properties fo:color="#ffffff" style:text-position="0% 100%" fo:font-family="Century" fo:font-size="16pt" fo:font-weight="bold" style:font-family-asian="'ＭＳ Ｐ明朝'" style:font-size-asian="16pt" style:font-weight-asian="bold" style:font-size-complex="16pt" style:font-weight-complex="bold"/>
    </style:style>
  </office:automatic-styles>
  <office:body>
    <office:chart>
      <chart:chart svg:width="12.7cm" svg:height="3.91cm" xlink:href="." xlink:type="simple" chart:class="chart:line" chart:style-name="ch1">
        <chart:title svg:x="5.255cm" svg:y="0.029cm" chart:style-name="ch2">
          <text:p><text:span text:style-name="T1">MMP3</text:span></text:p>
        </chart:title>
        <chart:plot-area chart:style-name="ch3" chart:data-source-has-labels="both" svg:x="1.325cm" svg:y="0.501cm" svg:width="11.127cm" svg:height="3.367cm">
          <chart:coordinate-region svg:x="2.267cm" svg:y="0.674cm" svg:width="10.185cm" svg:height="2.6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P3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78.0222222222222">
                <text:p>78.02222222222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9.4222222222222">
                <text:p>79.42222222222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6.7333333333333">
                <text:p>76.73333333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9.3333333333333">
                <text:p>79.333333333333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1" number:min-decimal-places="1" number:min-integer-digits="1" number:grouping="true"/>
      <number:text loext:blank-width-char=")"> </number:text>
    </number:number-style>
    <number:number-style style:name="N113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113P0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visible="false" loext:major-origin="0.5" chart:axis-position="0" chart:tick-mark-position="at-axis"/>
      <style:graphic-properties svg:stroke-width="0.026cm" svg:stroke-color="#f9f9f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-1" chart:tick-mark-position="at-axis"/>
      <style:graphic-properties svg:stroke-width="0.026cm" svg:stroke-color="#f9f9f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6" style:family="chart">
      <style:graphic-properties svg:stroke-width="0.026cm" svg:stroke-color="#f9f9f9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26cm" svg:stroke-color="#f9f9f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00" draw:fill-color="#ffff00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10" style:family="chart" style:data-style-name="N113">
      <style:chart-properties chart:symbol-type="none" chart:link-data-style-to-source="false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00ffff" draw:fill-color="#00ffff" fo:wrap-option="wrap"/>
      <style:text-properties fo:color="#ffffff" style:text-position="0% 100%" fo:font-family="Century" fo:font-size="6pt" fo:font-weight="bold" style:font-family-asian="'ＭＳ Ｐ明朝'" style:font-size-asian="6pt" style:font-weight-asian="bold" style:font-size-complex="6pt" style:font-weight-complex="bold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cm" svg:height="7cm" xlink:href="." xlink:type="simple" chart:class="chart:line" chart:style-name="ch1">
        <chart:legend chart:legend-position="end" svg:x="3.845cm" svg:y="0.683cm" style:legend-expansion="custom" svg:width="11.558cm" svg:height="0.623cm" style:legend-expansion-aspect-ratio="18.5521669341894" chart:style-name="ch2"/>
        <chart:plot-area chart:style-name="ch3" chart:data-source-has-labels="both" svg:x="0.72cm" svg:y="0.214cm" svg:width="19.263cm" svg:height="6.132cm">
          <chart:coordinate-region svg:x="1.162cm" svg:y="0.388cm" svg:width="17.995cm" svg:height="5.786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x" chart:name="second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11" chart:label-cell-address="local-table.$B$1" chart:class="chart:line">
            <chart:data-point chart:repeated="10"/>
          </chart:series>
          <chart:series chart:attached-axis="secondary-y" chart:style-name="ch9" chart:values-cell-range-address="local-table.$C$2:.$C$11" chart:label-cell-address="local-table.$C$1" chart:class="chart:line">
            <chart:data-point chart:repeated="10"/>
          </chart:series>
          <chart:series chart:attached-axis="secondary-y" chart:style-name="ch10" chart:values-cell-range-address="local-table.$D$2:.$D$11" chart:label-cell-address="local-table.$D$1" chart:class="chart:line">
            <chart:data-point chart:style-name="ch11" loext:custom-label-pos-x="-0.0192424242424242" loext:custom-label-pos-y="0.0403174603174604"/>
            <chart:data-point chart:style-name="ch11" loext:custom-label-pos-x="-0.0288636363636364" loext:custom-label-pos-y="0.0201587301587303"/>
            <chart:data-point chart:style-name="ch11" loext:custom-label-pos-x="-0.022449494949495" loext:custom-label-pos-y="0.0251984126984127"/>
            <chart:data-point chart:style-name="ch11" loext:custom-label-pos-x="-0.0208459595959596" loext:custom-label-pos-y="0.0302380952380952"/>
            <chart:data-point chart:style-name="ch11" loext:custom-label-pos-x="-0.022449494949495" loext:custom-label-pos-y="0.0201587301587302"/>
            <chart:data-point chart:style-name="ch11" loext:custom-label-pos-x="-0.0144318181818182" loext:custom-label-pos-y="-0.0100793650793651"/>
            <chart:data-point chart:style-name="ch11" loext:custom-label-pos-x="-0.0160353535353535" loext:custom-label-pos-y="-0.0151190476190476"/>
            <chart:data-point chart:style-name="ch11" loext:custom-label-pos-x="-0.0208459595959596" loext:custom-label-pos-y="-0.0151190476190475"/>
            <chart:data-point chart:style-name="ch11" loext:custom-label-pos-x="-0.00641414141414141" loext:custom-label-pos-y="0.010079365079365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cOC</text:p>
              </table:table-cell>
              <table:table-cell office:value-type="string">
                <text:p>TRACP-5b</text:p>
              </table:table-cell>
              <table:table-cell office:value-type="string">
                <text:p>P1NP</text:p>
              </table:table-cell>
            </table:table-row>
          </table:table-header-rows>
          <table:table-rows>
            <table:table-row>
              <table:table-cell office:value-type="string">
                <text:p>-1 </text:p>
              </table:table-cell>
              <table:table-cell office:value-type="float" office:value="4.51">
                <text:p>4.51</text:p>
              </table:table-cell>
              <table:table-cell office:value-type="float" office:value="749">
                <text:p>7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 </text:p>
              </table:table-cell>
              <table:table-cell office:value-type="float" office:value="3.21">
                <text:p>3.21</text:p>
              </table:table-cell>
              <table:table-cell office:value-type="float" office:value="659">
                <text:p>65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 </text:p>
              </table:table-cell>
              <table:table-cell office:value-type="float" office:value="0.97">
                <text:p>0.97</text:p>
              </table:table-cell>
              <table:table-cell office:value-type="float" office:value="114">
                <text:p>1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 </text:p>
              </table:table-cell>
              <table:table-cell office:value-type="float" office:value="5.75">
                <text:p>5.75</text:p>
              </table:table-cell>
              <table:table-cell office:value-type="float" office:value="607">
                <text:p>607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9 </text:p>
              </table:table-cell>
              <table:table-cell office:value-type="float" office:value="2.69">
                <text:p>2.69</text:p>
              </table:table-cell>
              <table:table-cell office:value-type="float" office:value="87">
                <text:p>87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12 </text:p>
              </table:table-cell>
              <table:table-cell office:value-type="float" office:value="1.3">
                <text:p>1.3</text:p>
              </table:table-cell>
              <table:table-cell office:value-type="float" office:value="130">
                <text:p>130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5 </text:p>
              </table:table-cell>
              <table:table-cell office:value-type="float" office:value="1.29">
                <text:p>1.29</text:p>
              </table:table-cell>
              <table:table-cell office:value-type="float" office:value="93">
                <text:p>93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8 </text:p>
              </table:table-cell>
              <table:table-cell office:value-type="float" office:value="1.82">
                <text:p>1.82</text:p>
              </table:table-cell>
              <table:table-cell office:value-type="float" office:value="211">
                <text:p>2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 </text:p>
              </table:table-cell>
              <table:table-cell office:value-type="float" office:value="0.38">
                <text:p>0.38</text:p>
              </table:table-cell>
              <table:table-cell office:value-type="float" office:value="118">
                <text:p>118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4 </text:p>
              </table:table-cell>
              <table:table-cell office:value-type="float" office:value="2.06">
                <text:p>2.06</text:p>
              </table:table-cell>
              <table:table-cell office:value-type="float" office:value="354">
                <text:p>354</text:p>
              </table:table-cell>
              <table:table-cell office:value-type="float" office:value="55.8">
                <text:p>55.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visible="false" loext:major-origin="0.5" chart:axis-position="0" chart:tick-mark-position="at-axis"/>
      <style:graphic-properties svg:stroke-width="0.026cm" svg:stroke-color="#f9f9f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-1" chart:tick-mark-position="at-axis"/>
      <style:graphic-properties svg:stroke-width="0.026cm" svg:stroke-color="#f9f9f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6" style:family="chart">
      <style:graphic-properties svg:stroke-width="0.026cm" svg:stroke-color="#f9f9f9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26cm" svg:stroke-color="#f9f9f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9ff33" draw:fill-color="#99ff33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9" style:family="chart" style:data-style-name="N0">
      <style:chart-properties chart:symbol-type="none" chart:link-data-style-to-source="false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ff0000" draw:fill-color="#ff0000" fo:wrap-option="wrap"/>
      <style:text-properties fo:color="#ff0000" style:text-position="0% 100%" fo:font-family="Century" fo:font-size="8pt" fo:font-weight="bold" style:font-family-asian="'ＭＳ Ｐ明朝'" style:font-size-asian="8pt" style:font-weight-asian="bold" style:font-size-complex="8pt" style:font-weight-complex="bold"/>
    </style:style>
    <style:style style:name="ch10" style:family="chart">
      <style:chart-properties chart:solid-type="cuboid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2cm" svg:height="7cm" xlink:href="." xlink:type="simple" chart:class="chart:line" chart:style-name="ch1">
        <chart:legend chart:legend-position="end" svg:x="6.407cm" svg:y="0.634cm" style:legend-expansion="custom" svg:width="6.174cm" svg:height="0.51cm" style:legend-expansion-aspect-ratio="12.1058823529412" chart:style-name="ch2"/>
        <chart:plot-area chart:style-name="ch3" chart:data-source-has-labels="both" svg:x="0.398cm" svg:y="0.214cm" svg:width="20.241cm" svg:height="6.132cm">
          <chart:coordinate-region svg:x="1.796cm" svg:y="0.388cm" svg:width="18.017cm" svg:height="5.786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x" chart:name="second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11" chart:label-cell-address="local-table.$B$1" chart:class="chart:line">
            <chart:data-point chart:repeated="10"/>
          </chart:series>
          <chart:series chart:attached-axis="secondary-y" chart:style-name="ch9" chart:values-cell-range-address="local-table.$C$2:.$C$11" chart:label-cell-address="local-table.$C$1" chart:class="chart:line">
            <chart:data-point chart:style-name="ch10" loext:custom-label-pos-x="-0.0192424242424242" loext:custom-label-pos-y="0.0251984126984127"/>
            <chart:data-point/>
            <chart:data-point chart:style-name="ch10" loext:custom-label-pos-x="-0.0240530303030303" loext:custom-label-pos-y="-0.0151190476190476"/>
            <chart:data-point chart:style-name="ch10" loext:custom-label-pos-x="-0.022449494949495" loext:custom-label-pos-y="0.0503968253968254"/>
            <chart:data-point chart:style-name="ch10" loext:custom-label-pos-x="-0.0224496212121212" loext:custom-label-pos-y="0.0403174603174604"/>
            <chart:data-point chart:style-name="ch10" loext:custom-label-pos-x="-0.0144318181818182" loext:custom-label-pos-y="0.0352777777777778"/>
            <chart:data-point chart:style-name="ch10" loext:custom-label-pos-x="-0.0192424242424242" loext:custom-label-pos-y="0.0403174603174603"/>
            <chart:data-point chart:style-name="ch10" loext:custom-label-pos-x="-0.0112247474747475" loext:custom-label-pos-y="0.0403174603174603"/>
            <chart:data-point chart:style-name="ch10" loext:custom-label-pos-x="-0.00962121212121212" loext:custom-label-pos-y="-0.00503968253968254"/>
            <chart:data-point chart:style-name="ch10" loext:custom-label-pos-x="-0.0112247474747475" loext:custom-label-pos-y="0.0050396825396826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2MG(尿)</text:p>
              </table:table-cell>
              <table:table-cell office:value-type="string">
                <text:p>INTACT-PTH</text:p>
              </table:table-cell>
            </table:table-row>
          </table:table-header-rows>
          <table:table-rows>
            <table:table-row>
              <table:table-cell office:value-type="string">
                <text:p>-1 </text:p>
              </table:table-cell>
              <table:table-cell office:value-type="float" office:value="18291">
                <text:p>182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 </text:p>
              </table:table-cell>
              <table:table-cell office:value-type="float" office:value="43272">
                <text:p>432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 </text:p>
              </table:table-cell>
              <table:table-cell office:value-type="float" office:value="10945">
                <text:p>1094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 </text:p>
              </table:table-cell>
              <table:table-cell office:value-type="float" office:value="957">
                <text:p>9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 </text:p>
              </table:table-cell>
              <table:table-cell office:value-type="float" office:value="1822">
                <text:p>18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 </text:p>
              </table:table-cell>
              <table:table-cell office:value-type="float" office:value="1192">
                <text:p>11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 </text:p>
              </table:table-cell>
              <table:table-cell office:value-type="float" office:value="1375">
                <text:p>13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 </text:p>
              </table:table-cell>
              <table:table-cell office:value-type="float" office:value="982">
                <text:p>9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 </text:p>
              </table:table-cell>
              <table:table-cell office:value-type="float" office:value="2031">
                <text:p>20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 </text:p>
              </table:table-cell>
              <table:table-cell office:value-type="float" office:value="975">
                <text:p>97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visible="false" loext:major-origin="0.5" chart:axis-position="0" chart:tick-mark-position="at-axis"/>
      <style:graphic-properties svg:stroke-width="0.026cm" svg:stroke-color="#f9f9f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f9f9f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6" style:family="chart">
      <style:graphic-properties svg:stroke-width="0.026cm" svg:stroke-color="#f9f9f9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26cm" svg:stroke-color="#f9f9f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ff" draw:fill-color="#ffffff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cm" svg:height="7cm" xlink:href="." xlink:type="simple" chart:class="chart:line" chart:style-name="ch1">
        <chart:legend chart:legend-position="end" svg:x="7.394cm" svg:y="0.634cm" style:legend-expansion="custom" svg:width="4.375cm" svg:height="0.51cm" style:legend-expansion-aspect-ratio="8.57843137254902" chart:style-name="ch2"/>
        <chart:plot-area chart:style-name="ch3" chart:data-source-has-labels="both" svg:x="0.317cm" svg:y="0.214cm" svg:width="19.476cm" svg:height="6.132cm">
          <chart:coordinate-region svg:x="0.95cm" svg:y="0.388cm" svg:width="18.017cm" svg:height="5.786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x" chart:name="second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11" chart:label-cell-address="local-table.$B$1" chart:class="chart:line">
            <chart:data-point chart:repeated="10"/>
          </chart:series>
          <chart:series chart:attached-axis="secondary-y" chart:style-name="ch9" chart:values-cell-range-address="local-table.$C$2:.$C$11" chart:label-cell-address="local-table.$C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尿Ca</text:p>
              </table:table-cell>
              <table:table-cell office:value-type="string">
                <text:p>尿IP</text:p>
              </table:table-cell>
            </table:table-row>
          </table:table-header-rows>
          <table:table-rows>
            <table:table-row>
              <table:table-cell office:value-type="string">
                <text:p>-1 </text:p>
              </table:table-cell>
              <table:table-cell office:value-type="float" office:value="17.8">
                <text:p>17.8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0 </text:p>
              </table:table-cell>
              <table:table-cell office:value-type="float" office:value="30.4">
                <text:p>30.4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 </text:p>
              </table:table-cell>
              <table:table-cell office:value-type="float" office:value="1.8">
                <text:p>1.8</text:p>
              </table:table-cell>
              <table:table-cell office:value-type="float" office:value="274.2">
                <text:p>274.2</text:p>
              </table:table-cell>
            </table:table-row>
            <table:table-row>
              <table:table-cell office:value-type="string">
                <text:p>6 </text:p>
              </table:table-cell>
              <table:table-cell office:value-type="float" office:value="8.1">
                <text:p>8.1</text:p>
              </table:table-cell>
              <table:table-cell office:value-type="float" office:value="239.6">
                <text:p>239.6</text:p>
              </table:table-cell>
            </table:table-row>
            <table:table-row>
              <table:table-cell office:value-type="string">
                <text:p>9 </text:p>
              </table:table-cell>
              <table:table-cell office:value-type="float" office:value="12.2">
                <text:p>12.2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string">
                <text:p>12 </text:p>
              </table:table-cell>
              <table:table-cell office:value-type="float" office:value="28.1">
                <text:p>28.1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15 </text:p>
              </table:table-cell>
              <table:table-cell office:value-type="float" office:value="13.8">
                <text:p>13.8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18 </text:p>
              </table:table-cell>
              <table:table-cell office:value-type="float" office:value="15.8">
                <text:p>15.8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21 </text:p>
              </table:table-cell>
              <table:table-cell office:value-type="float" office:value="7.6">
                <text:p>7.6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24 </text:p>
              </table:table-cell>
              <table:table-cell office:value-type="float" office:value="28.7">
                <text:p>28.7</text:p>
              </table:table-cell>
              <table:table-cell office:value-type="float" office:value="60.6">
                <text:p>60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visible="false" loext:major-origin="0.5" chart:axis-position="0" chart:tick-mark-position="at-axis"/>
      <style:graphic-properties svg:stroke-width="0.026cm" svg:stroke-color="#f9f9f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5" style:family="chart" style:data-style-name="N0">
      <style:chart-properties chart:display-label="true" chart:logarithmic="false" chart:maximum="10" chart:interval-minor-divisor="5" chart:reverse-direction="false" text:line-break="false" loext:try-staggering-first="false" chart:link-data-style-to-source="false" chart:axis-position="-1" chart:tick-mark-position="at-axis"/>
      <style:graphic-properties svg:stroke-width="0.026cm" svg:stroke-color="#f9f9f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6" style:family="chart">
      <style:graphic-properties svg:stroke-width="0.026cm" svg:stroke-color="#f9f9f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62cm" svg:stroke-color="#99ff33" svg:stroke-opacity="84%" svg:stroke-linecap="square" draw:fill-color="#99ff33" draw:opacity="84%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ff" draw:fill-color="#ffffff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f11df" draw:fill-color="#ef11df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2cm" svg:height="7cm" xlink:href="." xlink:type="simple" chart:class="chart:line" chart:style-name="ch1">
        <chart:legend chart:legend-position="end" svg:x="3.161cm" svg:y="1.509cm" style:legend-expansion="custom" svg:width="13.724cm" svg:height="0.596cm" style:legend-expansion-aspect-ratio="23.0268456375839" chart:style-name="ch2"/>
        <chart:plot-area chart:style-name="ch3" chart:data-source-has-labels="both" svg:x="0.529cm" svg:y="0.215cm" svg:width="18.615cm" svg:height="6.131cm">
          <chart:coordinate-region svg:x="1.162cm" svg:y="0.388cm" svg:width="17.982cm" svg:height="5.786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series chart:style-name="ch9" chart:values-cell-range-address="local-table.$D$2:.$D$11" chart:label-cell-address="local-table.$D$1" chart:class="chart:line">
            <chart:data-point chart:repeated="10"/>
          </chart:series>
          <chart:series chart:style-name="ch10" chart:values-cell-range-address="local-table.$E$2:.$E$11" chart:label-cell-address="local-table.$E$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</text:p>
              </table:table-cell>
              <table:table-cell office:value-type="string">
                <text:p>補正Ca</text:p>
              </table:table-cell>
              <table:table-cell office:value-type="string">
                <text:p>IP</text:p>
              </table:table-cell>
              <table:table-cell office:value-type="string">
                <text:p>UA</text:p>
              </table:table-cell>
            </table:table-row>
          </table:table-header-rows>
          <table:table-rows>
            <table:table-row>
              <table:table-cell office:value-type="string">
                <text:p>-1 </text:p>
              </table:table-cell>
              <table:table-cell office:value-type="float" office:value="9.4">
                <text:p>9.4</text:p>
              </table:table-cell>
              <table:table-cell office:value-type="float" office:value="9.4">
                <text:p>9.4</text:p>
              </table:table-cell>
              <table:table-cell office:value-type="float" office:value="2.5">
                <text:p>2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0 </text:p>
              </table:table-cell>
              <table:table-cell office:value-type="float" office:value="9">
                <text:p>9</text:p>
              </table:table-cell>
              <table:table-cell office:value-type="float" office:value="8.7">
                <text:p>8.7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 </text:p>
              </table:table-cell>
              <table:table-cell office:value-type="float" office:value="8.6">
                <text:p>8.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 </text:p>
              </table:table-cell>
              <table:table-cell office:value-type="float" office:value="9.5">
                <text:p>9.5</text:p>
              </table:table-cell>
              <table:table-cell office:value-type="float" office:value="9.4">
                <text:p>9.4</text:p>
              </table:table-cell>
              <table:table-cell office:value-type="float" office:value="5.1">
                <text:p>5.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9 </text:p>
              </table:table-cell>
              <table:table-cell office:value-type="float" office:value="8.9">
                <text:p>8.9</text:p>
              </table:table-cell>
              <table:table-cell office:value-type="float" office:value="8.8">
                <text:p>8.8</text:p>
              </table:table-cell>
              <table:table-cell office:value-type="float" office:value="4.1">
                <text:p>4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 </text:p>
              </table:table-cell>
              <table:table-cell office:value-type="float" office:value="9.2">
                <text:p>9.2</text:p>
              </table:table-cell>
              <table:table-cell office:value-type="float" office:value="9.5">
                <text:p>9.5</text:p>
              </table:table-cell>
              <table:table-cell office:value-type="float" office:value="3.4">
                <text:p>3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5 </text:p>
              </table:table-cell>
              <table:table-cell office:value-type="float" office:value="8.6">
                <text:p>8.6</text:p>
              </table:table-cell>
              <table:table-cell office:value-type="float" office:value="8.9">
                <text:p>8.9</text:p>
              </table:table-cell>
              <table:table-cell office:value-type="float" office:value="2.8">
                <text:p>2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8 </text:p>
              </table:table-cell>
              <table:table-cell office:value-type="float" office:value="9">
                <text:p>9</text:p>
              </table:table-cell>
              <table:table-cell office:value-type="float" office:value="9.1">
                <text:p>9.1</text:p>
              </table:table-cell>
              <table:table-cell office:value-type="float" office:value="2.7">
                <text:p>2.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1 </text:p>
              </table:table-cell>
              <table:table-cell office:value-type="float" office:value="8.6">
                <text:p>8.6</text:p>
              </table:table-cell>
              <table:table-cell office:value-type="float" office:value="8.7">
                <text:p>8.7</text:p>
              </table:table-cell>
              <table:table-cell office:value-type="float" office:value="2.3">
                <text:p>2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 </text:p>
              </table:table-cell>
              <table:table-cell office:value-type="float" office:value="9.3">
                <text:p>9.3</text:p>
              </table:table-cell>
              <table:table-cell office:value-type="float" office:value="9.4">
                <text:p>9.4</text:p>
              </table:table-cell>
              <table:table-cell office:value-type="float" office:value="3.5">
                <text:p>3.5</text:p>
              </table:table-cell>
              <table:table-cell office:value-type="float" office:value="5.2">
                <text:p>5.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visible="false" loext:major-origin="0.5" chart:axis-position="0" chart:tick-mark-position="at-axis"/>
      <style:graphic-properties svg:stroke-width="0.026cm" svg:stroke-color="#f9f9f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f9f9f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6" style:family="chart">
      <style:graphic-properties svg:stroke-width="0.026cm" svg:stroke-color="#f9f9f9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26cm" svg:stroke-color="#f9f9f9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ff" draw:fill-color="#ffffff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ffff" draw:fill-color="#00ffff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00" draw:fill-color="#ffff00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f0" draw:fill-color="#00b0f0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2cm" svg:height="7cm" xlink:href="." xlink:type="simple" chart:class="chart:line" chart:style-name="ch1">
        <chart:legend chart:legend-position="end" svg:x="2.597cm" svg:y="0.429cm" style:legend-expansion="custom" svg:width="14.394cm" svg:height="0.815cm" style:legend-expansion-aspect-ratio="17.6613496932515" chart:style-name="ch2"/>
        <chart:plot-area chart:style-name="ch3" chart:data-source-has-labels="both" svg:x="0.358cm" svg:y="0.214cm" svg:width="19.824cm" svg:height="6.132cm">
          <chart:coordinate-region svg:x="1.374cm" svg:y="0.388cm" svg:width="17.982cm" svg:height="5.786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x" chart:name="second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11" chart:label-cell-address="local-table.$B$1" chart:class="chart:line">
            <chart:data-point chart:repeated="10"/>
          </chart:series>
          <chart:series chart:attached-axis="primary-y" chart:style-name="ch9" chart:values-cell-range-address="local-table.$C$2:.$C$11" chart:label-cell-address="local-table.$C$1" chart:class="chart:line">
            <chart:data-point chart:repeated="10"/>
          </chart:series>
          <chart:series chart:attached-axis="secondary-y" chart:style-name="ch10" chart:values-cell-range-address="local-table.$D$2:.$D$11" chart:label-cell-address="local-table.$D$1" chart:class="chart:line">
            <chart:data-point chart:repeated="10"/>
          </chart:series>
          <chart:series chart:attached-axis="secondary-y" chart:style-name="ch11" chart:values-cell-range-address="local-table.$E$2:.$E$11" chart:label-cell-address="local-table.$E$1" chart:class="chart:line">
            <chart:data-point chart:repeated="10"/>
          </chart:series>
          <chart:series chart:attached-axis="secondary-y" chart:style-name="ch12" chart:values-cell-range-address="local-table.$F$2:.$F$11" chart:label-cell-address="local-table.$F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P</text:p>
              </table:table-cell>
              <table:table-cell office:value-type="string">
                <text:p>ALP3活性</text:p>
              </table:table-cell>
              <table:table-cell office:value-type="string">
                <text:p>AST</text:p>
              </table:table-cell>
              <table:table-cell office:value-type="string">
                <text:p>ALT</text:p>
              </table:table-cell>
              <table:table-cell office:value-type="string">
                <text:p>ALP3%</text:p>
              </table:table-cell>
            </table:table-row>
          </table:table-header-rows>
          <table:table-rows>
            <table:table-row>
              <table:table-cell office:value-type="string">
                <text:p>-1 </text:p>
              </table:table-cell>
              <table:table-cell office:value-type="float" office:value="1011">
                <text:p>1011</text:p>
              </table:table-cell>
              <table:table-cell office:value-type="float" office:value="731">
                <text:p>731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0 </text:p>
              </table:table-cell>
              <table:table-cell office:value-type="float" office:value="969">
                <text:p>969</text:p>
              </table:table-cell>
              <table:table-cell office:value-type="float" office:value="740">
                <text:p>740</text:p>
              </table:table-cell>
              <table:table-cell office:value-type="float" office:value="91">
                <text:p>91</text:p>
              </table:table-cell>
              <table:table-cell office:value-type="float" office:value="64">
                <text:p>64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3 </text:p>
              </table:table-cell>
              <table:table-cell office:value-type="float" office:value="418">
                <text:p>418</text:p>
              </table:table-cell>
              <table:table-cell office:value-type="float" office:value="177">
                <text:p>177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6 </text:p>
              </table:table-cell>
              <table:table-cell office:value-type="float" office:value="468">
                <text:p>468</text:p>
              </table:table-cell>
              <table:table-cell office:value-type="float" office:value="249">
                <text:p>249</text:p>
              </table:table-cell>
              <table:table-cell office:value-type="float" office:value="65">
                <text:p>65</text:p>
              </table:table-cell>
              <table:table-cell office:value-type="float" office:value="42">
                <text:p>42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9 </text:p>
              </table:table-cell>
              <table:table-cell office:value-type="float" office:value="448">
                <text:p>448</text:p>
              </table:table-cell>
              <table:table-cell office:value-type="float" office:value="199">
                <text:p>199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2 </text:p>
              </table:table-cell>
              <table:table-cell office:value-type="float" office:value="363">
                <text:p>363</text:p>
              </table:table-cell>
              <table:table-cell office:value-type="float" office:value="81">
                <text:p>81</text:p>
              </table:table-cell>
              <table:table-cell office:value-type="float" office:value="102">
                <text:p>102</text:p>
              </table:table-cell>
              <table:table-cell office:value-type="float" office:value="75">
                <text:p>75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15 </text:p>
              </table:table-cell>
              <table:table-cell office:value-type="float" office:value="365">
                <text:p>365</text:p>
              </table:table-cell>
              <table:table-cell office:value-type="float" office:value="81">
                <text:p>81</text:p>
              </table:table-cell>
              <table:table-cell office:value-type="float" office:value="123">
                <text:p>123</text:p>
              </table:table-cell>
              <table:table-cell office:value-type="float" office:value="91">
                <text:p>91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8 </text:p>
              </table:table-cell>
              <table:table-cell office:value-type="float" office:value="421">
                <text:p>421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1 </text:p>
              </table:table-cell>
              <table:table-cell office:value-type="float" office:value="315">
                <text:p>315</text:p>
              </table:table-cell>
              <table:table-cell office:value-type="float" office:value="77">
                <text:p>77</text:p>
              </table:table-cell>
              <table:table-cell office:value-type="float" office:value="132">
                <text:p>132</text:p>
              </table:table-cell>
              <table:table-cell office:value-type="float" office:value="89">
                <text:p>8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4 </text:p>
              </table:table-cell>
              <table:table-cell office:value-type="float" office:value="393">
                <text:p>393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9">
                <text:p>99</text:p>
              </table:table-cell>
              <table:table-cell office:value-type="float" office:value="34.9">
                <text:p>34.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3" number:min-decimal-places="3" number:min-integer-digits="1"/>
      <number:text loext:blank-width-char=")"> </number:text>
    </number:number-style>
    <number:number-style style:name="N113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1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ffffff" style:text-position="0% 100%" fo:font-family="Calibri" fo:font-size="10pt" style:font-family-asian="'ＭＳ Ｐ明朝'" style:font-size-asian="10pt" style:font-size-complex="10pt"/>
    </style:style>
    <style:style style:name="ch4" style:family="chart" style:data-style-name="N113">
      <style:chart-properties chart:display-label="true" chart:logarithmic="false" chart:minimum="0.4" chart:maximum="0.6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ffffff" style:text-position="0% 100%" fo:font-family="'ＭＳ Ｐ明朝'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>
      <style:graphic-properties svg:stroke-width="0.026cm" svg:stroke-color="#878787"/>
    </style:style>
    <style:style style:name="ch6" style:family="chart" style:data-style-name="N115">
      <style:chart-properties chart:symbol-type="none" chart:link-data-style-to-source="false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81e6f1" draw:fill-color="#81e6f1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7" style:family="chart">
      <style:chart-properties chart:solid-type="cuboid" chart:data-label-number="none" chart:data-label-text="false" chart:data-label-symbol="false" chart:data-label-series="false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112cm" svg:height="7cm" xlink:href="." xlink:type="simple" chart:class="chart:line" chart:style-name="ch1">
        <chart:plot-area chart:style-name="ch2" chart:data-source-has-labels="both" svg:x="0.766cm" svg:y="-0.033cm" svg:width="10.837cm" svg:height="7.511cm">
          <chart:coordinate-region svg:x="2.035cm" svg:y="0.219cm" svg:width="9.568cm" svg:height="6.507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/>
            <chart:data-point chart:style-name="ch7" chart:repeated="3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_neck_BM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492744186046512">
                <text:p>0.4927441860465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03214285714286">
                <text:p>0.5032142857142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08325581395349">
                <text:p>0.5083255813953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08325581395349">
                <text:p>0.50832558139534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30162790697674">
                <text:p>0.5301627906976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1" number:min-decimal-places="1" number:min-integer-digits="1" number:grouping="true"/>
      <number:text loext:blank-width-char=")"> </number:text>
    </number:number-style>
    <number:number-style style:name="N113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113P0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ffffff" style:text-position="0% 100%" fo:font-family="Calibri" fo:font-size="10pt" style:font-family-asian="'ＭＳ Ｐ明朝'" style:font-size-asian="10pt" style:font-size-complex="10pt"/>
    </style:style>
    <style:style style:name="ch4" style:family="chart" style:data-style-name="N0">
      <style:chart-properties chart:display-label="true" chart:logarithmic="false" chart:minimum="60" chart:maximum="74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ffffff" style:text-position="0% 100%" fo:font-family="'ＭＳ Ｐ明朝'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>
      <style:graphic-properties svg:stroke-width="0.026cm" svg:stroke-color="#878787"/>
    </style:style>
    <style:style style:name="ch6" style:family="chart" style:data-style-name="N113">
      <style:chart-properties chart:symbol-type="none" chart:link-data-style-to-source="false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81e6f1" draw:fill-color="#81e6f1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7" style:family="chart">
      <style:chart-properties chart:solid-type="cuboid" chart:data-label-number="none" chart:data-label-text="false" chart:data-label-symbol="false" chart:data-label-series="false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979cm" svg:height="7cm" xlink:href="." xlink:type="simple" chart:class="chart:line" chart:style-name="ch1">
        <chart:plot-area chart:style-name="ch2" chart:data-source-has-labels="both" svg:x="-0.313cm" svg:y="-0.145cm" svg:width="10.261cm" svg:height="7.458cm">
          <chart:coordinate-region svg:x="0.347cm" svg:y="0.107cm" svg:width="9.601cm" svg:height="6.453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/>
            <chart:data-point chart:style-name="ch7" chart:repeated="3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_neck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62.6511627906977">
                <text:p>62.65116279069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3.9761904761905">
                <text:p>63.97619047619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4.5697674418605">
                <text:p>64.569767441860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6.5348837209302">
                <text:p>66.53488372093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7.3023255813954">
                <text:p>67.30232558139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3" number:min-decimal-places="3" number:min-integer-digits="1"/>
      <number:text loext:blank-width-char=")"> </number:text>
    </number:number-style>
    <number:number-style style:name="N113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1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ffffff" style:text-position="0% 100%" fo:font-family="Calibri" fo:font-size="10pt" style:font-family-asian="'ＭＳ Ｐ明朝'" style:font-size-asian="10pt" style:font-size-complex="10pt"/>
    </style:style>
    <style:style style:name="ch4" style:family="chart" style:data-style-name="N113">
      <style:chart-properties chart:display-label="true" chart:logarithmic="false" chart:minimum="0.4" chart:maximum="0.6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ffffff" style:text-position="0% 100%" fo:font-family="'ＭＳ Ｐ明朝'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>
      <style:graphic-properties svg:stroke-width="0.026cm" svg:stroke-color="#878787"/>
    </style:style>
    <style:style style:name="ch6" style:family="chart" style:data-style-name="N115">
      <style:chart-properties chart:symbol-type="none" chart:link-data-style-to-source="false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fabb76" draw:fill-color="#fabb76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7" style:family="chart">
      <style:chart-properties chart:solid-type="cuboid" chart:data-label-number="none" chart:data-label-text="false" chart:data-label-symbol="false" chart:data-label-series="false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979cm" svg:height="7cm" xlink:href="." xlink:type="simple" chart:class="chart:line" chart:style-name="ch1">
        <chart:plot-area chart:style-name="ch2" chart:data-source-has-labels="both" svg:x="0.743cm" svg:y="-0.033cm" svg:width="10.732cm" svg:height="7.511cm">
          <chart:coordinate-region svg:x="2.012cm" svg:y="0.219cm" svg:width="9.463cm" svg:height="6.507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/>
            <chart:data-point chart:style-name="ch7" chart:repeated="3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_neck_BM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484840909090909">
                <text:p>0.4848409090909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94159090909091">
                <text:p>0.49415909090909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91181818181818">
                <text:p>0.4911818181818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02159090909091">
                <text:p>0.50215909090909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02340909090909">
                <text:p>0.5023409090909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1" number:min-decimal-places="1" number:min-integer-digits="1" number:grouping="true"/>
      <number:text loext:blank-width-char=")"> </number:text>
    </number:number-style>
    <number:number-style style:name="N113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113P0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4" style:family="chart" style:data-style-name="N0">
      <style:chart-properties chart:display-label="true" chart:logarithmic="false" chart:minimum="60" chart:maximum="74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ffffff" style:text-position="0% 100%" fo:font-family="'ＭＳ Ｐ明朝'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>
      <style:graphic-properties svg:stroke-width="0.026cm" svg:stroke-color="#878787"/>
    </style:style>
    <style:style style:name="ch6" style:family="chart" style:data-style-name="N113">
      <style:chart-properties chart:symbol-type="none" chart:link-data-style-to-source="false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fabb76" draw:fill-color="#fabb76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7" style:family="chart">
      <style:chart-properties chart:solid-type="cuboid" chart:data-label-number="none" chart:data-label-text="false" chart:data-label-symbol="false" chart:data-label-series="false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979cm" svg:height="7cm" xlink:href="." xlink:type="simple" chart:class="chart:line" chart:style-name="ch1">
        <chart:plot-area chart:style-name="ch2" chart:data-source-has-labels="both" svg:x="-0.313cm" svg:y="-0.04cm" svg:width="10.155cm" svg:height="6.925cm">
          <chart:coordinate-region svg:x="0.347cm" svg:y="0.212cm" svg:width="9.495cm" svg:height="6.079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/>
            <chart:data-point chart:style-name="ch7" chart:repeated="3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_neck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61.5227272727273">
                <text:p>61.52272727272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2.8409090909091">
                <text:p>62.840909090909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2.5113636363636">
                <text:p>62.51136363636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3.8409090909091">
                <text:p>63.840909090909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3.9545454545455">
                <text:p>63.95454545454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3" number:min-decimal-places="3" number:min-integer-digits="1"/>
      <number:text loext:blank-width-char=")"> </number:text>
    </number:number-style>
    <number:number-style style:name="N113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13P0"/>
    </number:number-style>
    <number:number-style style:name="N115P0" style:volatile="true">
      <number:number number:decimal-places="3" number:min-decimal-places="3" number:min-integer-digits="1" number:grouping="true"/>
      <number:text loext:blank-width-char=")"> </number:text>
    </number:number-style>
    <number:number-style style:name="N115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15P0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ffffff" style:text-position="0% 100%" fo:font-family="Calibri" fo:font-size="10pt" style:font-family-asian="'ＭＳ Ｐ明朝'" style:font-size-asian="10pt" style:font-size-complex="10pt"/>
    </style:style>
    <style:style style:name="ch4" style:family="chart" style:data-style-name="N113">
      <style:chart-properties chart:display-label="true" chart:logarithmic="false" chart:minimum="0.4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ffffff" style:text-position="0% 100%" fo:font-family="'ＭＳ Ｐ明朝'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>
      <style:graphic-properties svg:stroke-width="0.026cm" svg:stroke-color="#878787"/>
    </style:style>
    <style:style style:name="ch6" style:family="chart" style:data-style-name="N115">
      <style:chart-properties chart:symbol-type="none" chart:link-data-style-to-source="false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81e6f1" draw:fill-color="#81e6f1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7" style:family="chart" style:data-style-name="N113">
      <style:chart-properties chart:symbol-type="none" chart:link-data-style-to-source="false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98ec76" draw:fill-color="#98ec76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112cm" svg:height="7cm" xlink:href="." xlink:type="simple" chart:class="chart:line" chart:style-name="ch1">
        <chart:plot-area chart:style-name="ch2" chart:data-source-has-labels="both" svg:x="0.766cm" svg:y="-0.033cm" svg:width="10.837cm" svg:height="7.512cm">
          <chart:coordinate-region svg:x="2.035cm" svg:y="0.219cm" svg:width="9.568cm" svg:height="6.507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series chart:style-name="ch7" chart:values-cell-range-address="local-table.$C$2:.$C$6" chart:label-cell-address="local-table.$C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_neck_BMD</text:p>
              </table:table-cell>
              <table:table-cell office:value-type="string">
                <text:p>R_hip_BM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492744186046512">
                <text:p>0.492744186046512</text:p>
              </table:table-cell>
              <table:table-cell office:value-type="float" office:value="0.593232558139535">
                <text:p>0.5932325581395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03214285714286">
                <text:p>0.503214285714286</text:p>
              </table:table-cell>
              <table:table-cell office:value-type="float" office:value="0.616604651162791">
                <text:p>0.61660465116279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08325581395349">
                <text:p>0.508325581395349</text:p>
              </table:table-cell>
              <table:table-cell office:value-type="float" office:value="0.617372093023256">
                <text:p>0.6173720930232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08325581395349">
                <text:p>0.508325581395349</text:p>
              </table:table-cell>
              <table:table-cell office:value-type="float" office:value="0.617372093023256">
                <text:p>0.6173720930232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30162790697674">
                <text:p>0.530162790697674</text:p>
              </table:table-cell>
              <table:table-cell office:value-type="float" office:value="0.611395348837209">
                <text:p>0.6113953488372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1" number:min-decimal-places="1" number:min-integer-digits="1" number:grouping="true"/>
      <number:text loext:blank-width-char=")"> </number:text>
    </number:number-style>
    <number:number-style style:name="N113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113P0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ffffff" style:text-position="0% 100%" fo:font-family="Calibri" fo:font-size="10pt" style:font-family-asian="'ＭＳ Ｐ明朝'" style:font-size-asian="10pt" style:font-size-complex="10pt"/>
    </style:style>
    <style:style style:name="ch4" style:family="chart" style:data-style-name="N0">
      <style:chart-properties chart:display-label="true" chart:logarithmic="false" chart:minimum="6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ffffff" style:text-position="0% 100%" fo:font-family="'ＭＳ Ｐ明朝'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one" chart:link-data-style-to-source="true" chart:label-position="right" loext:custom-leader-lines="false">
        <chart:label-separator>
          <text:p>; </text:p>
        </chart:label-separator>
      </style:chart-properties>
      <style:graphic-properties svg:stroke-width="0.079cm" svg:stroke-color="#81e6f1" draw:fill-color="#81e6f1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7" style:family="chart" style:data-style-name="N113">
      <style:chart-properties chart:symbol-type="none" chart:link-data-style-to-source="false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98ec76" draw:fill-color="#98ec76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8" style:family="chart">
      <style:chart-properties chart:solid-type="cuboid" chart:data-label-number="none" chart:data-label-text="false" chart:data-label-symbol="false" chart:data-label-series="false"/>
    </style:style>
    <style:style style:name="ch9" style:family="chart">
      <style:graphic-properties svg:stroke-width="0.071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979cm" svg:height="7cm" xlink:href="." xlink:type="simple" chart:class="chart:line" chart:style-name="ch1">
        <chart:plot-area chart:style-name="ch2" chart:data-source-has-labels="both" svg:x="-0.313cm" svg:y="-0.145cm" svg:width="10.261cm" svg:height="7.458cm">
          <chart:coordinate-region svg:x="0.347cm" svg:y="0.107cm" svg:width="9.601cm" svg:height="6.453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series chart:style-name="ch7" chart:values-cell-range-address="local-table.$C$2:.$C$6" chart:label-cell-address="local-table.$C$1" chart:class="chart:line">
            <chart:data-point/>
            <chart:data-point chart:style-name="ch8" chart:repeated="3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_neck</text:p>
              </table:table-cell>
              <table:table-cell office:value-type="string">
                <text:p>R_hi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62.6511627906977">
                <text:p>62.6511627906977</text:p>
              </table:table-cell>
              <table:table-cell office:value-type="float" office:value="68.6744186046512">
                <text:p>68.67441860465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3.9761904761905">
                <text:p>63.9761904761905</text:p>
              </table:table-cell>
              <table:table-cell office:value-type="float" office:value="71.5581395348837">
                <text:p>71.55813953488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4.5697674418605">
                <text:p>64.5697674418605</text:p>
              </table:table-cell>
              <table:table-cell office:value-type="float" office:value="71.6627906976744">
                <text:p>71.66279069767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6.5348837209302">
                <text:p>66.5348837209302</text:p>
              </table:table-cell>
              <table:table-cell office:value-type="float" office:value="71.5581395348837">
                <text:p>71.55813953488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7.3023255813954">
                <text:p>67.3023255813954</text:p>
              </table:table-cell>
              <table:table-cell office:value-type="float" office:value="70.9302325581395">
                <text:p>70.93023255813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P0" style:volatile="true">
      <number:number number:decimal-places="3" number:min-decimal-places="3" number:min-integer-digits="1"/>
      <number:text loext:blank-width-char=")"> </number:text>
    </number:number-style>
    <number:number-style style:name="N113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13P0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ffffff" style:text-position="0% 100%" fo:font-family="Calibri" fo:font-size="10pt" style:font-family-asian="'ＭＳ Ｐ明朝'" style:font-size-asian="10pt" style:font-size-complex="10pt"/>
    </style:style>
    <style:style style:name="ch4" style:family="chart" style:data-style-name="N113">
      <style:chart-properties chart:display-label="true" chart:logarithmic="false" chart:minimum="0.4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ffffff" style:text-position="0% 100%" fo:font-family="'ＭＳ Ｐ明朝'" fo:font-size="10pt" fo:font-weight="bold" style:font-family-asian="'ＭＳ Ｐ明朝'" style:font-size-asian="10pt" style:font-weight-asian="bold" style:font-size-complex="10pt" style:font-weight-complex="bold"/>
    </style:style>
    <style:style style:name="ch5" style:family="chart">
      <style:graphic-properties svg:stroke-width="0.026cm" svg:stroke-color="#878787"/>
    </style:style>
    <style:style style:name="ch6" style:family="chart" style:data-style-name="N113">
      <style:chart-properties chart:symbol-type="none" chart:link-data-style-to-source="false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fabb76" draw:fill-color="#fabb76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7" style:family="chart" style:data-style-name="N113">
      <style:chart-properties chart:symbol-type="none" chart:link-data-style-to-source="false" chart:data-label-number="value" chart:data-label-text="fals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svg:stroke-width="0.079cm" svg:stroke-color="#ff6666" draw:fill-color="#ff6666" fo:wrap-option="wrap"/>
      <style:text-properties fo:color="#ffffff" style:text-position="0% 100%" fo:font-family="Century" fo:font-size="10pt" style:font-family-asian="'ＭＳ Ｐ明朝'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979cm" svg:height="7cm" xlink:href="." xlink:type="simple" chart:class="chart:line" chart:style-name="ch1">
        <chart:plot-area chart:style-name="ch2" chart:data-source-has-labels="both" svg:x="0.743cm" svg:y="-0.033cm" svg:width="10.732cm" svg:height="7.512cm">
          <chart:coordinate-region svg:x="2.012cm" svg:y="0.219cm" svg:width="9.463cm" svg:height="6.507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series chart:style-name="ch7" chart:values-cell-range-address="local-table.$C$2:.$C$6" chart:label-cell-address="local-table.$C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_neck_BMD</text:p>
              </table:table-cell>
              <table:table-cell office:value-type="string">
                <text:p>L_hip_BM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484840909090909">
                <text:p>0.484840909090909</text:p>
              </table:table-cell>
              <table:table-cell office:value-type="float" office:value="0.589477272727273">
                <text:p>0.5894772727272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94159090909091">
                <text:p>0.494159090909091</text:p>
              </table:table-cell>
              <table:table-cell office:value-type="float" office:value="0.614704545454545">
                <text:p>0.6147045454545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91181818181818">
                <text:p>0.491181818181818</text:p>
              </table:table-cell>
              <table:table-cell office:value-type="float" office:value="0.627352272727273">
                <text:p>0.6273522727272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02159090909091">
                <text:p>0.502159090909091</text:p>
              </table:table-cell>
              <table:table-cell office:value-type="float" office:value="0.630159090909091">
                <text:p>0.63015909090909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02340909090909">
                <text:p>0.502340909090909</text:p>
              </table:table-cell>
              <table:table-cell office:value-type="float" office:value="0.625590909090909">
                <text:p>0.6255909090909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